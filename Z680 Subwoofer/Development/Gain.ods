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073cm"/>
    </style:style>
    <style:style style:name="co5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iper %</text:p>
          </table:table-cell>
          <table:table-cell office:value-type="string" calcext:value-type="string">
            <text:p>Old Parallel Resistance</text:p>
          </table:table-cell>
          <table:table-cell office:value-type="string" calcext:value-type="string">
            <text:p>New Parallel Resistance</text:p>
          </table:table-cell>
          <table:table-cell office:value-type="string" calcext:value-type="string">
            <text:p>Old Gain</text:p>
          </table:table-cell>
          <table:table-cell office:value-type="string" calcext:value-type="string">
            <text:p>New Gain</text:p>
          </table:table-cell>
          <table:table-cell office:value-type="string" calcext:value-type="string">
            <text:p>Old Resistor Value (kohm):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lope</text:p>
          </table:table-cell>
          <table:table-cell table:style-name="ce1" table:formula="of:=([.D72]-[.D32])/4" office:value-type="float" office:value="1.25735608111579" calcext:value-type="float">
            <text:p>1.26</text:p>
          </table:table-cell>
          <table:table-cell office:value-type="string" calcext:value-type="string">
            <text:p>DB/10% @ Midran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ew Resistor Value (kohm):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Slope</text:p>
          </table:table-cell>
          <table:table-cell table:style-name="ce1" table:formula="of:=([.E72]-[.E32])/4" office:value-type="float" office:value="1.83988392647298" calcext:value-type="float">
            <text:p>1.84</text:p>
          </table:table-cell>
          <table:table-cell office:value-type="string" calcext:value-type="string">
            <text:p>DB/10% @ Midrange</text:p>
          </table:table-cell>
        </table:table-row>
        <table:table-row table:style-name="ro1">
          <table:table-cell table:formula="of:=[.A2]+0.01" office:value-type="float" office:value="0.01" calcext:value-type="float">
            <text:p>0.01</text:p>
          </table:table-cell>
          <table:table-cell table:formula="of:=((10*(1-[.A3]))^-1+[.$G$1]^-1)^-1" office:value-type="float" office:value="4.9748743718593" calcext:value-type="float">
            <text:p>4.9748743718593</text:p>
          </table:table-cell>
          <table:table-cell table:formula="of:=((10*([.A3]))^-1+[.$G$2]^-1)^-1" office:value-type="float" office:value="0.0833333333333333" calcext:value-type="float">
            <text:p>0.0833333333333333</text:p>
          </table:table-cell>
          <table:table-cell table:formula="of:=20*LOG(10*[.A3]/(10*[.A3]+[.B3]);10)" office:value-type="float" office:value="-34.1085059158091" calcext:value-type="float">
            <text:p>-34.1085059158091</text:p>
          </table:table-cell>
          <table:table-cell table:formula="of:=20*LOG([.C3]/(10*(1-[.A3])+[.C3]);10)" office:value-type="float" office:value="-41.5691363610658" calcext:value-type="float">
            <text:p>-41.5691363610658</text:p>
          </table:table-cell>
          <table:table-cell table:number-columns-repeated="6"/>
        </table:table-row>
        <table:table-row table:style-name="ro1">
          <table:table-cell table:formula="of:=[.A3]+0.01" office:value-type="float" office:value="0.02" calcext:value-type="float">
            <text:p>0.02</text:p>
          </table:table-cell>
          <table:table-cell table:formula="of:=((10*(1-[.A4]))^-1+[.$G$1]^-1)^-1" office:value-type="float" office:value="4.94949494949495" calcext:value-type="float">
            <text:p>4.94949494949495</text:p>
          </table:table-cell>
          <table:table-cell table:formula="of:=((10*([.A4]))^-1+[.$G$2]^-1)^-1" office:value-type="float" office:value="0.142857142857143" calcext:value-type="float">
            <text:p>0.142857142857143</text:p>
          </table:table-cell>
          <table:table-cell table:formula="of:=20*LOG(10*[.A4]/(10*[.A4]+[.B4]);10)" office:value-type="float" office:value="-28.2146928174344" calcext:value-type="float">
            <text:p>-28.2146928174344</text:p>
          </table:table-cell>
          <table:table-cell table:formula="of:=20*LOG([.C4]/(10*(1-[.A4])+[.C4]);10)" office:value-type="float" office:value="-36.8521847922112" calcext:value-type="float">
            <text:p>-36.8521847922112</text:p>
          </table:table-cell>
          <table:table-cell table:number-columns-repeated="6"/>
        </table:table-row>
        <table:table-row table:style-name="ro1">
          <table:table-cell table:formula="of:=[.A4]+0.01" office:value-type="float" office:value="0.03" calcext:value-type="float">
            <text:p>0.03</text:p>
          </table:table-cell>
          <table:table-cell table:formula="of:=((10*(1-[.A5]))^-1+[.$G$1]^-1)^-1" office:value-type="float" office:value="4.9238578680203" calcext:value-type="float">
            <text:p>4.9238578680203</text:p>
          </table:table-cell>
          <table:table-cell table:formula="of:=((10*([.A5]))^-1+[.$G$2]^-1)^-1" office:value-type="float" office:value="0.1875" calcext:value-type="float">
            <text:p>0.1875</text:p>
          </table:table-cell>
          <table:table-cell table:formula="of:=20*LOG(10*[.A5]/(10*[.A5]+[.B5]);10)" office:value-type="float" office:value="-24.8174019463904" calcext:value-type="float">
            <text:p>-24.8174019463904</text:p>
          </table:table-cell>
          <table:table-cell table:formula="of:=20*LOG([.C5]/(10*(1-[.A5])+[.C5]);10)" office:value-type="float" office:value="-34.4417044888399" calcext:value-type="float">
            <text:p>-34.4417044888399</text:p>
          </table:table-cell>
          <table:table-cell table:number-columns-repeated="6"/>
        </table:table-row>
        <table:table-row table:style-name="ro1">
          <table:table-cell table:formula="of:=[.A5]+0.01" office:value-type="float" office:value="0.04" calcext:value-type="float">
            <text:p>0.04</text:p>
          </table:table-cell>
          <table:table-cell table:formula="of:=((10*(1-[.A6]))^-1+[.$G$1]^-1)^-1" office:value-type="float" office:value="4.89795918367347" calcext:value-type="float">
            <text:p>4.89795918367347</text:p>
          </table:table-cell>
          <table:table-cell table:formula="of:=((10*([.A6]))^-1+[.$G$2]^-1)^-1" office:value-type="float" office:value="0.222222222222222" calcext:value-type="float">
            <text:p>0.222222222222222</text:p>
          </table:table-cell>
          <table:table-cell table:formula="of:=20*LOG(10*[.A6]/(10*[.A6]+[.B6]);10)" office:value-type="float" office:value="-22.4409723354371" calcext:value-type="float">
            <text:p>-22.4409723354371</text:p>
          </table:table-cell>
          <table:table-cell table:formula="of:=20*LOG([.C6]/(10*(1-[.A6])+[.C6]);10)" office:value-type="float" office:value="-32.9084453869818" calcext:value-type="float">
            <text:p>-32.9084453869818</text:p>
          </table:table-cell>
          <table:table-cell table:number-columns-repeated="6"/>
        </table:table-row>
        <table:table-row table:style-name="ro1">
          <table:table-cell table:formula="of:=[.A6]+0.01" office:value-type="float" office:value="0.05" calcext:value-type="float">
            <text:p>0.05</text:p>
          </table:table-cell>
          <table:table-cell table:formula="of:=((10*(1-[.A7]))^-1+[.$G$1]^-1)^-1" office:value-type="float" office:value="4.87179487179487" calcext:value-type="float">
            <text:p>4.87179487179487</text:p>
          </table:table-cell>
          <table:table-cell table:formula="of:=((10*([.A7]))^-1+[.$G$2]^-1)^-1" office:value-type="float" office:value="0.25" calcext:value-type="float">
            <text:p>0.25</text:p>
          </table:table-cell>
          <table:table-cell table:formula="of:=20*LOG(10*[.A7]/(10*[.A7]+[.B7]);10)" office:value-type="float" office:value="-20.6229883187959" calcext:value-type="float">
            <text:p>-20.6229883187959</text:p>
          </table:table-cell>
          <table:table-cell table:formula="of:=20*LOG([.C7]/(10*(1-[.A7])+[.C7]);10)" office:value-type="float" office:value="-31.82129214053" calcext:value-type="float">
            <text:p>-31.82129214053</text:p>
          </table:table-cell>
          <table:table-cell>
            <draw:frame draw:z-index="0" draw:style-name="gr1" draw:text-style-name="P1" svg:width="27.604cm" svg:height="20.896cm" svg:x="1.679cm" svg:y="0.362cm">
              <draw:object draw:notify-on-update-of-ranges="Sheet1.A2:Sheet1.A101 Sheet1.D1:Sheet1.D1 Sheet1.D2:Sheet1.D101 Sheet1.A2:Sheet1.A101 Sheet1.E1:Sheet1.E1 Sheet1.E2:Sheet1.E10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[.A7]+0.01" office:value-type="float" office:value="0.06" calcext:value-type="float">
            <text:p>0.06</text:p>
          </table:table-cell>
          <table:table-cell table:formula="of:=((10*(1-[.A8]))^-1+[.$G$1]^-1)^-1" office:value-type="float" office:value="4.84536082474227" calcext:value-type="float">
            <text:p>4.84536082474227</text:p>
          </table:table-cell>
          <table:table-cell table:formula="of:=((10*([.A8]))^-1+[.$G$2]^-1)^-1" office:value-type="float" office:value="0.272727272727273" calcext:value-type="float">
            <text:p>0.272727272727273</text:p>
          </table:table-cell>
          <table:table-cell table:formula="of:=20*LOG(10*[.A8]/(10*[.A8]+[.B8]);10)" office:value-type="float" office:value="-19.1575082444203" calcext:value-type="float">
            <text:p>-19.1575082444203</text:p>
          </table:table-cell>
          <table:table-cell table:formula="of:=20*LOG([.C8]/(10*(1-[.A8])+[.C8]);10)" office:value-type="float" office:value="-30.9964074647873" calcext:value-type="float">
            <text:p>-30.9964074647873</text:p>
          </table:table-cell>
          <table:table-cell table:number-columns-repeated="6"/>
        </table:table-row>
        <table:table-row table:style-name="ro1">
          <table:table-cell table:formula="of:=[.A8]+0.01" office:value-type="float" office:value="0.07" calcext:value-type="float">
            <text:p>0.07</text:p>
          </table:table-cell>
          <table:table-cell table:formula="of:=((10*(1-[.A9]))^-1+[.$G$1]^-1)^-1" office:value-type="float" office:value="4.81865284974093" calcext:value-type="float">
            <text:p>4.81865284974093</text:p>
          </table:table-cell>
          <table:table-cell table:formula="of:=((10*([.A9]))^-1+[.$G$2]^-1)^-1" office:value-type="float" office:value="0.291666666666667" calcext:value-type="float">
            <text:p>0.291666666666667</text:p>
          </table:table-cell>
          <table:table-cell table:formula="of:=20*LOG(10*[.A9]/(10*[.A9]+[.B9]);10)" office:value-type="float" office:value="-17.9347007132588" calcext:value-type="float">
            <text:p>-17.9347007132588</text:p>
          </table:table-cell>
          <table:table-cell table:formula="of:=20*LOG([.C9]/(10*(1-[.A9])+[.C9]);10)" office:value-type="float" office:value="-30.3401455855903" calcext:value-type="float">
            <text:p>-30.3401455855903</text:p>
          </table:table-cell>
          <table:table-cell table:number-columns-repeated="6"/>
        </table:table-row>
        <table:table-row table:style-name="ro1">
          <table:table-cell table:formula="of:=[.A9]+0.01" office:value-type="float" office:value="0.08" calcext:value-type="float">
            <text:p>0.08</text:p>
          </table:table-cell>
          <table:table-cell table:formula="of:=((10*(1-[.A10]))^-1+[.$G$1]^-1)^-1" office:value-type="float" office:value="4.79166666666667" calcext:value-type="float">
            <text:p>4.79166666666667</text:p>
          </table:table-cell>
          <table:table-cell table:formula="of:=((10*([.A10]))^-1+[.$G$2]^-1)^-1" office:value-type="float" office:value="0.307692307692308" calcext:value-type="float">
            <text:p>0.307692307692308</text:p>
          </table:table-cell>
          <table:table-cell table:formula="of:=20*LOG(10*[.A10]/(10*[.A10]+[.B10]);10)" office:value-type="float" office:value="-16.8890257425885" calcext:value-type="float">
            <text:p>-16.8890257425885</text:p>
          </table:table-cell>
          <table:table-cell table:formula="of:=20*LOG([.C10]/(10*(1-[.A10])+[.C10]);10)" office:value-type="float" office:value="-29.7991695884967" calcext:value-type="float">
            <text:p>-29.7991695884967</text:p>
          </table:table-cell>
          <table:table-cell table:number-columns-repeated="6"/>
        </table:table-row>
        <table:table-row table:style-name="ro1">
          <table:table-cell table:formula="of:=[.A10]+0.01" office:value-type="float" office:value="0.09" calcext:value-type="float">
            <text:p>0.09</text:p>
          </table:table-cell>
          <table:table-cell table:formula="of:=((10*(1-[.A11]))^-1+[.$G$1]^-1)^-1" office:value-type="float" office:value="4.76439790575916" calcext:value-type="float">
            <text:p>4.76439790575916</text:p>
          </table:table-cell>
          <table:table-cell table:formula="of:=((10*([.A11]))^-1+[.$G$2]^-1)^-1" office:value-type="float" office:value="0.321428571428571" calcext:value-type="float">
            <text:p>0.321428571428571</text:p>
          </table:table-cell>
          <table:table-cell table:formula="of:=20*LOG(10*[.A11]/(10*[.A11]+[.B11]);10)" office:value-type="float" office:value="-15.978224882128" calcext:value-type="float">
            <text:p>-15.978224882128</text:p>
          </table:table-cell>
          <table:table-cell table:formula="of:=20*LOG([.C11]/(10*(1-[.A11])+[.C11]);10)" office:value-type="float" office:value="-29.3406456354204" calcext:value-type="float">
            <text:p>-29.3406456354204</text:p>
          </table:table-cell>
          <table:table-cell table:number-columns-repeated="6"/>
        </table:table-row>
        <table:table-row table:style-name="ro1">
          <table:table-cell table:formula="of:=[.A11]+0.01" office:value-type="float" office:value="0.1" calcext:value-type="float">
            <text:p>0.1</text:p>
          </table:table-cell>
          <table:table-cell table:formula="of:=((10*(1-[.A12]))^-1+[.$G$1]^-1)^-1" office:value-type="float" office:value="4.73684210526316" calcext:value-type="float">
            <text:p>4.73684210526316</text:p>
          </table:table-cell>
          <table:table-cell table:formula="of:=((10*([.A12]))^-1+[.$G$2]^-1)^-1" office:value-type="float" office:value="0.333333333333333" calcext:value-type="float">
            <text:p>0.333333333333333</text:p>
          </table:table-cell>
          <table:table-cell table:formula="of:=20*LOG(10*[.A12]/(10*[.A12]+[.B12]);10)" office:value-type="float" office:value="-15.1734579397559" calcext:value-type="float">
            <text:p>-15.1734579397559</text:p>
          </table:table-cell>
          <table:table-cell table:formula="of:=20*LOG([.C12]/(10*(1-[.A12])+[.C12]);10)" office:value-type="float" office:value="-28.9431606268444" calcext:value-type="float">
            <text:p>-28.9431606268444</text:p>
          </table:table-cell>
          <table:table-cell table:number-columns-repeated="6"/>
        </table:table-row>
        <table:table-row table:style-name="ro1">
          <table:table-cell table:formula="of:=[.A12]+0.01" office:value-type="float" office:value="0.11" calcext:value-type="float">
            <text:p>0.11</text:p>
          </table:table-cell>
          <table:table-cell table:formula="of:=((10*(1-[.A13]))^-1+[.$G$1]^-1)^-1" office:value-type="float" office:value="4.70899470899471" calcext:value-type="float">
            <text:p>4.70899470899471</text:p>
          </table:table-cell>
          <table:table-cell table:formula="of:=((10*([.A13]))^-1+[.$G$2]^-1)^-1" office:value-type="float" office:value="0.34375" calcext:value-type="float">
            <text:p>0.34375</text:p>
          </table:table-cell>
          <table:table-cell table:formula="of:=20*LOG(10*[.A13]/(10*[.A13]+[.B13]);10)" office:value-type="float" office:value="-14.4541659149969" calcext:value-type="float">
            <text:p>-14.4541659149969</text:p>
          </table:table-cell>
          <table:table-cell table:formula="of:=20*LOG([.C13]/(10*(1-[.A13])+[.C13]);10)" office:value-type="float" office:value="-28.592109690053" calcext:value-type="float">
            <text:p>-28.592109690053</text:p>
          </table:table-cell>
          <table:table-cell table:number-columns-repeated="6"/>
        </table:table-row>
        <table:table-row table:style-name="ro1">
          <table:table-cell table:formula="of:=[.A13]+0.01" office:value-type="float" office:value="0.12" calcext:value-type="float">
            <text:p>0.12</text:p>
          </table:table-cell>
          <table:table-cell table:formula="of:=((10*(1-[.A14]))^-1+[.$G$1]^-1)^-1" office:value-type="float" office:value="4.68085106382979" calcext:value-type="float">
            <text:p>4.68085106382979</text:p>
          </table:table-cell>
          <table:table-cell table:formula="of:=((10*([.A14]))^-1+[.$G$2]^-1)^-1" office:value-type="float" office:value="0.352941176470588" calcext:value-type="float">
            <text:p>0.352941176470588</text:p>
          </table:table-cell>
          <table:table-cell table:formula="of:=20*LOG(10*[.A14]/(10*[.A14]+[.B14]);10)" office:value-type="float" office:value="-13.8051786943764" calcext:value-type="float">
            <text:p>-13.8051786943764</text:p>
          </table:table-cell>
          <table:table-cell table:formula="of:=20*LOG([.C14]/(10*(1-[.A14])+[.C14]);10)" office:value-type="float" office:value="-28.2771668454005" calcext:value-type="float">
            <text:p>-28.2771668454005</text:p>
          </table:table-cell>
          <table:table-cell table:number-columns-repeated="6"/>
        </table:table-row>
        <table:table-row table:style-name="ro1">
          <table:table-cell table:formula="of:=[.A14]+0.01" office:value-type="float" office:value="0.13" calcext:value-type="float">
            <text:p>0.13</text:p>
          </table:table-cell>
          <table:table-cell table:formula="of:=((10*(1-[.A15]))^-1+[.$G$1]^-1)^-1" office:value-type="float" office:value="4.6524064171123" calcext:value-type="float">
            <text:p>4.6524064171123</text:p>
          </table:table-cell>
          <table:table-cell table:formula="of:=((10*([.A15]))^-1+[.$G$2]^-1)^-1" office:value-type="float" office:value="0.361111111111111" calcext:value-type="float">
            <text:p>0.361111111111111</text:p>
          </table:table-cell>
          <table:table-cell table:formula="of:=20*LOG(10*[.A15]/(10*[.A15]+[.B15]);10)" office:value-type="float" office:value="-13.2149844781527" calcext:value-type="float">
            <text:p>-13.2149844781527</text:p>
          </table:table-cell>
          <table:table-cell table:formula="of:=20*LOG([.C15]/(10*(1-[.A15])+[.C15]);10)" office:value-type="float" office:value="-27.9908120879484" calcext:value-type="float">
            <text:p>-27.9908120879484</text:p>
          </table:table-cell>
          <table:table-cell table:number-columns-repeated="6"/>
        </table:table-row>
        <table:table-row table:style-name="ro1">
          <table:table-cell table:formula="of:=[.A15]+0.01" office:value-type="float" office:value="0.14" calcext:value-type="float">
            <text:p>0.14</text:p>
          </table:table-cell>
          <table:table-cell table:formula="of:=((10*(1-[.A16]))^-1+[.$G$1]^-1)^-1" office:value-type="float" office:value="4.62365591397849" calcext:value-type="float">
            <text:p>4.62365591397849</text:p>
          </table:table-cell>
          <table:table-cell table:formula="of:=((10*([.A16]))^-1+[.$G$2]^-1)^-1" office:value-type="float" office:value="0.368421052631579" calcext:value-type="float">
            <text:p>0.368421052631579</text:p>
          </table:table-cell>
          <table:table-cell table:formula="of:=20*LOG(10*[.A16]/(10*[.A16]+[.B16]);10)" office:value-type="float" office:value="-12.6746424051075" calcext:value-type="float">
            <text:p>-12.6746424051075</text:p>
          </table:table-cell>
          <table:table-cell table:formula="of:=20*LOG([.C16]/(10*(1-[.A16])+[.C16]);10)" office:value-type="float" office:value="-27.7274310083285" calcext:value-type="float">
            <text:p>-27.7274310083285</text:p>
          </table:table-cell>
          <table:table-cell table:number-columns-repeated="6"/>
        </table:table-row>
        <table:table-row table:style-name="ro1">
          <table:table-cell table:formula="of:=[.A16]+0.01" office:value-type="float" office:value="0.15" calcext:value-type="float">
            <text:p>0.15</text:p>
          </table:table-cell>
          <table:table-cell table:formula="of:=((10*(1-[.A17]))^-1+[.$G$1]^-1)^-1" office:value-type="float" office:value="4.5945945945946" calcext:value-type="float">
            <text:p>4.5945945945946</text:p>
          </table:table-cell>
          <table:table-cell table:formula="of:=((10*([.A17]))^-1+[.$G$2]^-1)^-1" office:value-type="float" office:value="0.375" calcext:value-type="float">
            <text:p>0.375</text:p>
          </table:table-cell>
          <table:table-cell table:formula="of:=20*LOG(10*[.A17]/(10*[.A17]+[.B17]);10)" office:value-type="float" office:value="-12.1770712618261" calcext:value-type="float">
            <text:p>-12.1770712618261</text:p>
          </table:table-cell>
          <table:table-cell table:formula="of:=20*LOG([.C17]/(10*(1-[.A17])+[.C17]);10)" office:value-type="float" office:value="-27.4827418799883" calcext:value-type="float">
            <text:p>-27.4827418799883</text:p>
          </table:table-cell>
          <table:table-cell table:number-columns-repeated="6"/>
        </table:table-row>
        <table:table-row table:style-name="ro1">
          <table:table-cell table:formula="of:=[.A17]+0.01" office:value-type="float" office:value="0.16" calcext:value-type="float">
            <text:p>0.16</text:p>
          </table:table-cell>
          <table:table-cell table:formula="of:=((10*(1-[.A18]))^-1+[.$G$1]^-1)^-1" office:value-type="float" office:value="4.56521739130435" calcext:value-type="float">
            <text:p>4.56521739130435</text:p>
          </table:table-cell>
          <table:table-cell table:formula="of:=((10*([.A18]))^-1+[.$G$2]^-1)^-1" office:value-type="float" office:value="0.380952380952381" calcext:value-type="float">
            <text:p>0.380952380952381</text:p>
          </table:table-cell>
          <table:table-cell table:formula="of:=20*LOG(10*[.A18]/(10*[.A18]+[.B18]);10)" office:value-type="float" office:value="-11.7165682434706" calcext:value-type="float">
            <text:p>-11.7165682434706</text:p>
          </table:table-cell>
          <table:table-cell table:formula="of:=20*LOG([.C18]/(10*(1-[.A18])+[.C18]);10)" office:value-type="float" office:value="-27.2534185945133" calcext:value-type="float">
            <text:p>-27.2534185945133</text:p>
          </table:table-cell>
          <table:table-cell table:number-columns-repeated="6"/>
        </table:table-row>
        <table:table-row table:style-name="ro1">
          <table:table-cell table:formula="of:=[.A18]+0.01" office:value-type="float" office:value="0.17" calcext:value-type="float">
            <text:p>0.17</text:p>
          </table:table-cell>
          <table:table-cell table:formula="of:=((10*(1-[.A19]))^-1+[.$G$1]^-1)^-1" office:value-type="float" office:value="4.53551912568306" calcext:value-type="float">
            <text:p>4.53551912568306</text:p>
          </table:table-cell>
          <table:table-cell table:formula="of:=((10*([.A19]))^-1+[.$G$2]^-1)^-1" office:value-type="float" office:value="0.386363636363636" calcext:value-type="float">
            <text:p>0.386363636363636</text:p>
          </table:table-cell>
          <table:table-cell table:formula="of:=20*LOG(10*[.A19]/(10*[.A19]+[.B19]);10)" office:value-type="float" office:value="-11.2884738852116" calcext:value-type="float">
            <text:p>-11.2884738852116</text:p>
          </table:table-cell>
          <table:table-cell table:formula="of:=20*LOG([.C19]/(10*(1-[.A19])+[.C19]);10)" office:value-type="float" office:value="-27.0368352268144" calcext:value-type="float">
            <text:p>-27.0368352268144</text:p>
          </table:table-cell>
          <table:table-cell table:number-columns-repeated="6"/>
        </table:table-row>
        <table:table-row table:style-name="ro1">
          <table:table-cell table:formula="of:=[.A19]+0.01" office:value-type="float" office:value="0.18" calcext:value-type="float">
            <text:p>0.18</text:p>
          </table:table-cell>
          <table:table-cell table:formula="of:=((10*(1-[.A20]))^-1+[.$G$1]^-1)^-1" office:value-type="float" office:value="4.50549450549451" calcext:value-type="float">
            <text:p>4.50549450549451</text:p>
          </table:table-cell>
          <table:table-cell table:formula="of:=((10*([.A20]))^-1+[.$G$2]^-1)^-1" office:value-type="float" office:value="0.391304347826087" calcext:value-type="float">
            <text:p>0.391304347826087</text:p>
          </table:table-cell>
          <table:table-cell table:formula="of:=20*LOG(10*[.A20]/(10*[.A20]+[.B20]);10)" office:value-type="float" office:value="-10.8889329297116" calcext:value-type="float">
            <text:p>-10.8889329297116</text:p>
          </table:table-cell>
          <table:table-cell table:formula="of:=20*LOG([.C20]/(10*(1-[.A20])+[.C20]);10)" office:value-type="float" office:value="-26.8308886162457" calcext:value-type="float">
            <text:p>-26.8308886162457</text:p>
          </table:table-cell>
          <table:table-cell table:number-columns-repeated="6"/>
        </table:table-row>
        <table:table-row table:style-name="ro1">
          <table:table-cell table:formula="of:=[.A20]+0.01" office:value-type="float" office:value="0.19" calcext:value-type="float">
            <text:p>0.19</text:p>
          </table:table-cell>
          <table:table-cell table:formula="of:=((10*(1-[.A21]))^-1+[.$G$1]^-1)^-1" office:value-type="float" office:value="4.47513812154696" calcext:value-type="float">
            <text:p>4.47513812154696</text:p>
          </table:table-cell>
          <table:table-cell table:formula="of:=((10*([.A21]))^-1+[.$G$2]^-1)^-1" office:value-type="float" office:value="0.395833333333333" calcext:value-type="float">
            <text:p>0.395833333333333</text:p>
          </table:table-cell>
          <table:table-cell table:formula="of:=20*LOG(10*[.A21]/(10*[.A21]+[.B21]);10)" office:value-type="float" office:value="-10.5147199505954" calcext:value-type="float">
            <text:p>-10.5147199505954</text:p>
          </table:table-cell>
          <table:table-cell table:formula="of:=20*LOG([.C21]/(10*(1-[.A21])+[.C21]);10)" office:value-type="float" office:value="-26.6338724097858" calcext:value-type="float">
            <text:p>-26.6338724097858</text:p>
          </table:table-cell>
          <table:table-cell table:number-columns-repeated="6"/>
        </table:table-row>
        <table:table-row table:style-name="ro1">
          <table:table-cell table:formula="of:=[.A21]+0.01" office:value-type="float" office:value="0.2" calcext:value-type="float">
            <text:p>0.2</text:p>
          </table:table-cell>
          <table:table-cell table:formula="of:=((10*(1-[.A22]))^-1+[.$G$1]^-1)^-1" office:value-type="float" office:value="4.44444444444444" calcext:value-type="float">
            <text:p>4.44444444444444</text:p>
          </table:table-cell>
          <table:table-cell table:formula="of:=((10*([.A22]))^-1+[.$G$2]^-1)^-1" office:value-type="float" office:value="0.4" calcext:value-type="float">
            <text:p>0.4</text:p>
          </table:table-cell>
          <table:table-cell table:formula="of:=20*LOG(10*[.A22]/(10*[.A22]+[.B22]);10)" office:value-type="float" office:value="-10.1631097691926" calcext:value-type="float">
            <text:p>-10.1631097691926</text:p>
          </table:table-cell>
          <table:table-cell table:formula="of:=20*LOG([.C22]/(10*(1-[.A22])+[.C22]);10)" office:value-type="float" office:value="-26.4443858946784" calcext:value-type="float">
            <text:p>-26.4443858946784</text:p>
          </table:table-cell>
          <table:table-cell table:number-columns-repeated="6"/>
        </table:table-row>
        <table:table-row table:style-name="ro1">
          <table:table-cell table:formula="of:=[.A22]+0.01" office:value-type="float" office:value="0.21" calcext:value-type="float">
            <text:p>0.21</text:p>
          </table:table-cell>
          <table:table-cell table:formula="of:=((10*(1-[.A23]))^-1+[.$G$1]^-1)^-1" office:value-type="float" office:value="4.41340782122905" calcext:value-type="float">
            <text:p>4.41340782122905</text:p>
          </table:table-cell>
          <table:table-cell table:formula="of:=((10*([.A23]))^-1+[.$G$2]^-1)^-1" office:value-type="float" office:value="0.403846153846154" calcext:value-type="float">
            <text:p>0.403846153846154</text:p>
          </table:table-cell>
          <table:table-cell table:formula="of:=20*LOG(10*[.A23]/(10*[.A23]+[.B23]);10)" office:value-type="float" office:value="-9.83177953173729" calcext:value-type="float">
            <text:p>-9.83177953173729</text:p>
          </table:table-cell>
          <table:table-cell table:formula="of:=20*LOG([.C23]/(10*(1-[.A23])+[.C23]);10)" office:value-type="float" office:value="-26.2612668652859" calcext:value-type="float">
            <text:p>-26.2612668652859</text:p>
          </table:table-cell>
          <table:table-cell table:number-columns-repeated="6"/>
        </table:table-row>
        <table:table-row table:style-name="ro1">
          <table:table-cell table:formula="of:=[.A23]+0.01" office:value-type="float" office:value="0.22" calcext:value-type="float">
            <text:p>0.22</text:p>
          </table:table-cell>
          <table:table-cell table:formula="of:=((10*(1-[.A24]))^-1+[.$G$1]^-1)^-1" office:value-type="float" office:value="4.38202247191011" calcext:value-type="float">
            <text:p>4.38202247191011</text:p>
          </table:table-cell>
          <table:table-cell table:formula="of:=((10*([.A24]))^-1+[.$G$2]^-1)^-1" office:value-type="float" office:value="0.407407407407407" calcext:value-type="float">
            <text:p>0.407407407407407</text:p>
          </table:table-cell>
          <table:table-cell table:formula="of:=20*LOG(10*[.A24]/(10*[.A24]+[.B24]);10)" office:value-type="float" office:value="-9.51873359756921" calcext:value-type="float">
            <text:p>-9.51873359756921</text:p>
          </table:table-cell>
          <table:table-cell table:formula="of:=20*LOG([.C24]/(10*(1-[.A24])+[.C24]);10)" office:value-type="float" office:value="-26.0835414179633" calcext:value-type="float">
            <text:p>-26.0835414179633</text:p>
          </table:table-cell>
          <table:table-cell table:number-columns-repeated="6"/>
        </table:table-row>
        <table:table-row table:style-name="ro1">
          <table:table-cell table:formula="of:=[.A24]+0.01" office:value-type="float" office:value="0.23" calcext:value-type="float">
            <text:p>0.23</text:p>
          </table:table-cell>
          <table:table-cell table:formula="of:=((10*(1-[.A25]))^-1+[.$G$1]^-1)^-1" office:value-type="float" office:value="4.35028248587571" calcext:value-type="float">
            <text:p>4.35028248587571</text:p>
          </table:table-cell>
          <table:table-cell table:formula="of:=((10*([.A25]))^-1+[.$G$2]^-1)^-1" office:value-type="float" office:value="0.410714285714286" calcext:value-type="float">
            <text:p>0.410714285714286</text:p>
          </table:table-cell>
          <table:table-cell table:formula="of:=20*LOG(10*[.A25]/(10*[.A25]+[.B25]);10)" office:value-type="float" office:value="-9.22224514646632" calcext:value-type="float">
            <text:p>-9.22224514646632</text:p>
          </table:table-cell>
          <table:table-cell table:formula="of:=20*LOG([.C25]/(10*(1-[.A25])+[.C25]);10)" office:value-type="float" office:value="-25.9103858773225" calcext:value-type="float">
            <text:p>-25.9103858773225</text:p>
          </table:table-cell>
          <table:table-cell table:number-columns-repeated="6"/>
        </table:table-row>
        <table:table-row table:style-name="ro1">
          <table:table-cell table:formula="of:=[.A25]+0.01" office:value-type="float" office:value="0.24" calcext:value-type="float">
            <text:p>0.24</text:p>
          </table:table-cell>
          <table:table-cell table:formula="of:=((10*(1-[.A26]))^-1+[.$G$1]^-1)^-1" office:value-type="float" office:value="4.31818181818182" calcext:value-type="float">
            <text:p>4.31818181818182</text:p>
          </table:table-cell>
          <table:table-cell table:formula="of:=((10*([.A26]))^-1+[.$G$2]^-1)^-1" office:value-type="float" office:value="0.413793103448276" calcext:value-type="float">
            <text:p>0.413793103448276</text:p>
          </table:table-cell>
          <table:table-cell table:formula="of:=20*LOG(10*[.A26]/(10*[.A26]+[.B26]);10)" office:value-type="float" office:value="-8.94081023049989" calcext:value-type="float">
            <text:p>-8.94081023049989</text:p>
          </table:table-cell>
          <table:table-cell table:formula="of:=20*LOG([.C26]/(10*(1-[.A26])+[.C26]);10)" office:value-type="float" office:value="-25.7410975534134" calcext:value-type="float">
            <text:p>-25.7410975534134</text:p>
          </table:table-cell>
          <table:table-cell table:number-columns-repeated="6"/>
        </table:table-row>
        <table:table-row table:style-name="ro1">
          <table:table-cell table:formula="of:=[.A26]+0.01" office:value-type="float" office:value="0.25" calcext:value-type="float">
            <text:p>0.25</text:p>
          </table:table-cell>
          <table:table-cell table:formula="of:=((10*(1-[.A27]))^-1+[.$G$1]^-1)^-1" office:value-type="float" office:value="4.28571428571429" calcext:value-type="float">
            <text:p>4.28571428571429</text:p>
          </table:table-cell>
          <table:table-cell table:formula="of:=((10*([.A27]))^-1+[.$G$2]^-1)^-1" office:value-type="float" office:value="0.416666666666667" calcext:value-type="float">
            <text:p>0.416666666666667</text:p>
          </table:table-cell>
          <table:table-cell table:formula="of:=20*LOG(10*[.A27]/(10*[.A27]+[.B27]);10)" office:value-type="float" office:value="-8.67311121877144" calcext:value-type="float">
            <text:p>-8.67311121877144</text:p>
          </table:table-cell>
          <table:table-cell table:formula="of:=20*LOG([.C27]/(10*(1-[.A27])+[.C27]);10)" office:value-type="float" office:value="-25.5750720190566" calcext:value-type="float">
            <text:p>-25.5750720190566</text:p>
          </table:table-cell>
          <table:table-cell table:number-columns-repeated="6"/>
        </table:table-row>
        <table:table-row table:style-name="ro1">
          <table:table-cell table:formula="of:=[.A27]+0.01" office:value-type="float" office:value="0.26" calcext:value-type="float">
            <text:p>0.26</text:p>
          </table:table-cell>
          <table:table-cell table:formula="of:=((10*(1-[.A28]))^-1+[.$G$1]^-1)^-1" office:value-type="float" office:value="4.25287356321839" calcext:value-type="float">
            <text:p>4.25287356321839</text:p>
          </table:table-cell>
          <table:table-cell table:formula="of:=((10*([.A28]))^-1+[.$G$2]^-1)^-1" office:value-type="float" office:value="0.419354838709677" calcext:value-type="float">
            <text:p>0.419354838709677</text:p>
          </table:table-cell>
          <table:table-cell table:formula="of:=20*LOG(10*[.A28]/(10*[.A28]+[.B28]);10)" office:value-type="float" office:value="-8.41798742214351" calcext:value-type="float">
            <text:p>-8.41798742214351</text:p>
          </table:table-cell>
          <table:table-cell table:formula="of:=20*LOG([.C28]/(10*(1-[.A28])+[.C28]);10)" office:value-type="float" office:value="-25.4117852637482" calcext:value-type="float">
            <text:p>-25.4117852637482</text:p>
          </table:table-cell>
          <table:table-cell table:number-columns-repeated="6"/>
        </table:table-row>
        <table:table-row table:style-name="ro1">
          <table:table-cell table:formula="of:=[.A28]+0.01" office:value-type="float" office:value="0.27" calcext:value-type="float">
            <text:p>0.27</text:p>
          </table:table-cell>
          <table:table-cell table:formula="of:=((10*(1-[.A29]))^-1+[.$G$1]^-1)^-1" office:value-type="float" office:value="4.21965317919075" calcext:value-type="float">
            <text:p>4.21965317919075</text:p>
          </table:table-cell>
          <table:table-cell table:formula="of:=((10*([.A29]))^-1+[.$G$2]^-1)^-1" office:value-type="float" office:value="0.421875" calcext:value-type="float">
            <text:p>0.421875</text:p>
          </table:table-cell>
          <table:table-cell table:formula="of:=20*LOG(10*[.A29]/(10*[.A29]+[.B29]);10)" office:value-type="float" office:value="-8.17441127029563" calcext:value-type="float">
            <text:p>-8.17441127029563</text:p>
          </table:table-cell>
          <table:table-cell table:formula="of:=20*LOG([.C29]/(10*(1-[.A29])+[.C29]);10)" office:value-type="float" office:value="-25.2507795381415" calcext:value-type="float">
            <text:p>-25.2507795381415</text:p>
          </table:table-cell>
          <table:table-cell table:number-columns-repeated="6"/>
        </table:table-row>
        <table:table-row table:style-name="ro1">
          <table:table-cell table:formula="of:=[.A29]+0.01" office:value-type="float" office:value="0.28" calcext:value-type="float">
            <text:p>0.28</text:p>
          </table:table-cell>
          <table:table-cell table:formula="of:=((10*(1-[.A30]))^-1+[.$G$1]^-1)^-1" office:value-type="float" office:value="4.18604651162791" calcext:value-type="float">
            <text:p>4.18604651162791</text:p>
          </table:table-cell>
          <table:table-cell table:formula="of:=((10*([.A30]))^-1+[.$G$2]^-1)^-1" office:value-type="float" office:value="0.424242424242424" calcext:value-type="float">
            <text:p>0.424242424242424</text:p>
          </table:table-cell>
          <table:table-cell table:formula="of:=20*LOG(10*[.A30]/(10*[.A30]+[.B30]);10)" office:value-type="float" office:value="-7.9414688282065" calcext:value-type="float">
            <text:p>-7.9414688282065</text:p>
          </table:table-cell>
          <table:table-cell table:formula="of:=20*LOG([.C30]/(10*(1-[.A30])+[.C30]);10)" office:value-type="float" office:value="-25.0916520218999" calcext:value-type="float">
            <text:p>-25.0916520218999</text:p>
          </table:table-cell>
          <table:table-cell table:number-columns-repeated="6"/>
        </table:table-row>
        <table:table-row table:style-name="ro1">
          <table:table-cell table:formula="of:=[.A30]+0.01" office:value-type="float" office:value="0.29" calcext:value-type="float">
            <text:p>0.29</text:p>
          </table:table-cell>
          <table:table-cell table:formula="of:=((10*(1-[.A31]))^-1+[.$G$1]^-1)^-1" office:value-type="float" office:value="4.15204678362573" calcext:value-type="float">
            <text:p>4.15204678362573</text:p>
          </table:table-cell>
          <table:table-cell table:formula="of:=((10*([.A31]))^-1+[.$G$2]^-1)^-1" office:value-type="float" office:value="0.426470588235294" calcext:value-type="float">
            <text:p>0.426470588235294</text:p>
          </table:table-cell>
          <table:table-cell table:formula="of:=20*LOG(10*[.A31]/(10*[.A31]+[.B31]);10)" office:value-type="float" office:value="-7.71834373737741" calcext:value-type="float">
            <text:p>-7.71834373737741</text:p>
          </table:table-cell>
          <table:table-cell table:formula="of:=20*LOG([.C31]/(10*(1-[.A31])+[.C31]);10)" office:value-type="float" office:value="-24.9340456730442" calcext:value-type="float">
            <text:p>-24.9340456730442</text:p>
          </table:table-cell>
          <table:table-cell table:number-columns-repeated="6"/>
        </table:table-row>
        <table:table-row table:style-name="ro1">
          <table:table-cell table:formula="of:=[.A31]+0.01" office:value-type="float" office:value="0.3" calcext:value-type="float">
            <text:p>0.3</text:p>
          </table:table-cell>
          <table:table-cell table:formula="of:=((10*(1-[.A32]))^-1+[.$G$1]^-1)^-1" office:value-type="float" office:value="4.11764705882353" calcext:value-type="float">
            <text:p>4.11764705882353</text:p>
          </table:table-cell>
          <table:table-cell table:formula="of:=((10*([.A32]))^-1+[.$G$2]^-1)^-1" office:value-type="float" office:value="0.428571428571429" calcext:value-type="float">
            <text:p>0.428571428571429</text:p>
          </table:table-cell>
          <table:table-cell table:formula="of:=20*LOG(10*[.A32]/(10*[.A32]+[.B32]);10)" office:value-type="float" office:value="-7.50430388437027" calcext:value-type="float">
            <text:p>-7.50430388437027</text:p>
          </table:table-cell>
          <table:table-cell table:formula="of:=20*LOG([.C32]/(10*(1-[.A32])+[.C32]);10)" office:value-type="float" office:value="-24.7776417783027" calcext:value-type="float">
            <text:p>-24.7776417783027</text:p>
          </table:table-cell>
          <table:table-cell table:number-columns-repeated="6"/>
        </table:table-row>
        <table:table-row table:style-name="ro1">
          <table:table-cell table:formula="of:=[.A32]+0.01" office:value-type="float" office:value="0.31" calcext:value-type="float">
            <text:p>0.31</text:p>
          </table:table-cell>
          <table:table-cell table:formula="of:=((10*(1-[.A33]))^-1+[.$G$1]^-1)^-1" office:value-type="float" office:value="4.08284023668639" calcext:value-type="float">
            <text:p>4.08284023668639</text:p>
          </table:table-cell>
          <table:table-cell table:formula="of:=((10*([.A33]))^-1+[.$G$2]^-1)^-1" office:value-type="float" office:value="0.430555555555556" calcext:value-type="float">
            <text:p>0.430555555555556</text:p>
          </table:table-cell>
          <table:table-cell table:formula="of:=20*LOG(10*[.A33]/(10*[.A33]+[.B33]);10)" office:value-type="float" office:value="-7.29869025945055" calcext:value-type="float">
            <text:p>-7.29869025945055</text:p>
          </table:table-cell>
          <table:table-cell table:formula="of:=20*LOG([.C33]/(10*(1-[.A33])+[.C33]);10)" office:value-type="float" office:value="-24.6221538409952" calcext:value-type="float">
            <text:p>-24.6221538409952</text:p>
          </table:table-cell>
          <table:table-cell table:number-columns-repeated="6"/>
        </table:table-row>
        <table:table-row table:style-name="ro1">
          <table:table-cell table:formula="of:=[.A33]+0.01" office:value-type="float" office:value="0.32" calcext:value-type="float">
            <text:p>0.32</text:p>
          </table:table-cell>
          <table:table-cell table:formula="of:=((10*(1-[.A34]))^-1+[.$G$1]^-1)^-1" office:value-type="float" office:value="4.04761904761905" calcext:value-type="float">
            <text:p>4.04761904761905</text:p>
          </table:table-cell>
          <table:table-cell table:formula="of:=((10*([.A34]))^-1+[.$G$2]^-1)^-1" office:value-type="float" office:value="0.432432432432432" calcext:value-type="float">
            <text:p>0.432432432432432</text:p>
          </table:table-cell>
          <table:table-cell table:formula="of:=20*LOG(10*[.A34]/(10*[.A34]+[.B34]);10)" office:value-type="float" office:value="-7.10090758761457" calcext:value-type="float">
            <text:p>-7.10090758761457</text:p>
          </table:table-cell>
          <table:table-cell table:formula="of:=20*LOG([.C34]/(10*(1-[.A34])+[.C34]);10)" office:value-type="float" office:value="-24.4673225287972" calcext:value-type="float">
            <text:p>-24.4673225287972</text:p>
          </table:table-cell>
          <table:table-cell table:number-columns-repeated="6"/>
        </table:table-row>
        <table:table-row table:style-name="ro1">
          <table:table-cell table:formula="of:=[.A34]+0.01" office:value-type="float" office:value="0.33" calcext:value-type="float">
            <text:p>0.33</text:p>
          </table:table-cell>
          <table:table-cell table:formula="of:=((10*(1-[.A35]))^-1+[.$G$1]^-1)^-1" office:value-type="float" office:value="4.01197604790419" calcext:value-type="float">
            <text:p>4.01197604790419</text:p>
          </table:table-cell>
          <table:table-cell table:formula="of:=((10*([.A35]))^-1+[.$G$2]^-1)^-1" office:value-type="float" office:value="0.43421052631579" calcext:value-type="float">
            <text:p>0.43421052631579</text:p>
          </table:table-cell>
          <table:table-cell table:formula="of:=20*LOG(10*[.A35]/(10*[.A35]+[.B35]);10)" office:value-type="float" office:value="-6.91041640433172" calcext:value-type="float">
            <text:p>-6.91041640433172</text:p>
          </table:table-cell>
          <table:table-cell table:formula="of:=20*LOG([.C35]/(10*(1-[.A35])+[.C35]);10)" office:value-type="float" office:value="-24.3129114673316" calcext:value-type="float">
            <text:p>-24.3129114673316</text:p>
          </table:table-cell>
          <table:table-cell table:number-columns-repeated="6"/>
        </table:table-row>
        <table:table-row table:style-name="ro1">
          <table:table-cell table:formula="of:=[.A35]+0.01" office:value-type="float" office:value="0.34" calcext:value-type="float">
            <text:p>0.34</text:p>
          </table:table-cell>
          <table:table-cell table:formula="of:=((10*(1-[.A36]))^-1+[.$G$1]^-1)^-1" office:value-type="float" office:value="3.97590361445783" calcext:value-type="float">
            <text:p>3.97590361445783</text:p>
          </table:table-cell>
          <table:table-cell table:formula="of:=((10*([.A36]))^-1+[.$G$2]^-1)^-1" office:value-type="float" office:value="0.435897435897436" calcext:value-type="float">
            <text:p>0.435897435897436</text:p>
          </table:table-cell>
          <table:table-cell table:formula="of:=20*LOG(10*[.A36]/(10*[.A36]+[.B36]);10)" office:value-type="float" office:value="-6.72672631685973" calcext:value-type="float">
            <text:p>-6.72672631685973</text:p>
          </table:table-cell>
          <table:table-cell table:formula="of:=20*LOG([.C36]/(10*(1-[.A36])+[.C36]);10)" office:value-type="float" office:value="-24.1587037131288" calcext:value-type="float">
            <text:p>-24.1587037131288</text:p>
          </table:table-cell>
          <table:table-cell table:number-columns-repeated="6"/>
        </table:table-row>
        <table:table-row table:style-name="ro1">
          <table:table-cell table:formula="of:=[.A36]+0.01" office:value-type="float" office:value="0.35" calcext:value-type="float">
            <text:p>0.35</text:p>
          </table:table-cell>
          <table:table-cell table:formula="of:=((10*(1-[.A37]))^-1+[.$G$1]^-1)^-1" office:value-type="float" office:value="3.93939393939394" calcext:value-type="float">
            <text:p>3.93939393939394</text:p>
          </table:table-cell>
          <table:table-cell table:formula="of:=((10*([.A37]))^-1+[.$G$2]^-1)^-1" office:value-type="float" office:value="0.4375" calcext:value-type="float">
            <text:p>0.4375</text:p>
          </table:table-cell>
          <table:table-cell table:formula="of:=20*LOG(10*[.A37]/(10*[.A37]+[.B37]);10)" office:value-type="float" office:value="-6.54939024461648" calcext:value-type="float">
            <text:p>-6.54939024461648</text:p>
          </table:table-cell>
          <table:table-cell table:formula="of:=20*LOG([.C37]/(10*(1-[.A37])+[.C37]);10)" office:value-type="float" office:value="-24.004498775448" calcext:value-type="float">
            <text:p>-24.004498775448</text:p>
          </table:table-cell>
          <table:table-cell table:number-columns-repeated="6"/>
        </table:table-row>
        <table:table-row table:style-name="ro1">
          <table:table-cell table:formula="of:=[.A37]+0.01" office:value-type="float" office:value="0.36" calcext:value-type="float">
            <text:p>0.36</text:p>
          </table:table-cell>
          <table:table-cell table:formula="of:=((10*(1-[.A38]))^-1+[.$G$1]^-1)^-1" office:value-type="float" office:value="3.90243902439024" calcext:value-type="float">
            <text:p>3.90243902439024</text:p>
          </table:table-cell>
          <table:table-cell table:formula="of:=((10*([.A38]))^-1+[.$G$2]^-1)^-1" office:value-type="float" office:value="0.439024390243902" calcext:value-type="float">
            <text:p>0.439024390243902</text:p>
          </table:table-cell>
          <table:table-cell table:formula="of:=20*LOG(10*[.A38]/(10*[.A38]+[.B38]);10)" office:value-type="float" office:value="-6.37799947284741" calcext:value-type="float">
            <text:p>-6.37799947284741</text:p>
          </table:table-cell>
          <table:table-cell table:formula="of:=20*LOG([.C38]/(10*(1-[.A38])+[.C38]);10)" office:value-type="float" office:value="-23.8501100838263" calcext:value-type="float">
            <text:p>-23.8501100838263</text:p>
          </table:table-cell>
          <table:table-cell table:number-columns-repeated="6"/>
        </table:table-row>
        <table:table-row table:style-name="ro1">
          <table:table-cell table:formula="of:=[.A38]+0.01" office:value-type="float" office:value="0.37" calcext:value-type="float">
            <text:p>0.37</text:p>
          </table:table-cell>
          <table:table-cell table:formula="of:=((10*(1-[.A39]))^-1+[.$G$1]^-1)^-1" office:value-type="float" office:value="3.86503067484663" calcext:value-type="float">
            <text:p>3.86503067484663</text:p>
          </table:table-cell>
          <table:table-cell table:formula="of:=((10*([.A39]))^-1+[.$G$2]^-1)^-1" office:value-type="float" office:value="0.440476190476191" calcext:value-type="float">
            <text:p>0.440476190476191</text:p>
          </table:table-cell>
          <table:table-cell table:formula="of:=20*LOG(10*[.A39]/(10*[.A39]+[.B39]);10)" office:value-type="float" office:value="-6.21217938564491" calcext:value-type="float">
            <text:p>-6.21217938564491</text:p>
          </table:table-cell>
          <table:table-cell table:formula="of:=20*LOG([.C39]/(10*(1-[.A39])+[.C39]);10)" office:value-type="float" office:value="-23.6953628192418" calcext:value-type="float">
            <text:p>-23.6953628192418</text:p>
          </table:table-cell>
          <table:table-cell table:number-columns-repeated="6"/>
        </table:table-row>
        <table:table-row table:style-name="ro1">
          <table:table-cell table:formula="of:=[.A39]+0.01" office:value-type="float" office:value="0.38" calcext:value-type="float">
            <text:p>0.38</text:p>
          </table:table-cell>
          <table:table-cell table:formula="of:=((10*(1-[.A40]))^-1+[.$G$1]^-1)^-1" office:value-type="float" office:value="3.82716049382716" calcext:value-type="float">
            <text:p>3.82716049382716</text:p>
          </table:table-cell>
          <table:table-cell table:formula="of:=((10*([.A40]))^-1+[.$G$2]^-1)^-1" office:value-type="float" office:value="0.441860465116279" calcext:value-type="float">
            <text:p>0.441860465116279</text:p>
          </table:table-cell>
          <table:table-cell table:formula="of:=20*LOG(10*[.A40]/(10*[.A40]+[.B40]);10)" office:value-type="float" office:value="-6.05158576939944" calcext:value-type="float">
            <text:p>-6.05158576939944</text:p>
          </table:table-cell>
          <table:table-cell table:formula="of:=20*LOG([.C40]/(10*(1-[.A40])+[.C40]);10)" office:value-type="float" office:value="-23.5400920430262" calcext:value-type="float">
            <text:p>-23.5400920430262</text:p>
          </table:table-cell>
          <table:table-cell table:number-columns-repeated="6"/>
        </table:table-row>
        <table:table-row table:style-name="ro1">
          <table:table-cell table:formula="of:=[.A40]+0.01" office:value-type="float" office:value="0.39" calcext:value-type="float">
            <text:p>0.39</text:p>
          </table:table-cell>
          <table:table-cell table:formula="of:=((10*(1-[.A41]))^-1+[.$G$1]^-1)^-1" office:value-type="float" office:value="3.7888198757764" calcext:value-type="float">
            <text:p>3.7888198757764</text:p>
          </table:table-cell>
          <table:table-cell table:formula="of:=((10*([.A41]))^-1+[.$G$2]^-1)^-1" office:value-type="float" office:value="0.443181818181818" calcext:value-type="float">
            <text:p>0.443181818181818</text:p>
          </table:table-cell>
          <table:table-cell table:formula="of:=20*LOG(10*[.A41]/(10*[.A41]+[.B41]);10)" office:value-type="float" office:value="-5.89590159758283" calcext:value-type="float">
            <text:p>-5.89590159758283</text:p>
          </table:table-cell>
          <table:table-cell table:formula="of:=20*LOG([.C41]/(10*(1-[.A41])+[.C41]);10)" office:value-type="float" office:value="-23.3841410703113" calcext:value-type="float">
            <text:p>-23.3841410703113</text:p>
          </table:table-cell>
          <table:table-cell table:number-columns-repeated="6"/>
        </table:table-row>
        <table:table-row table:style-name="ro1">
          <table:table-cell table:formula="of:=[.A41]+0.01" office:value-type="float" office:value="0.4" calcext:value-type="float">
            <text:p>0.4</text:p>
          </table:table-cell>
          <table:table-cell table:formula="of:=((10*(1-[.A42]))^-1+[.$G$1]^-1)^-1" office:value-type="float" office:value="3.75" calcext:value-type="float">
            <text:p>3.75</text:p>
          </table:table-cell>
          <table:table-cell table:formula="of:=((10*([.A42]))^-1+[.$G$2]^-1)^-1" office:value-type="float" office:value="0.444444444444444" calcext:value-type="float">
            <text:p>0.444444444444444</text:p>
          </table:table-cell>
          <table:table-cell table:formula="of:=20*LOG(10*[.A42]/(10*[.A42]+[.B42]);10)" office:value-type="float" office:value="-5.74483422356695" calcext:value-type="float">
            <text:p>-5.74483422356695</text:p>
          </table:table-cell>
          <table:table-cell table:formula="of:=20*LOG([.C42]/(10*(1-[.A42])+[.C42]);10)" office:value-type="float" office:value="-23.2273600446995" calcext:value-type="float">
            <text:p>-23.2273600446995</text:p>
          </table:table-cell>
          <table:table-cell table:number-columns-repeated="6"/>
        </table:table-row>
        <table:table-row table:style-name="ro1">
          <table:table-cell table:formula="of:=[.A42]+0.01" office:value-type="float" office:value="0.41" calcext:value-type="float">
            <text:p>0.41</text:p>
          </table:table-cell>
          <table:table-cell table:formula="of:=((10*(1-[.A43]))^-1+[.$G$1]^-1)^-1" office:value-type="float" office:value="3.71069182389937" calcext:value-type="float">
            <text:p>3.71069182389937</text:p>
          </table:table-cell>
          <table:table-cell table:formula="of:=((10*([.A43]))^-1+[.$G$2]^-1)^-1" office:value-type="float" office:value="0.445652173913044" calcext:value-type="float">
            <text:p>0.445652173913044</text:p>
          </table:table-cell>
          <table:table-cell table:formula="of:=20*LOG(10*[.A43]/(10*[.A43]+[.B43]);10)" office:value-type="float" office:value="-5.59811292086011" calcext:value-type="float">
            <text:p>-5.59811292086011</text:p>
          </table:table-cell>
          <table:table-cell table:formula="of:=20*LOG([.C43]/(10*(1-[.A43])+[.C43]);10)" office:value-type="float" office:value="-23.0696046786452" calcext:value-type="float">
            <text:p>-23.0696046786452</text:p>
          </table:table-cell>
          <table:table-cell table:number-columns-repeated="6"/>
        </table:table-row>
        <table:table-row table:style-name="ro1">
          <table:table-cell table:formula="of:=[.A43]+0.01" office:value-type="float" office:value="0.42" calcext:value-type="float">
            <text:p>0.42</text:p>
          </table:table-cell>
          <table:table-cell table:formula="of:=((10*(1-[.A44]))^-1+[.$G$1]^-1)^-1" office:value-type="float" office:value="3.67088607594937" calcext:value-type="float">
            <text:p>3.67088607594937</text:p>
          </table:table-cell>
          <table:table-cell table:formula="of:=((10*([.A44]))^-1+[.$G$2]^-1)^-1" office:value-type="float" office:value="0.446808510638298" calcext:value-type="float">
            <text:p>0.446808510638298</text:p>
          </table:table-cell>
          <table:table-cell table:formula="of:=20*LOG(10*[.A44]/(10*[.A44]+[.B44]);10)" office:value-type="float" office:value="-5.45548672037662" calcext:value-type="float">
            <text:p>-5.45548672037662</text:p>
          </table:table-cell>
          <table:table-cell table:formula="of:=20*LOG([.C44]/(10*(1-[.A44])+[.C44]);10)" office:value-type="float" office:value="-22.9107351302023" calcext:value-type="float">
            <text:p>-22.9107351302023</text:p>
          </table:table-cell>
          <table:table-cell table:number-columns-repeated="6"/>
        </table:table-row>
        <table:table-row table:style-name="ro1">
          <table:table-cell table:formula="of:=[.A44]+0.01" office:value-type="float" office:value="0.43" calcext:value-type="float">
            <text:p>0.43</text:p>
          </table:table-cell>
          <table:table-cell table:formula="of:=((10*(1-[.A45]))^-1+[.$G$1]^-1)^-1" office:value-type="float" office:value="3.63057324840764" calcext:value-type="float">
            <text:p>3.63057324840764</text:p>
          </table:table-cell>
          <table:table-cell table:formula="of:=((10*([.A45]))^-1+[.$G$2]^-1)^-1" office:value-type="float" office:value="0.447916666666667" calcext:value-type="float">
            <text:p>0.447916666666667</text:p>
          </table:table-cell>
          <table:table-cell table:formula="of:=20*LOG(10*[.A45]/(10*[.A45]+[.B45]);10)" office:value-type="float" office:value="-5.31672250265997" calcext:value-type="float">
            <text:p>-5.31672250265997</text:p>
          </table:table-cell>
          <table:table-cell table:formula="of:=20*LOG([.C45]/(10*(1-[.A45])+[.C45]);10)" office:value-type="float" office:value="-22.7506149916871" calcext:value-type="float">
            <text:p>-22.7506149916871</text:p>
          </table:table-cell>
          <table:table-cell table:number-columns-repeated="6"/>
        </table:table-row>
        <table:table-row table:style-name="ro1">
          <table:table-cell table:formula="of:=[.A45]+0.01" office:value-type="float" office:value="0.44" calcext:value-type="float">
            <text:p>0.44</text:p>
          </table:table-cell>
          <table:table-cell table:formula="of:=((10*(1-[.A46]))^-1+[.$G$1]^-1)^-1" office:value-type="float" office:value="3.58974358974359" calcext:value-type="float">
            <text:p>3.58974358974359</text:p>
          </table:table-cell>
          <table:table-cell table:formula="of:=((10*([.A46]))^-1+[.$G$2]^-1)^-1" office:value-type="float" office:value="0.448979591836735" calcext:value-type="float">
            <text:p>0.448979591836735</text:p>
          </table:table-cell>
          <table:table-cell table:formula="of:=20*LOG(10*[.A46]/(10*[.A46]+[.B46]);10)" office:value-type="float" office:value="-5.1816033097568" calcext:value-type="float">
            <text:p>-5.1816033097568</text:p>
          </table:table-cell>
          <table:table-cell table:formula="of:=20*LOG([.C46]/(10*(1-[.A46])+[.C46]);10)" office:value-type="float" office:value="-22.5891103697017" calcext:value-type="float">
            <text:p>-22.5891103697017</text:p>
          </table:table-cell>
          <table:table-cell table:number-columns-repeated="6"/>
        </table:table-row>
        <table:table-row table:style-name="ro1">
          <table:table-cell table:formula="of:=[.A46]+0.01" office:value-type="float" office:value="0.45" calcext:value-type="float">
            <text:p>0.45</text:p>
          </table:table-cell>
          <table:table-cell table:formula="of:=((10*(1-[.A47]))^-1+[.$G$1]^-1)^-1" office:value-type="float" office:value="3.54838709677419" calcext:value-type="float">
            <text:p>3.54838709677419</text:p>
          </table:table-cell>
          <table:table-cell table:formula="of:=((10*([.A47]))^-1+[.$G$2]^-1)^-1" office:value-type="float" office:value="0.45" calcext:value-type="float">
            <text:p>0.45</text:p>
          </table:table-cell>
          <table:table-cell table:formula="of:=20*LOG(10*[.A47]/(10*[.A47]+[.B47]);10)" office:value-type="float" office:value="-5.04992684699584" calcext:value-type="float">
            <text:p>-5.04992684699584</text:p>
          </table:table-cell>
          <table:table-cell table:formula="of:=20*LOG([.C47]/(10*(1-[.A47])+[.C47]);10)" office:value-type="float" office:value="-22.4260890390641" calcext:value-type="float">
            <text:p>-22.4260890390641</text:p>
          </table:table-cell>
          <table:table-cell table:number-columns-repeated="6"/>
        </table:table-row>
        <table:table-row table:style-name="ro1">
          <table:table-cell table:formula="of:=[.A47]+0.01" office:value-type="float" office:value="0.46" calcext:value-type="float">
            <text:p>0.46</text:p>
          </table:table-cell>
          <table:table-cell table:formula="of:=((10*(1-[.A48]))^-1+[.$G$1]^-1)^-1" office:value-type="float" office:value="3.50649350649351" calcext:value-type="float">
            <text:p>3.50649350649351</text:p>
          </table:table-cell>
          <table:table-cell table:formula="of:=((10*([.A48]))^-1+[.$G$2]^-1)^-1" office:value-type="float" office:value="0.450980392156863" calcext:value-type="float">
            <text:p>0.450980392156863</text:p>
          </table:table-cell>
          <table:table-cell table:formula="of:=20*LOG(10*[.A48]/(10*[.A48]+[.B48]);10)" office:value-type="float" office:value="-4.92150414950516" calcext:value-type="float">
            <text:p>-4.92150414950516</text:p>
          </table:table-cell>
          <table:table-cell table:formula="of:=20*LOG([.C48]/(10*(1-[.A48])+[.C48]);10)" office:value-type="float" office:value="-22.2614196556608" calcext:value-type="float">
            <text:p>-22.2614196556608</text:p>
          </table:table-cell>
          <table:table-cell table:number-columns-repeated="6"/>
        </table:table-row>
        <table:table-row table:style-name="ro1">
          <table:table-cell table:formula="of:=[.A48]+0.01" office:value-type="float" office:value="0.47" calcext:value-type="float">
            <text:p>0.47</text:p>
          </table:table-cell>
          <table:table-cell table:formula="of:=((10*(1-[.A49]))^-1+[.$G$1]^-1)^-1" office:value-type="float" office:value="3.4640522875817" calcext:value-type="float">
            <text:p>3.4640522875817</text:p>
          </table:table-cell>
          <table:table-cell table:formula="of:=((10*([.A49]))^-1+[.$G$2]^-1)^-1" office:value-type="float" office:value="0.451923076923077" calcext:value-type="float">
            <text:p>0.451923076923077</text:p>
          </table:table-cell>
          <table:table-cell table:formula="of:=20*LOG(10*[.A49]/(10*[.A49]+[.B49]);10)" office:value-type="float" office:value="-4.79615839209155" calcext:value-type="float">
            <text:p>-4.79615839209155</text:p>
          </table:table-cell>
          <table:table-cell table:formula="of:=20*LOG([.C49]/(10*(1-[.A49])+[.C49]);10)" office:value-type="float" office:value="-22.0949710151916" calcext:value-type="float">
            <text:p>-22.0949710151916</text:p>
          </table:table-cell>
          <table:table-cell table:number-columns-repeated="6"/>
        </table:table-row>
        <table:table-row table:style-name="ro1">
          <table:table-cell table:formula="of:=[.A49]+0.01" office:value-type="float" office:value="0.48" calcext:value-type="float">
            <text:p>0.48</text:p>
          </table:table-cell>
          <table:table-cell table:formula="of:=((10*(1-[.A50]))^-1+[.$G$1]^-1)^-1" office:value-type="float" office:value="3.42105263157895" calcext:value-type="float">
            <text:p>3.42105263157895</text:p>
          </table:table-cell>
          <table:table-cell table:formula="of:=((10*([.A50]))^-1+[.$G$2]^-1)^-1" office:value-type="float" office:value="0.452830188679245" calcext:value-type="float">
            <text:p>0.452830188679245</text:p>
          </table:table-cell>
          <table:table-cell table:formula="of:=20*LOG(10*[.A50]/(10*[.A50]+[.B50]);10)" office:value-type="float" office:value="-4.6737238242573" calcext:value-type="float">
            <text:p>-4.6737238242573</text:p>
          </table:table-cell>
          <table:table-cell table:formula="of:=20*LOG([.C50]/(10*(1-[.A50])+[.C50]);10)" office:value-type="float" office:value="-21.9266113463165" calcext:value-type="float">
            <text:p>-21.9266113463165</text:p>
          </table:table-cell>
          <table:table-cell table:number-columns-repeated="6"/>
        </table:table-row>
        <table:table-row table:style-name="ro1">
          <table:table-cell table:formula="of:=[.A50]+0.01" office:value-type="float" office:value="0.49" calcext:value-type="float">
            <text:p>0.49</text:p>
          </table:table-cell>
          <table:table-cell table:formula="of:=((10*(1-[.A51]))^-1+[.$G$1]^-1)^-1" office:value-type="float" office:value="3.37748344370861" calcext:value-type="float">
            <text:p>3.37748344370861</text:p>
          </table:table-cell>
          <table:table-cell table:formula="of:=((10*([.A51]))^-1+[.$G$2]^-1)^-1" office:value-type="float" office:value="0.453703703703704" calcext:value-type="float">
            <text:p>0.453703703703704</text:p>
          </table:table-cell>
          <table:table-cell table:formula="of:=20*LOG(10*[.A51]/(10*[.A51]+[.B51]);10)" office:value-type="float" office:value="-4.55404481476009" calcext:value-type="float">
            <text:p>-4.55404481476009</text:p>
          </table:table-cell>
          <table:table-cell table:formula="of:=20*LOG([.C51]/(10*(1-[.A51])+[.C51]);10)" office:value-type="float" office:value="-21.7562076278999" calcext:value-type="float">
            <text:p>-21.7562076278999</text:p>
          </table:table-cell>
          <table:table-cell table:number-columns-repeated="6"/>
        </table:table-row>
        <table:table-row table:style-name="ro1">
          <table:table-cell table:formula="of:=[.A51]+0.01" office:value-type="float" office:value="0.5" calcext:value-type="float">
            <text:p>0.5</text:p>
          </table:table-cell>
          <table:table-cell table:formula="of:=((10*(1-[.A52]))^-1+[.$G$1]^-1)^-1" office:value-type="float" office:value="3.33333333333333" calcext:value-type="float">
            <text:p>3.33333333333333</text:p>
          </table:table-cell>
          <table:table-cell table:formula="of:=((10*([.A52]))^-1+[.$G$2]^-1)^-1" office:value-type="float" office:value="0.454545454545455" calcext:value-type="float">
            <text:p>0.454545454545455</text:p>
          </table:table-cell>
          <table:table-cell table:formula="of:=20*LOG(10*[.A52]/(10*[.A52]+[.B52]);10)" office:value-type="float" office:value="-4.43697499232713" calcext:value-type="float">
            <text:p>-4.43697499232713</text:p>
          </table:table-cell>
          <table:table-cell table:formula="of:=20*LOG([.C52]/(10*(1-[.A52])+[.C52]);10)" office:value-type="float" office:value="-21.5836249209525" calcext:value-type="float">
            <text:p>-21.5836249209525</text:p>
          </table:table-cell>
          <table:table-cell table:number-columns-repeated="6"/>
        </table:table-row>
        <table:table-row table:style-name="ro1">
          <table:table-cell table:formula="of:=[.A52]+0.01" office:value-type="float" office:value="0.51" calcext:value-type="float">
            <text:p>0.51</text:p>
          </table:table-cell>
          <table:table-cell table:formula="of:=((10*(1-[.A53]))^-1+[.$G$1]^-1)^-1" office:value-type="float" office:value="3.28859060402684" calcext:value-type="float">
            <text:p>3.28859060402684</text:p>
          </table:table-cell>
          <table:table-cell table:formula="of:=((10*([.A53]))^-1+[.$G$2]^-1)^-1" office:value-type="float" office:value="0.455357142857143" calcext:value-type="float">
            <text:p>0.455357142857143</text:p>
          </table:table-cell>
          <table:table-cell table:formula="of:=20*LOG(10*[.A53]/(10*[.A53]+[.B53]);10)" office:value-type="float" office:value="-4.32237647098954" calcext:value-type="float">
            <text:p>-4.32237647098954</text:p>
          </table:table-cell>
          <table:table-cell table:formula="of:=20*LOG([.C53]/(10*(1-[.A53])+[.C53]);10)" office:value-type="float" office:value="-21.4087257065114" calcext:value-type="float">
            <text:p>-21.4087257065114</text:p>
          </table:table-cell>
          <table:table-cell table:number-columns-repeated="6"/>
        </table:table-row>
        <table:table-row table:style-name="ro1">
          <table:table-cell table:formula="of:=[.A53]+0.01" office:value-type="float" office:value="0.52" calcext:value-type="float">
            <text:p>0.52</text:p>
          </table:table-cell>
          <table:table-cell table:formula="of:=((10*(1-[.A54]))^-1+[.$G$1]^-1)^-1" office:value-type="float" office:value="3.24324324324324" calcext:value-type="float">
            <text:p>3.24324324324324</text:p>
          </table:table-cell>
          <table:table-cell table:formula="of:=((10*([.A54]))^-1+[.$G$2]^-1)^-1" office:value-type="float" office:value="0.456140350877193" calcext:value-type="float">
            <text:p>0.456140350877193</text:p>
          </table:table-cell>
          <table:table-cell table:formula="of:=20*LOG(10*[.A54]/(10*[.A54]+[.B54]);10)" office:value-type="float" office:value="-4.21011915006937" calcext:value-type="float">
            <text:p>-4.21011915006937</text:p>
          </table:table-cell>
          <table:table-cell table:formula="of:=20*LOG([.C54]/(10*(1-[.A54])+[.C54]);10)" office:value-type="float" office:value="-21.2313692211322" calcext:value-type="float">
            <text:p>-21.2313692211322</text:p>
          </table:table-cell>
          <table:table-cell table:number-columns-repeated="6"/>
        </table:table-row>
        <table:table-row table:style-name="ro1">
          <table:table-cell table:formula="of:=[.A54]+0.01" office:value-type="float" office:value="0.53" calcext:value-type="float">
            <text:p>0.53</text:p>
          </table:table-cell>
          <table:table-cell table:formula="of:=((10*(1-[.A55]))^-1+[.$G$1]^-1)^-1" office:value-type="float" office:value="3.19727891156462" calcext:value-type="float">
            <text:p>3.19727891156462</text:p>
          </table:table-cell>
          <table:table-cell table:formula="of:=((10*([.A55]))^-1+[.$G$2]^-1)^-1" office:value-type="float" office:value="0.456896551724138" calcext:value-type="float">
            <text:p>0.456896551724138</text:p>
          </table:table-cell>
          <table:table-cell table:formula="of:=20*LOG(10*[.A55]/(10*[.A55]+[.B55]);10)" office:value-type="float" office:value="-4.10008008017858" calcext:value-type="float">
            <text:p>-4.10008008017858</text:p>
          </table:table-cell>
          <table:table-cell table:formula="of:=20*LOG([.C55]/(10*(1-[.A55])+[.C55]);10)" office:value-type="float" office:value="-21.0514107818902" calcext:value-type="float">
            <text:p>-21.0514107818902</text:p>
          </table:table-cell>
          <table:table-cell table:number-columns-repeated="6"/>
        </table:table-row>
        <table:table-row table:style-name="ro1">
          <table:table-cell table:formula="of:=[.A55]+0.01" office:value-type="float" office:value="0.54" calcext:value-type="float">
            <text:p>0.54</text:p>
          </table:table-cell>
          <table:table-cell table:formula="of:=((10*(1-[.A56]))^-1+[.$G$1]^-1)^-1" office:value-type="float" office:value="3.15068493150685" calcext:value-type="float">
            <text:p>3.15068493150685</text:p>
          </table:table-cell>
          <table:table-cell table:formula="of:=((10*([.A56]))^-1+[.$G$2]^-1)^-1" office:value-type="float" office:value="0.457627118644068" calcext:value-type="float">
            <text:p>0.457627118644068</text:p>
          </table:table-cell>
          <table:table-cell table:formula="of:=20*LOG(10*[.A56]/(10*[.A56]+[.B56]);10)" office:value-type="float" office:value="-3.99214288771779" calcext:value-type="float">
            <text:p>-3.99214288771779</text:p>
          </table:table-cell>
          <table:table-cell table:formula="of:=20*LOG([.C56]/(10*(1-[.A56])+[.C56]);10)" office:value-type="float" office:value="-20.8687010928329" calcext:value-type="float">
            <text:p>-20.8687010928329</text:p>
          </table:table-cell>
          <table:table-cell table:number-columns-repeated="6"/>
        </table:table-row>
        <table:table-row table:style-name="ro1">
          <table:table-cell table:formula="of:=[.A56]+0.01" office:value-type="float" office:value="0.55" calcext:value-type="float">
            <text:p>0.55</text:p>
          </table:table-cell>
          <table:table-cell table:formula="of:=((10*(1-[.A57]))^-1+[.$G$1]^-1)^-1" office:value-type="float" office:value="3.10344827586207" calcext:value-type="float">
            <text:p>3.10344827586207</text:p>
          </table:table-cell>
          <table:table-cell table:formula="of:=((10*([.A57]))^-1+[.$G$2]^-1)^-1" office:value-type="float" office:value="0.458333333333333" calcext:value-type="float">
            <text:p>0.458333333333333</text:p>
          </table:table-cell>
          <table:table-cell table:formula="of:=20*LOG(10*[.A57]/(10*[.A57]+[.B57]);10)" office:value-type="float" office:value="-3.88619725132417" calcext:value-type="float">
            <text:p>-3.88619725132417</text:p>
          </table:table-cell>
          <table:table-cell table:formula="of:=20*LOG([.C57]/(10*(1-[.A57])+[.C57]);10)" office:value-type="float" office:value="-20.6830855246861" calcext:value-type="float">
            <text:p>-20.6830855246861</text:p>
          </table:table-cell>
          <table:table-cell table:number-columns-repeated="6"/>
        </table:table-row>
        <table:table-row table:style-name="ro1">
          <table:table-cell table:formula="of:=[.A57]+0.01" office:value-type="float" office:value="0.56" calcext:value-type="float">
            <text:p>0.56</text:p>
          </table:table-cell>
          <table:table-cell table:formula="of:=((10*(1-[.A58]))^-1+[.$G$1]^-1)^-1" office:value-type="float" office:value="3.05555555555555" calcext:value-type="float">
            <text:p>3.05555555555555</text:p>
          </table:table-cell>
          <table:table-cell table:formula="of:=((10*([.A58]))^-1+[.$G$2]^-1)^-1" office:value-type="float" office:value="0.459016393442623" calcext:value-type="float">
            <text:p>0.459016393442623</text:p>
          </table:table-cell>
          <table:table-cell table:formula="of:=20*LOG(10*[.A58]/(10*[.A58]+[.B58]);10)" office:value-type="float" office:value="-3.78213842454078" calcext:value-type="float">
            <text:p>-3.78213842454078</text:p>
          </table:table-cell>
          <table:table-cell table:formula="of:=20*LOG([.C58]/(10*(1-[.A58])+[.C58]);10)" office:value-type="float" office:value="-20.4944033593014" calcext:value-type="float">
            <text:p>-20.4944033593014</text:p>
          </table:table-cell>
          <table:table-cell table:number-columns-repeated="6"/>
        </table:table-row>
        <table:table-row table:style-name="ro1">
          <table:table-cell table:formula="of:=[.A58]+0.01" office:value-type="float" office:value="0.57" calcext:value-type="float">
            <text:p>0.57</text:p>
          </table:table-cell>
          <table:table-cell table:formula="of:=((10*(1-[.A59]))^-1+[.$G$1]^-1)^-1" office:value-type="float" office:value="3.00699300699301" calcext:value-type="float">
            <text:p>3.00699300699301</text:p>
          </table:table-cell>
          <table:table-cell table:formula="of:=((10*([.A59]))^-1+[.$G$2]^-1)^-1" office:value-type="float" office:value="0.459677419354839" calcext:value-type="float">
            <text:p>0.459677419354839</text:p>
          </table:table-cell>
          <table:table-cell table:formula="of:=20*LOG(10*[.A59]/(10*[.A59]+[.B59]);10)" office:value-type="float" office:value="-3.67986679968531" calcext:value-type="float">
            <text:p>-3.67986679968531</text:p>
          </table:table-cell>
          <table:table-cell table:formula="of:=20*LOG([.C59]/(10*(1-[.A59])+[.C59]);10)" office:value-type="float" office:value="-20.302486989829" calcext:value-type="float">
            <text:p>-20.302486989829</text:p>
          </table:table-cell>
          <table:table-cell table:number-columns-repeated="6"/>
        </table:table-row>
        <table:table-row table:style-name="ro1">
          <table:table-cell table:formula="of:=[.A59]+0.01" office:value-type="float" office:value="0.58" calcext:value-type="float">
            <text:p>0.58</text:p>
          </table:table-cell>
          <table:table-cell table:formula="of:=((10*(1-[.A60]))^-1+[.$G$1]^-1)^-1" office:value-type="float" office:value="2.95774647887324" calcext:value-type="float">
            <text:p>2.95774647887324</text:p>
          </table:table-cell>
          <table:table-cell table:formula="of:=((10*([.A60]))^-1+[.$G$2]^-1)^-1" office:value-type="float" office:value="0.46031746031746" calcext:value-type="float">
            <text:p>0.46031746031746</text:p>
          </table:table-cell>
          <table:table-cell table:formula="of:=20*LOG(10*[.A60]/(10*[.A60]+[.B60]);10)" office:value-type="float" office:value="-3.57928750850321" calcext:value-type="float">
            <text:p>-3.57928750850321</text:p>
          </table:table-cell>
          <table:table-cell table:formula="of:=20*LOG([.C60]/(10*(1-[.A60])+[.C60]);10)" office:value-type="float" office:value="-20.1071610669015" calcext:value-type="float">
            <text:p>-20.1071610669015</text:p>
          </table:table-cell>
          <table:table-cell table:number-columns-repeated="6"/>
        </table:table-row>
        <table:table-row table:style-name="ro1">
          <table:table-cell table:formula="of:=[.A60]+0.01" office:value-type="float" office:value="0.59" calcext:value-type="float">
            <text:p>0.59</text:p>
          </table:table-cell>
          <table:table-cell table:formula="of:=((10*(1-[.A61]))^-1+[.$G$1]^-1)^-1" office:value-type="float" office:value="2.90780141843971" calcext:value-type="float">
            <text:p>2.90780141843971</text:p>
          </table:table-cell>
          <table:table-cell table:formula="of:=((10*([.A61]))^-1+[.$G$2]^-1)^-1" office:value-type="float" office:value="0.4609375" calcext:value-type="float">
            <text:p>0.4609375</text:p>
          </table:table-cell>
          <table:table-cell table:formula="of:=20*LOG(10*[.A61]/(10*[.A61]+[.B61]);10)" office:value-type="float" office:value="-3.48031005571337" calcext:value-type="float">
            <text:p>-3.48031005571337</text:p>
          </table:table-cell>
          <table:table-cell table:formula="of:=20*LOG([.C61]/(10*(1-[.A61])+[.C61]);10)" office:value-type="float" office:value="-19.908241580197" calcext:value-type="float">
            <text:p>-19.908241580197</text:p>
          </table:table-cell>
          <table:table-cell table:number-columns-repeated="6"/>
        </table:table-row>
        <table:table-row table:style-name="ro1">
          <table:table-cell table:formula="of:=[.A61]+0.01" office:value-type="float" office:value="0.6" calcext:value-type="float">
            <text:p>0.6</text:p>
          </table:table-cell>
          <table:table-cell table:formula="of:=((10*(1-[.A62]))^-1+[.$G$1]^-1)^-1" office:value-type="float" office:value="2.85714285714286" calcext:value-type="float">
            <text:p>2.85714285714286</text:p>
          </table:table-cell>
          <table:table-cell table:formula="of:=((10*([.A62]))^-1+[.$G$2]^-1)^-1" office:value-type="float" office:value="0.461538461538462" calcext:value-type="float">
            <text:p>0.461538461538462</text:p>
          </table:table-cell>
          <table:table-cell table:formula="of:=20*LOG(10*[.A62]/(10*[.A62]+[.B62]);10)" office:value-type="float" office:value="-3.38284798200707" calcext:value-type="float">
            <text:p>-3.38284798200707</text:p>
          </table:table-cell>
          <table:table-cell table:formula="of:=20*LOG([.C62]/(10*(1-[.A62])+[.C62]);10)" office:value-type="float" office:value="-19.7055348635859" calcext:value-type="float">
            <text:p>-19.7055348635859</text:p>
          </table:table-cell>
          <table:table-cell table:number-columns-repeated="6"/>
        </table:table-row>
        <table:table-row table:style-name="ro1">
          <table:table-cell table:formula="of:=[.A62]+0.01" office:value-type="float" office:value="0.61" calcext:value-type="float">
            <text:p>0.61</text:p>
          </table:table-cell>
          <table:table-cell table:formula="of:=((10*(1-[.A63]))^-1+[.$G$1]^-1)^-1" office:value-type="float" office:value="2.80575539568345" calcext:value-type="float">
            <text:p>2.80575539568345</text:p>
          </table:table-cell>
          <table:table-cell table:formula="of:=((10*([.A63]))^-1+[.$G$2]^-1)^-1" office:value-type="float" office:value="0.462121212121212" calcext:value-type="float">
            <text:p>0.462121212121212</text:p>
          </table:table-cell>
          <table:table-cell table:formula="of:=20*LOG(10*[.A63]/(10*[.A63]+[.B63]);10)" office:value-type="float" office:value="-3.28681855345257" calcext:value-type="float">
            <text:p>-3.28681855345257</text:p>
          </table:table-cell>
          <table:table-cell table:formula="of:=20*LOG([.C63]/(10*(1-[.A63])+[.C63]);10)" office:value-type="float" office:value="-19.4988365106259" calcext:value-type="float">
            <text:p>-19.4988365106259</text:p>
          </table:table-cell>
          <table:table-cell table:number-columns-repeated="6"/>
        </table:table-row>
        <table:table-row table:style-name="ro1">
          <table:table-cell table:formula="of:=[.A63]+0.01" office:value-type="float" office:value="0.62" calcext:value-type="float">
            <text:p>0.62</text:p>
          </table:table-cell>
          <table:table-cell table:formula="of:=((10*(1-[.A64]))^-1+[.$G$1]^-1)^-1" office:value-type="float" office:value="2.7536231884058" calcext:value-type="float">
            <text:p>2.7536231884058</text:p>
          </table:table-cell>
          <table:table-cell table:formula="of:=((10*([.A64]))^-1+[.$G$2]^-1)^-1" office:value-type="float" office:value="0.462686567164179" calcext:value-type="float">
            <text:p>0.462686567164179</text:p>
          </table:table-cell>
          <table:table-cell table:formula="of:=20*LOG(10*[.A64]/(10*[.A64]+[.B64]);10)" office:value-type="float" office:value="-3.19214247459845" calcext:value-type="float">
            <text:p>-3.19214247459845</text:p>
          </table:table-cell>
          <table:table-cell table:formula="of:=20*LOG([.C64]/(10*(1-[.A64])+[.C64]);10)" office:value-type="float" office:value="-19.2879301853973" calcext:value-type="float">
            <text:p>-19.2879301853973</text:p>
          </table:table-cell>
          <table:table-cell table:number-columns-repeated="6"/>
        </table:table-row>
        <table:table-row table:style-name="ro1">
          <table:table-cell table:formula="of:=[.A64]+0.01" office:value-type="float" office:value="0.63" calcext:value-type="float">
            <text:p>0.63</text:p>
          </table:table-cell>
          <table:table-cell table:formula="of:=((10*(1-[.A65]))^-1+[.$G$1]^-1)^-1" office:value-type="float" office:value="2.7007299270073" calcext:value-type="float">
            <text:p>2.7007299270073</text:p>
          </table:table-cell>
          <table:table-cell table:formula="of:=((10*([.A65]))^-1+[.$G$2]^-1)^-1" office:value-type="float" office:value="0.463235294117647" calcext:value-type="float">
            <text:p>0.463235294117647</text:p>
          </table:table-cell>
          <table:table-cell table:formula="of:=20*LOG(10*[.A65]/(10*[.A65]+[.B65]);10)" office:value-type="float" office:value="-3.09874362286419" calcext:value-type="float">
            <text:p>-3.09874362286419</text:p>
          </table:table-cell>
          <table:table-cell table:formula="of:=20*LOG([.C65]/(10*(1-[.A65])+[.C65]);10)" office:value-type="float" office:value="-19.07258631151" calcext:value-type="float">
            <text:p>-19.07258631151</text:p>
          </table:table-cell>
          <table:table-cell table:number-columns-repeated="6"/>
        </table:table-row>
        <table:table-row table:style-name="ro1">
          <table:table-cell table:formula="of:=[.A65]+0.01" office:value-type="float" office:value="0.64" calcext:value-type="float">
            <text:p>0.64</text:p>
          </table:table-cell>
          <table:table-cell table:formula="of:=((10*(1-[.A66]))^-1+[.$G$1]^-1)^-1" office:value-type="float" office:value="2.64705882352941" calcext:value-type="float">
            <text:p>2.64705882352941</text:p>
          </table:table-cell>
          <table:table-cell table:formula="of:=((10*([.A66]))^-1+[.$G$2]^-1)^-1" office:value-type="float" office:value="0.463768115942029" calcext:value-type="float">
            <text:p>0.463768115942029</text:p>
          </table:table-cell>
          <table:table-cell table:formula="of:=20*LOG(10*[.A66]/(10*[.A66]+[.B66]);10)" office:value-type="float" office:value="-3.00654880206502" calcext:value-type="float">
            <text:p>-3.00654880206502</text:p>
          </table:table-cell>
          <table:table-cell table:formula="of:=20*LOG([.C66]/(10*(1-[.A66])+[.C66]);10)" office:value-type="float" office:value="-18.8525606194943" calcext:value-type="float">
            <text:p>-18.8525606194943</text:p>
          </table:table-cell>
          <table:table-cell table:number-columns-repeated="6"/>
        </table:table-row>
        <table:table-row table:style-name="ro1">
          <table:table-cell table:formula="of:=[.A66]+0.01" office:value-type="float" office:value="0.65" calcext:value-type="float">
            <text:p>0.65</text:p>
          </table:table-cell>
          <table:table-cell table:formula="of:=((10*(1-[.A67]))^-1+[.$G$1]^-1)^-1" office:value-type="float" office:value="2.59259259259259" calcext:value-type="float">
            <text:p>2.59259259259259</text:p>
          </table:table-cell>
          <table:table-cell table:formula="of:=((10*([.A67]))^-1+[.$G$2]^-1)^-1" office:value-type="float" office:value="0.464285714285714" calcext:value-type="float">
            <text:p>0.464285714285714</text:p>
          </table:table-cell>
          <table:table-cell table:formula="of:=20*LOG(10*[.A67]/(10*[.A67]+[.B67]);10)" office:value-type="float" office:value="-2.91548751314289" calcext:value-type="float">
            <text:p>-2.91548751314289</text:p>
          </table:table-cell>
          <table:table-cell table:formula="of:=20*LOG([.C67]/(10*(1-[.A67])+[.C67]);10)" office:value-type="float" office:value="-18.6275925295964" calcext:value-type="float">
            <text:p>-18.6275925295964</text:p>
          </table:table-cell>
          <table:table-cell table:number-columns-repeated="6"/>
        </table:table-row>
        <table:table-row table:style-name="ro1">
          <table:table-cell table:formula="of:=[.A67]+0.01" office:value-type="float" office:value="0.66" calcext:value-type="float">
            <text:p>0.66</text:p>
          </table:table-cell>
          <table:table-cell table:formula="of:=((10*(1-[.A68]))^-1+[.$G$1]^-1)^-1" office:value-type="float" office:value="2.53731343283582" calcext:value-type="float">
            <text:p>2.53731343283582</text:p>
          </table:table-cell>
          <table:table-cell table:formula="of:=((10*([.A68]))^-1+[.$G$2]^-1)^-1" office:value-type="float" office:value="0.464788732394366" calcext:value-type="float">
            <text:p>0.464788732394366</text:p>
          </table:table-cell>
          <table:table-cell table:formula="of:=20*LOG(10*[.A68]/(10*[.A68]+[.B68]);10)" office:value-type="float" office:value="-2.82549174037241" calcext:value-type="float">
            <text:p>-2.82549174037241</text:p>
          </table:table-cell>
          <table:table-cell table:formula="of:=20*LOG([.C68]/(10*(1-[.A68])+[.C68]);10)" office:value-type="float" office:value="-18.3974033431365" calcext:value-type="float">
            <text:p>-18.3974033431365</text:p>
          </table:table-cell>
          <table:table-cell table:number-columns-repeated="6"/>
        </table:table-row>
        <table:table-row table:style-name="ro1">
          <table:table-cell table:formula="of:=[.A68]+0.01" office:value-type="float" office:value="0.67" calcext:value-type="float">
            <text:p>0.67</text:p>
          </table:table-cell>
          <table:table-cell table:formula="of:=((10*(1-[.A69]))^-1+[.$G$1]^-1)^-1" office:value-type="float" office:value="2.48120300751879" calcext:value-type="float">
            <text:p>2.48120300751879</text:p>
          </table:table-cell>
          <table:table-cell table:formula="of:=((10*([.A69]))^-1+[.$G$2]^-1)^-1" office:value-type="float" office:value="0.465277777777778" calcext:value-type="float">
            <text:p>0.465277777777778</text:p>
          </table:table-cell>
          <table:table-cell table:formula="of:=20*LOG(10*[.A69]/(10*[.A69]+[.B69]);10)" office:value-type="float" office:value="-2.73649575148289" calcext:value-type="float">
            <text:p>-2.73649575148289</text:p>
          </table:table-cell>
          <table:table-cell table:formula="of:=20*LOG([.C69]/(10*(1-[.A69])+[.C69]);10)" office:value-type="float" office:value="-18.1616942108728" calcext:value-type="float">
            <text:p>-18.1616942108728</text:p>
          </table:table-cell>
          <table:table-cell table:number-columns-repeated="6"/>
        </table:table-row>
        <table:table-row table:style-name="ro1">
          <table:table-cell table:formula="of:=[.A69]+0.01" office:value-type="float" office:value="0.68" calcext:value-type="float">
            <text:p>0.68</text:p>
          </table:table-cell>
          <table:table-cell table:formula="of:=((10*(1-[.A70]))^-1+[.$G$1]^-1)^-1" office:value-type="float" office:value="2.42424242424242" calcext:value-type="float">
            <text:p>2.42424242424242</text:p>
          </table:table-cell>
          <table:table-cell table:formula="of:=((10*([.A70]))^-1+[.$G$2]^-1)^-1" office:value-type="float" office:value="0.465753424657534" calcext:value-type="float">
            <text:p>0.465753424657534</text:p>
          </table:table-cell>
          <table:table-cell table:formula="of:=20*LOG(10*[.A70]/(10*[.A70]+[.B70]);10)" office:value-type="float" office:value="-2.64843591028823" calcext:value-type="float">
            <text:p>-2.64843591028823</text:p>
          </table:table-cell>
          <table:table-cell table:formula="of:=20*LOG([.C70]/(10*(1-[.A70])+[.C70]);10)" office:value-type="float" office:value="-17.9201438410706" calcext:value-type="float">
            <text:p>-17.9201438410706</text:p>
          </table:table-cell>
          <table:table-cell table:number-columns-repeated="6"/>
        </table:table-row>
        <table:table-row table:style-name="ro1">
          <table:table-cell table:formula="of:=[.A70]+0.01" office:value-type="float" office:value="0.69" calcext:value-type="float">
            <text:p>0.69</text:p>
          </table:table-cell>
          <table:table-cell table:formula="of:=((10*(1-[.A71]))^-1+[.$G$1]^-1)^-1" office:value-type="float" office:value="2.36641221374046" calcext:value-type="float">
            <text:p>2.36641221374046</text:p>
          </table:table-cell>
          <table:table-cell table:formula="of:=((10*([.A71]))^-1+[.$G$2]^-1)^-1" office:value-type="float" office:value="0.466216216216216" calcext:value-type="float">
            <text:p>0.466216216216216</text:p>
          </table:table-cell>
          <table:table-cell table:formula="of:=20*LOG(10*[.A71]/(10*[.A71]+[.B71]);10)" office:value-type="float" office:value="-2.56125050054908" calcext:value-type="float">
            <text:p>-2.56125050054908</text:p>
          </table:table-cell>
          <table:table-cell table:formula="of:=20*LOG([.C71]/(10*(1-[.A71])+[.C71]);10)" office:value-type="float" office:value="-17.6724059029355" calcext:value-type="float">
            <text:p>-17.6724059029355</text:p>
          </table:table-cell>
          <table:table-cell table:number-columns-repeated="6"/>
        </table:table-row>
        <table:table-row table:style-name="ro1">
          <table:table-cell table:formula="of:=[.A71]+0.01" office:value-type="float" office:value="0.7" calcext:value-type="float">
            <text:p>0.7</text:p>
          </table:table-cell>
          <table:table-cell table:formula="of:=((10*(1-[.A72]))^-1+[.$G$1]^-1)^-1" office:value-type="float" office:value="2.30769230769231" calcext:value-type="float">
            <text:p>2.30769230769231</text:p>
          </table:table-cell>
          <table:table-cell table:formula="of:=((10*([.A72]))^-1+[.$G$2]^-1)^-1" office:value-type="float" office:value="0.466666666666667" calcext:value-type="float">
            <text:p>0.466666666666667</text:p>
          </table:table-cell>
          <table:table-cell table:formula="of:=20*LOG(10*[.A72]/(10*[.A72]+[.B72]);10)" office:value-type="float" office:value="-2.47487955990712" calcext:value-type="float">
            <text:p>-2.47487955990712</text:p>
          </table:table-cell>
          <table:table-cell table:formula="of:=20*LOG([.C72]/(10*(1-[.A72])+[.C72]);10)" office:value-type="float" office:value="-17.4181060724108" calcext:value-type="float">
            <text:p>-17.4181060724108</text:p>
          </table:table-cell>
          <table:table-cell table:number-columns-repeated="6"/>
        </table:table-row>
        <table:table-row table:style-name="ro1">
          <table:table-cell table:formula="of:=[.A72]+0.01" office:value-type="float" office:value="0.71" calcext:value-type="float">
            <text:p>0.71</text:p>
          </table:table-cell>
          <table:table-cell table:formula="of:=((10*(1-[.A73]))^-1+[.$G$1]^-1)^-1" office:value-type="float" office:value="2.24806201550387" calcext:value-type="float">
            <text:p>2.24806201550387</text:p>
          </table:table-cell>
          <table:table-cell table:formula="of:=((10*([.A73]))^-1+[.$G$2]^-1)^-1" office:value-type="float" office:value="0.467105263157895" calcext:value-type="float">
            <text:p>0.467105263157895</text:p>
          </table:table-cell>
          <table:table-cell table:formula="of:=20*LOG(10*[.A73]/(10*[.A73]+[.B73]);10)" office:value-type="float" office:value="-2.38926472283312" calcext:value-type="float">
            <text:p>-2.38926472283312</text:p>
          </table:table-cell>
          <table:table-cell table:formula="of:=20*LOG([.C73]/(10*(1-[.A73])+[.C73]);10)" office:value-type="float" office:value="-17.1568386566418" calcext:value-type="float">
            <text:p>-17.1568386566418</text:p>
          </table:table-cell>
          <table:table-cell table:number-columns-repeated="6"/>
        </table:table-row>
        <table:table-row table:style-name="ro1">
          <table:table-cell table:formula="of:=[.A73]+0.01" office:value-type="float" office:value="0.72" calcext:value-type="float">
            <text:p>0.72</text:p>
          </table:table-cell>
          <table:table-cell table:formula="of:=((10*(1-[.A74]))^-1+[.$G$1]^-1)^-1" office:value-type="float" office:value="2.1875" calcext:value-type="float">
            <text:p>2.1875</text:p>
          </table:table-cell>
          <table:table-cell table:formula="of:=((10*([.A74]))^-1+[.$G$2]^-1)^-1" office:value-type="float" office:value="0.467532467532468" calcext:value-type="float">
            <text:p>0.467532467532468</text:p>
          </table:table-cell>
          <table:table-cell table:formula="of:=20*LOG(10*[.A74]/(10*[.A74]+[.B74]);10)" office:value-type="float" office:value="-2.30434907161912" calcext:value-type="float">
            <text:p>-2.30434907161912</text:p>
          </table:table-cell>
          <table:table-cell table:formula="of:=20*LOG([.C74]/(10*(1-[.A74])+[.C74]);10)" office:value-type="float" office:value="-16.8881627201189" calcext:value-type="float">
            <text:p>-16.8881627201189</text:p>
          </table:table-cell>
          <table:table-cell table:number-columns-repeated="6"/>
        </table:table-row>
        <table:table-row table:style-name="ro1">
          <table:table-cell table:formula="of:=[.A74]+0.01" office:value-type="float" office:value="0.73" calcext:value-type="float">
            <text:p>0.73</text:p>
          </table:table-cell>
          <table:table-cell table:formula="of:=((10*(1-[.A75]))^-1+[.$G$1]^-1)^-1" office:value-type="float" office:value="2.1259842519685" calcext:value-type="float">
            <text:p>2.1259842519685</text:p>
          </table:table-cell>
          <table:table-cell table:formula="of:=((10*([.A75]))^-1+[.$G$2]^-1)^-1" office:value-type="float" office:value="0.467948717948718" calcext:value-type="float">
            <text:p>0.467948717948718</text:p>
          </table:table-cell>
          <table:table-cell table:formula="of:=20*LOG(10*[.A75]/(10*[.A75]+[.B75]);10)" office:value-type="float" office:value="-2.22007699452302" calcext:value-type="float">
            <text:p>-2.22007699452302</text:p>
          </table:table-cell>
          <table:table-cell table:formula="of:=20*LOG([.C75]/(10*(1-[.A75])+[.C75]);10)" office:value-type="float" office:value="-16.6115976189121" calcext:value-type="float">
            <text:p>-16.6115976189121</text:p>
          </table:table-cell>
          <table:table-cell table:number-columns-repeated="6"/>
        </table:table-row>
        <table:table-row table:style-name="ro1">
          <table:table-cell table:formula="of:=[.A75]+0.01" office:value-type="float" office:value="0.74" calcext:value-type="float">
            <text:p>0.74</text:p>
          </table:table-cell>
          <table:table-cell table:formula="of:=((10*(1-[.A76]))^-1+[.$G$1]^-1)^-1" office:value-type="float" office:value="2.06349206349206" calcext:value-type="float">
            <text:p>2.06349206349206</text:p>
          </table:table-cell>
          <table:table-cell table:formula="of:=((10*([.A76]))^-1+[.$G$2]^-1)^-1" office:value-type="float" office:value="0.468354430379747" calcext:value-type="float">
            <text:p>0.468354430379747</text:p>
          </table:table-cell>
          <table:table-cell table:formula="of:=20*LOG(10*[.A76]/(10*[.A76]+[.B76]);10)" office:value-type="float" office:value="-2.13639405024108" calcext:value-type="float">
            <text:p>-2.13639405024108</text:p>
          </table:table-cell>
          <table:table-cell table:formula="of:=20*LOG([.C76]/(10*(1-[.A76])+[.C76]);10)" office:value-type="float" office:value="-16.3266178285451" calcext:value-type="float">
            <text:p>-16.3266178285451</text:p>
          </table:table-cell>
          <table:table-cell table:number-columns-repeated="6"/>
        </table:table-row>
        <table:table-row table:style-name="ro1">
          <table:table-cell table:formula="of:=[.A76]+0.01" office:value-type="float" office:value="0.75" calcext:value-type="float">
            <text:p>0.75</text:p>
          </table:table-cell>
          <table:table-cell table:formula="of:=((10*(1-[.A77]))^-1+[.$G$1]^-1)^-1" office:value-type="float" office:value="2" calcext:value-type="float">
            <text:p>2</text:p>
          </table:table-cell>
          <table:table-cell table:formula="of:=((10*([.A77]))^-1+[.$G$2]^-1)^-1" office:value-type="float" office:value="0.46875" calcext:value-type="float">
            <text:p>0.46875</text:p>
          </table:table-cell>
          <table:table-cell table:formula="of:=20*LOG(10*[.A77]/(10*[.A77]+[.B77]);10)" office:value-type="float" office:value="-2.05324683794295" calcext:value-type="float">
            <text:p>-2.05324683794295</text:p>
          </table:table-cell>
          <table:table-cell table:formula="of:=20*LOG([.C77]/(10*(1-[.A77])+[.C77]);10)" office:value-type="float" office:value="-16.0326469246633" calcext:value-type="float">
            <text:p>-16.0326469246633</text:p>
          </table:table-cell>
          <table:table-cell table:number-columns-repeated="6"/>
        </table:table-row>
        <table:table-row table:style-name="ro1">
          <table:table-cell table:formula="of:=[.A77]+0.01" office:value-type="float" office:value="0.760000000000001" calcext:value-type="float">
            <text:p>0.760000000000001</text:p>
          </table:table-cell>
          <table:table-cell table:formula="of:=((10*(1-[.A78]))^-1+[.$G$1]^-1)^-1" office:value-type="float" office:value="1.93548387096774" calcext:value-type="float">
            <text:p>1.93548387096774</text:p>
          </table:table-cell>
          <table:table-cell table:formula="of:=((10*([.A78]))^-1+[.$G$2]^-1)^-1" office:value-type="float" office:value="0.469135802469136" calcext:value-type="float">
            <text:p>0.469135802469136</text:p>
          </table:table-cell>
          <table:table-cell table:formula="of:=20*LOG(10*[.A78]/(10*[.A78]+[.B78]);10)" office:value-type="float" office:value="-1.97058287215448" calcext:value-type="float">
            <text:p>-1.97058287215448</text:p>
          </table:table-cell>
          <table:table-cell table:formula="of:=20*LOG([.C78]/(10*(1-[.A78])+[.C78]);10)" office:value-type="float" office:value="-15.7290505420296" calcext:value-type="float">
            <text:p>-15.7290505420296</text:p>
          </table:table-cell>
          <table:table-cell table:number-columns-repeated="6"/>
        </table:table-row>
        <table:table-row table:style-name="ro1">
          <table:table-cell table:formula="of:=[.A78]+0.01" office:value-type="float" office:value="0.770000000000001" calcext:value-type="float">
            <text:p>0.770000000000001</text:p>
          </table:table-cell>
          <table:table-cell table:formula="of:=((10*(1-[.A79]))^-1+[.$G$1]^-1)^-1" office:value-type="float" office:value="1.86991869918699" calcext:value-type="float">
            <text:p>1.86991869918699</text:p>
          </table:table-cell>
          <table:table-cell table:formula="of:=((10*([.A79]))^-1+[.$G$2]^-1)^-1" office:value-type="float" office:value="0.469512195121951" calcext:value-type="float">
            <text:p>0.469512195121951</text:p>
          </table:table-cell>
          <table:table-cell table:formula="of:=20*LOG(10*[.A79]/(10*[.A79]+[.B79]);10)" office:value-type="float" office:value="-1.88835046181671" calcext:value-type="float">
            <text:p>-1.88835046181671</text:p>
          </table:table-cell>
          <table:table-cell table:formula="of:=20*LOG([.C79]/(10*(1-[.A79])+[.C79]);10)" office:value-type="float" office:value="-15.4151280942247" calcext:value-type="float">
            <text:p>-15.4151280942247</text:p>
          </table:table-cell>
          <table:table-cell table:number-columns-repeated="6"/>
        </table:table-row>
        <table:table-row table:style-name="ro1">
          <table:table-cell table:formula="of:=[.A79]+0.01" office:value-type="float" office:value="0.780000000000001" calcext:value-type="float">
            <text:p>0.780000000000001</text:p>
          </table:table-cell>
          <table:table-cell table:formula="of:=((10*(1-[.A80]))^-1+[.$G$1]^-1)^-1" office:value-type="float" office:value="1.80327868852459" calcext:value-type="float">
            <text:p>1.80327868852459</text:p>
          </table:table-cell>
          <table:table-cell table:formula="of:=((10*([.A80]))^-1+[.$G$2]^-1)^-1" office:value-type="float" office:value="0.469879518072289" calcext:value-type="float">
            <text:p>0.469879518072289</text:p>
          </table:table-cell>
          <table:table-cell table:formula="of:=20*LOG(10*[.A80]/(10*[.A80]+[.B80]);10)" office:value-type="float" office:value="-1.80649859288665" calcext:value-type="float">
            <text:p>-1.80649859288665</text:p>
          </table:table-cell>
          <table:table-cell table:formula="of:=20*LOG([.C80]/(10*(1-[.A80])+[.C80]);10)" office:value-type="float" office:value="-15.0901029805978" calcext:value-type="float">
            <text:p>-15.0901029805978</text:p>
          </table:table-cell>
          <table:table-cell table:number-columns-repeated="6"/>
        </table:table-row>
        <table:table-row table:style-name="ro1">
          <table:table-cell table:formula="of:=[.A80]+0.01" office:value-type="float" office:value="0.790000000000001" calcext:value-type="float">
            <text:p>0.790000000000001</text:p>
          </table:table-cell>
          <table:table-cell table:formula="of:=((10*(1-[.A81]))^-1+[.$G$1]^-1)^-1" office:value-type="float" office:value="1.73553719008264" calcext:value-type="float">
            <text:p>1.73553719008264</text:p>
          </table:table-cell>
          <table:table-cell table:formula="of:=((10*([.A81]))^-1+[.$G$2]^-1)^-1" office:value-type="float" office:value="0.470238095238095" calcext:value-type="float">
            <text:p>0.470238095238095</text:p>
          </table:table-cell>
          <table:table-cell table:formula="of:=20*LOG(10*[.A81]/(10*[.A81]+[.B81]);10)" office:value-type="float" office:value="-1.72497681387571" calcext:value-type="float">
            <text:p>-1.72497681387571</text:p>
          </table:table-cell>
          <table:table-cell table:formula="of:=20*LOG([.C81]/(10*(1-[.A81])+[.C81]);10)" office:value-type="float" office:value="-14.7531109341554" calcext:value-type="float">
            <text:p>-14.7531109341554</text:p>
          </table:table-cell>
          <table:table-cell table:number-columns-repeated="6"/>
        </table:table-row>
        <table:table-row table:style-name="ro1">
          <table:table-cell table:formula="of:=[.A81]+0.01" office:value-type="float" office:value="0.800000000000001" calcext:value-type="float">
            <text:p>0.800000000000001</text:p>
          </table:table-cell>
          <table:table-cell table:formula="of:=((10*(1-[.A82]))^-1+[.$G$1]^-1)^-1" office:value-type="float" office:value="1.66666666666666" calcext:value-type="float">
            <text:p>1.66666666666666</text:p>
          </table:table-cell>
          <table:table-cell table:formula="of:=((10*([.A82]))^-1+[.$G$2]^-1)^-1" office:value-type="float" office:value="0.470588235294118" calcext:value-type="float">
            <text:p>0.470588235294118</text:p>
          </table:table-cell>
          <table:table-cell table:formula="of:=20*LOG(10*[.A82]/(10*[.A82]+[.B82]);10)" office:value-type="float" office:value="-1.643735123747" calcext:value-type="float">
            <text:p>-1.643735123747</text:p>
          </table:table-cell>
          <table:table-cell table:formula="of:=20*LOG([.C82]/(10*(1-[.A82])+[.C82]);10)" office:value-type="float" office:value="-14.4031860681191" calcext:value-type="float">
            <text:p>-14.4031860681191</text:p>
          </table:table-cell>
          <table:table-cell table:number-columns-repeated="6"/>
        </table:table-row>
        <table:table-row table:style-name="ro1">
          <table:table-cell table:formula="of:=[.A82]+0.01" office:value-type="float" office:value="0.810000000000001" calcext:value-type="float">
            <text:p>0.810000000000001</text:p>
          </table:table-cell>
          <table:table-cell table:formula="of:=((10*(1-[.A83]))^-1+[.$G$1]^-1)^-1" office:value-type="float" office:value="1.59663865546218" calcext:value-type="float">
            <text:p>1.59663865546218</text:p>
          </table:table-cell>
          <table:table-cell table:formula="of:=((10*([.A83]))^-1+[.$G$2]^-1)^-1" office:value-type="float" office:value="0.47093023255814" calcext:value-type="float">
            <text:p>0.47093023255814</text:p>
          </table:table-cell>
          <table:table-cell table:formula="of:=20*LOG(10*[.A83]/(10*[.A83]+[.B83]);10)" office:value-type="float" office:value="-1.56272386161204" calcext:value-type="float">
            <text:p>-1.56272386161204</text:p>
          </table:table-cell>
          <table:table-cell table:formula="of:=20*LOG([.C83]/(10*(1-[.A83])+[.C83]);10)" office:value-type="float" office:value="-14.0392440512694" calcext:value-type="float">
            <text:p>-14.0392440512694</text:p>
          </table:table-cell>
          <table:table-cell table:number-columns-repeated="6"/>
        </table:table-row>
        <table:table-row table:style-name="ro1">
          <table:table-cell table:formula="of:=[.A83]+0.01" office:value-type="float" office:value="0.820000000000001" calcext:value-type="float">
            <text:p>0.820000000000001</text:p>
          </table:table-cell>
          <table:table-cell table:formula="of:=((10*(1-[.A84]))^-1+[.$G$1]^-1)^-1" office:value-type="float" office:value="1.52542372881356" calcext:value-type="float">
            <text:p>1.52542372881356</text:p>
          </table:table-cell>
          <table:table-cell table:formula="of:=((10*([.A84]))^-1+[.$G$2]^-1)^-1" office:value-type="float" office:value="0.471264367816092" calcext:value-type="float">
            <text:p>0.471264367816092</text:p>
          </table:table-cell>
          <table:table-cell table:formula="of:=20*LOG(10*[.A84]/(10*[.A84]+[.B84]);10)" office:value-type="float" office:value="-1.48189359768237" calcext:value-type="float">
            <text:p>-1.48189359768237</text:p>
          </table:table-cell>
          <table:table-cell table:formula="of:=20*LOG([.C84]/(10*(1-[.A84])+[.C84]);10)" office:value-type="float" office:value="-13.6600616706375" calcext:value-type="float">
            <text:p>-13.6600616706375</text:p>
          </table:table-cell>
          <table:table-cell table:number-columns-repeated="6"/>
        </table:table-row>
        <table:table-row table:style-name="ro1">
          <table:table-cell table:formula="of:=[.A84]+0.01" office:value-type="float" office:value="0.830000000000001" calcext:value-type="float">
            <text:p>0.830000000000001</text:p>
          </table:table-cell>
          <table:table-cell table:formula="of:=((10*(1-[.A85]))^-1+[.$G$1]^-1)^-1" office:value-type="float" office:value="1.45299145299145" calcext:value-type="float">
            <text:p>1.45299145299145</text:p>
          </table:table-cell>
          <table:table-cell table:formula="of:=((10*([.A85]))^-1+[.$G$2]^-1)^-1" office:value-type="float" office:value="0.471590909090909" calcext:value-type="float">
            <text:p>0.471590909090909</text:p>
          </table:table-cell>
          <table:table-cell table:formula="of:=20*LOG(10*[.A85]/(10*[.A85]+[.B85]);10)" office:value-type="float" office:value="-1.40119502494097" calcext:value-type="float">
            <text:p>-1.40119502494097</text:p>
          </table:table-cell>
          <table:table-cell table:formula="of:=20*LOG([.C85]/(10*(1-[.A85])+[.C85]);10)" office:value-type="float" office:value="-13.2642518068584" calcext:value-type="float">
            <text:p>-13.2642518068584</text:p>
          </table:table-cell>
          <table:table-cell table:number-columns-repeated="6"/>
        </table:table-row>
        <table:table-row table:style-name="ro1">
          <table:table-cell table:formula="of:=[.A85]+0.01" office:value-type="float" office:value="0.840000000000001" calcext:value-type="float">
            <text:p>0.840000000000001</text:p>
          </table:table-cell>
          <table:table-cell table:formula="of:=((10*(1-[.A86]))^-1+[.$G$1]^-1)^-1" office:value-type="float" office:value="1.37931034482758" calcext:value-type="float">
            <text:p>1.37931034482758</text:p>
          </table:table-cell>
          <table:table-cell table:formula="of:=((10*([.A86]))^-1+[.$G$2]^-1)^-1" office:value-type="float" office:value="0.471910112359551" calcext:value-type="float">
            <text:p>0.471910112359551</text:p>
          </table:table-cell>
          <table:table-cell table:formula="of:=20*LOG(10*[.A86]/(10*[.A86]+[.B86]);10)" office:value-type="float" office:value="-1.32057885100382" calcext:value-type="float">
            <text:p>-1.32057885100382</text:p>
          </table:table-cell>
          <table:table-cell table:formula="of:=20*LOG([.C86]/(10*(1-[.A86])+[.C86]);10)" office:value-type="float" office:value="-12.8502325263942" calcext:value-type="float">
            <text:p>-12.8502325263942</text:p>
          </table:table-cell>
          <table:table-cell table:number-columns-repeated="6"/>
        </table:table-row>
        <table:table-row table:style-name="ro1">
          <table:table-cell table:formula="of:=[.A86]+0.01" office:value-type="float" office:value="0.850000000000001" calcext:value-type="float">
            <text:p>0.850000000000001</text:p>
          </table:table-cell>
          <table:table-cell table:formula="of:=((10*(1-[.A87]))^-1+[.$G$1]^-1)^-1" office:value-type="float" office:value="1.30434782608695" calcext:value-type="float">
            <text:p>1.30434782608695</text:p>
          </table:table-cell>
          <table:table-cell table:formula="of:=((10*([.A87]))^-1+[.$G$2]^-1)^-1" office:value-type="float" office:value="0.472222222222222" calcext:value-type="float">
            <text:p>0.472222222222222</text:p>
          </table:table-cell>
          <table:table-cell table:formula="of:=20*LOG(10*[.A87]/(10*[.A87]+[.B87]);10)" office:value-type="float" office:value="-1.23999568964187" calcext:value-type="float">
            <text:p>-1.23999568964187</text:p>
          </table:table-cell>
          <table:table-cell table:formula="of:=20*LOG([.C87]/(10*(1-[.A87])+[.C87]);10)" office:value-type="float" office:value="-12.416188546816" calcext:value-type="float">
            <text:p>-12.416188546816</text:p>
          </table:table-cell>
          <table:table-cell table:number-columns-repeated="6"/>
        </table:table-row>
        <table:table-row table:style-name="ro1">
          <table:table-cell table:formula="of:=[.A87]+0.01" office:value-type="float" office:value="0.860000000000001" calcext:value-type="float">
            <text:p>0.860000000000001</text:p>
          </table:table-cell>
          <table:table-cell table:formula="of:=((10*(1-[.A88]))^-1+[.$G$1]^-1)^-1" office:value-type="float" office:value="1.22807017543859" calcext:value-type="float">
            <text:p>1.22807017543859</text:p>
          </table:table-cell>
          <table:table-cell table:formula="of:=((10*([.A88]))^-1+[.$G$2]^-1)^-1" office:value-type="float" office:value="0.472527472527473" calcext:value-type="float">
            <text:p>0.472527472527473</text:p>
          </table:table-cell>
          <table:table-cell table:formula="of:=20*LOG(10*[.A88]/(10*[.A88]+[.B88]);10)" office:value-type="float" office:value="-1.1593959514298" calcext:value-type="float">
            <text:p>-1.1593959514298</text:p>
          </table:table-cell>
          <table:table-cell table:formula="of:=20*LOG([.C88]/(10*(1-[.A88])+[.C88]);10)" office:value-type="float" office:value="-11.9600226970219" calcext:value-type="float">
            <text:p>-11.9600226970219</text:p>
          </table:table-cell>
          <table:table-cell table:number-columns-repeated="6"/>
        </table:table-row>
        <table:table-row table:style-name="ro1">
          <table:table-cell table:formula="of:=[.A88]+0.01" office:value-type="float" office:value="0.870000000000001" calcext:value-type="float">
            <text:p>0.870000000000001</text:p>
          </table:table-cell>
          <table:table-cell table:formula="of:=((10*(1-[.A89]))^-1+[.$G$1]^-1)^-1" office:value-type="float" office:value="1.1504424778761" calcext:value-type="float">
            <text:p>1.1504424778761</text:p>
          </table:table-cell>
          <table:table-cell table:formula="of:=((10*([.A89]))^-1+[.$G$2]^-1)^-1" office:value-type="float" office:value="0.472826086956522" calcext:value-type="float">
            <text:p>0.472826086956522</text:p>
          </table:table-cell>
          <table:table-cell table:formula="of:=20*LOG(10*[.A89]/(10*[.A89]+[.B89]);10)" office:value-type="float" office:value="-1.07872973297862" calcext:value-type="float">
            <text:p>-1.07872973297862</text:p>
          </table:table-cell>
          <table:table-cell table:formula="of:=20*LOG([.C89]/(10*(1-[.A89])+[.C89]);10)" office:value-type="float" office:value="-11.4792940817127" calcext:value-type="float">
            <text:p>-11.4792940817127</text:p>
          </table:table-cell>
          <table:table-cell table:number-columns-repeated="6"/>
        </table:table-row>
        <table:table-row table:style-name="ro1">
          <table:table-cell table:formula="of:=[.A89]+0.01" office:value-type="float" office:value="0.880000000000001" calcext:value-type="float">
            <text:p>0.880000000000001</text:p>
          </table:table-cell>
          <table:table-cell table:formula="of:=((10*(1-[.A90]))^-1+[.$G$1]^-1)^-1" office:value-type="float" office:value="1.07142857142857" calcext:value-type="float">
            <text:p>1.07142857142857</text:p>
          </table:table-cell>
          <table:table-cell table:formula="of:=((10*([.A90]))^-1+[.$G$2]^-1)^-1" office:value-type="float" office:value="0.473118279569892" calcext:value-type="float">
            <text:p>0.473118279569892</text:p>
          </table:table-cell>
          <table:table-cell table:formula="of:=20*LOG(10*[.A90]/(10*[.A90]+[.B90]);10)" office:value-type="float" office:value="-0.997946704195455" calcext:value-type="float">
            <text:p>-0.997946704195455</text:p>
          </table:table-cell>
          <table:table-cell table:formula="of:=20*LOG([.C90]/(10*(1-[.A90])+[.C90]);10)" office:value-type="float" office:value="-10.9711383233496" calcext:value-type="float">
            <text:p>-10.9711383233496</text:p>
          </table:table-cell>
          <table:table-cell table:number-columns-repeated="6"/>
        </table:table-row>
        <table:table-row table:style-name="ro1">
          <table:table-cell table:formula="of:=[.A90]+0.01" office:value-type="float" office:value="0.890000000000001" calcext:value-type="float">
            <text:p>0.890000000000001</text:p>
          </table:table-cell>
          <table:table-cell table:formula="of:=((10*(1-[.A91]))^-1+[.$G$1]^-1)^-1" office:value-type="float" office:value="0.990990990990986" calcext:value-type="float">
            <text:p>0.990990990990986</text:p>
          </table:table-cell>
          <table:table-cell table:formula="of:=((10*([.A91]))^-1+[.$G$2]^-1)^-1" office:value-type="float" office:value="0.473404255319149" calcext:value-type="float">
            <text:p>0.473404255319149</text:p>
          </table:table-cell>
          <table:table-cell table:formula="of:=20*LOG(10*[.A91]/(10*[.A91]+[.B91]);10)" office:value-type="float" office:value="-0.916995992994826" calcext:value-type="float">
            <text:p>-0.916995992994826</text:p>
          </table:table-cell>
          <table:table-cell table:formula="of:=20*LOG([.C91]/(10*(1-[.A91])+[.C91]);10)" office:value-type="float" office:value="-10.4321632603192" calcext:value-type="float">
            <text:p>-10.4321632603192</text:p>
          </table:table-cell>
          <table:table-cell table:number-columns-repeated="6"/>
        </table:table-row>
        <table:table-row table:style-name="ro1">
          <table:table-cell table:formula="of:=[.A91]+0.01" office:value-type="float" office:value="0.900000000000001" calcext:value-type="float">
            <text:p>0.900000000000001</text:p>
          </table:table-cell>
          <table:table-cell table:formula="of:=((10*(1-[.A92]))^-1+[.$G$1]^-1)^-1" office:value-type="float" office:value="0.909090909090904" calcext:value-type="float">
            <text:p>0.909090909090904</text:p>
          </table:table-cell>
          <table:table-cell table:formula="of:=((10*([.A92]))^-1+[.$G$2]^-1)^-1" office:value-type="float" office:value="0.473684210526316" calcext:value-type="float">
            <text:p>0.473684210526316</text:p>
          </table:table-cell>
          <table:table-cell table:formula="of:=20*LOG(10*[.A92]/(10*[.A92]+[.B92]);10)" office:value-type="float" office:value="-0.83582606686147" calcext:value-type="float">
            <text:p>-0.83582606686147</text:p>
          </table:table-cell>
          <table:table-cell table:formula="of:=20*LOG([.C92]/(10*(1-[.A92])+[.C92]);10)" office:value-type="float" office:value="-9.85831043805785" calcext:value-type="float">
            <text:p>-9.85831043805785</text:p>
          </table:table-cell>
          <table:table-cell table:number-columns-repeated="6"/>
        </table:table-row>
        <table:table-row table:style-name="ro1">
          <table:table-cell table:formula="of:=[.A92]+0.01" office:value-type="float" office:value="0.910000000000001" calcext:value-type="float">
            <text:p>0.910000000000001</text:p>
          </table:table-cell>
          <table:table-cell table:formula="of:=((10*(1-[.A93]))^-1+[.$G$1]^-1)^-1" office:value-type="float" office:value="0.825688073394491" calcext:value-type="float">
            <text:p>0.825688073394491</text:p>
          </table:table-cell>
          <table:table-cell table:formula="of:=((10*([.A93]))^-1+[.$G$2]^-1)^-1" office:value-type="float" office:value="0.473958333333333" calcext:value-type="float">
            <text:p>0.473958333333333</text:p>
          </table:table-cell>
          <table:table-cell table:formula="of:=20*LOG(10*[.A93]/(10*[.A93]+[.B93]);10)" office:value-type="float" office:value="-0.754384610634701" calcext:value-type="float">
            <text:p>-0.754384610634701</text:p>
          </table:table-cell>
          <table:table-cell table:formula="of:=20*LOG([.C93]/(10*(1-[.A93])+[.C93]);10)" office:value-type="float" office:value="-9.24466797778502" calcext:value-type="float">
            <text:p>-9.24466797778502</text:p>
          </table:table-cell>
          <table:table-cell table:number-columns-repeated="6"/>
        </table:table-row>
        <table:table-row table:style-name="ro1">
          <table:table-cell table:formula="of:=[.A93]+0.01" office:value-type="float" office:value="0.920000000000001" calcext:value-type="float">
            <text:p>0.920000000000001</text:p>
          </table:table-cell>
          <table:table-cell table:formula="of:=((10*(1-[.A94]))^-1+[.$G$1]^-1)^-1" office:value-type="float" office:value="0.740740740740736" calcext:value-type="float">
            <text:p>0.740740740740736</text:p>
          </table:table-cell>
          <table:table-cell table:formula="of:=((10*([.A94]))^-1+[.$G$2]^-1)^-1" office:value-type="float" office:value="0.474226804123711" calcext:value-type="float">
            <text:p>0.474226804123711</text:p>
          </table:table-cell>
          <table:table-cell table:formula="of:=20*LOG(10*[.A94]/(10*[.A94]+[.B94]);10)" office:value-type="float" office:value="-0.672618399848233" calcext:value-type="float">
            <text:p>-0.672618399848233</text:p>
          </table:table-cell>
          <table:table-cell table:formula="of:=20*LOG([.C94]/(10*(1-[.A94])+[.C94]);10)" office:value-type="float" office:value="-8.58521278142442" calcext:value-type="float">
            <text:p>-8.58521278142442</text:p>
          </table:table-cell>
          <table:table-cell table:number-columns-repeated="6"/>
        </table:table-row>
        <table:table-row table:style-name="ro1">
          <table:table-cell table:formula="of:=[.A94]+0.01" office:value-type="float" office:value="0.930000000000001" calcext:value-type="float">
            <text:p>0.930000000000001</text:p>
          </table:table-cell>
          <table:table-cell table:formula="of:=((10*(1-[.A95]))^-1+[.$G$1]^-1)^-1" office:value-type="float" office:value="0.65420560747663" calcext:value-type="float">
            <text:p>0.65420560747663</text:p>
          </table:table-cell>
          <table:table-cell table:formula="of:=((10*([.A95]))^-1+[.$G$2]^-1)^-1" office:value-type="float" office:value="0.474489795918367" calcext:value-type="float">
            <text:p>0.474489795918367</text:p>
          </table:table-cell>
          <table:table-cell table:formula="of:=20*LOG(10*[.A95]/(10*[.A95]+[.B95]);10)" office:value-type="float" office:value="-0.590473168916488" calcext:value-type="float">
            <text:p>-0.590473168916488</text:p>
          </table:table-cell>
          <table:table-cell table:formula="of:=20*LOG([.C95]/(10*(1-[.A95])+[.C95]);10)" office:value-type="float" office:value="-7.87244741479671" calcext:value-type="float">
            <text:p>-7.87244741479671</text:p>
          </table:table-cell>
          <table:table-cell table:number-columns-repeated="6"/>
        </table:table-row>
        <table:table-row table:style-name="ro1">
          <table:table-cell table:formula="of:=[.A95]+0.01" office:value-type="float" office:value="0.940000000000001" calcext:value-type="float">
            <text:p>0.940000000000001</text:p>
          </table:table-cell>
          <table:table-cell table:formula="of:=((10*(1-[.A96]))^-1+[.$G$1]^-1)^-1" office:value-type="float" office:value="0.566037735849051" calcext:value-type="float">
            <text:p>0.566037735849051</text:p>
          </table:table-cell>
          <table:table-cell table:formula="of:=((10*([.A96]))^-1+[.$G$2]^-1)^-1" office:value-type="float" office:value="0.474747474747475" calcext:value-type="float">
            <text:p>0.474747474747475</text:p>
          </table:table-cell>
          <table:table-cell table:formula="of:=20*LOG(10*[.A96]/(10*[.A96]+[.B96]);10)" office:value-type="float" office:value="-0.507893473408345" calcext:value-type="float">
            <text:p>-0.507893473408345</text:p>
          </table:table-cell>
          <table:table-cell table:formula="of:=20*LOG([.C96]/(10*(1-[.A96])+[.C96]);10)" office:value-type="float" office:value="-7.09687540046619" calcext:value-type="float">
            <text:p>-7.09687540046619</text:p>
          </table:table-cell>
          <table:table-cell table:number-columns-repeated="6"/>
        </table:table-row>
        <table:table-row table:style-name="ro1">
          <table:table-cell table:formula="of:=[.A96]+0.01" office:value-type="float" office:value="0.950000000000001" calcext:value-type="float">
            <text:p>0.950000000000001</text:p>
          </table:table-cell>
          <table:table-cell table:formula="of:=((10*(1-[.A97]))^-1+[.$G$1]^-1)^-1" office:value-type="float" office:value="0.476190476190471" calcext:value-type="float">
            <text:p>0.476190476190471</text:p>
          </table:table-cell>
          <table:table-cell table:formula="of:=((10*([.A97]))^-1+[.$G$2]^-1)^-1" office:value-type="float" office:value="0.475" calcext:value-type="float">
            <text:p>0.475</text:p>
          </table:table-cell>
          <table:table-cell table:formula="of:=20*LOG(10*[.A97]/(10*[.A97]+[.B97]);10)" office:value-type="float" office:value="-0.424822545590936" calcext:value-type="float">
            <text:p>-0.424822545590936</text:p>
          </table:table-cell>
          <table:table-cell table:formula="of:=20*LOG([.C97]/(10*(1-[.A97])+[.C97]);10)" office:value-type="float" office:value="-6.24622012147335" calcext:value-type="float">
            <text:p>-6.24622012147335</text:p>
          </table:table-cell>
          <table:table-cell table:number-columns-repeated="6"/>
        </table:table-row>
        <table:table-row table:style-name="ro1">
          <table:table-cell table:formula="of:=[.A97]+0.01" office:value-type="float" office:value="0.960000000000001" calcext:value-type="float">
            <text:p>0.960000000000001</text:p>
          </table:table-cell>
          <table:table-cell table:formula="of:=((10*(1-[.A98]))^-1+[.$G$1]^-1)^-1" office:value-type="float" office:value="0.384615384615379" calcext:value-type="float">
            <text:p>0.384615384615379</text:p>
          </table:table-cell>
          <table:table-cell table:formula="of:=((10*([.A98]))^-1+[.$G$2]^-1)^-1" office:value-type="float" office:value="0.475247524752475" calcext:value-type="float">
            <text:p>0.475247524752475</text:p>
          </table:table-cell>
          <table:table-cell table:formula="of:=20*LOG(10*[.A98]/(10*[.A98]+[.B98]);10)" office:value-type="float" office:value="-0.341202142358899" calcext:value-type="float">
            <text:p>-0.341202142358899</text:p>
          </table:table-cell>
          <table:table-cell table:formula="of:=20*LOG([.C98]/(10*(1-[.A98])+[.C98]);10)" office:value-type="float" office:value="-5.30422055274965" calcext:value-type="float">
            <text:p>-5.30422055274965</text:p>
          </table:table-cell>
          <table:table-cell table:number-columns-repeated="6"/>
        </table:table-row>
        <table:table-row table:style-name="ro1">
          <table:table-cell table:formula="of:=[.A98]+0.01" office:value-type="float" office:value="0.970000000000001" calcext:value-type="float">
            <text:p>0.970000000000001</text:p>
          </table:table-cell>
          <table:table-cell table:formula="of:=((10*(1-[.A99]))^-1+[.$G$1]^-1)^-1" office:value-type="float" office:value="0.291262135922324" calcext:value-type="float">
            <text:p>0.291262135922324</text:p>
          </table:table-cell>
          <table:table-cell table:formula="of:=((10*([.A99]))^-1+[.$G$2]^-1)^-1" office:value-type="float" office:value="0.475490196078431" calcext:value-type="float">
            <text:p>0.475490196078431</text:p>
          </table:table-cell>
          <table:table-cell table:formula="of:=20*LOG(10*[.A99]/(10*[.A99]+[.B99]);10)" office:value-type="float" office:value="-0.256972384587126" calcext:value-type="float">
            <text:p>-0.256972384587126</text:p>
          </table:table-cell>
          <table:table-cell table:formula="of:=20*LOG([.C99]/(10*(1-[.A99])+[.C99]);10)" office:value-type="float" office:value="-4.24869489790819" calcext:value-type="float">
            <text:p>-4.24869489790819</text:p>
          </table:table-cell>
          <table:table-cell table:number-columns-repeated="6"/>
        </table:table-row>
        <table:table-row table:style-name="ro1">
          <table:table-cell table:formula="of:=[.A99]+0.01" office:value-type="float" office:value="0.980000000000001" calcext:value-type="float">
            <text:p>0.980000000000001</text:p>
          </table:table-cell>
          <table:table-cell table:formula="of:=((10*(1-[.A100]))^-1+[.$G$1]^-1)^-1" office:value-type="float" office:value="0.196078431372543" calcext:value-type="float">
            <text:p>0.196078431372543</text:p>
          </table:table-cell>
          <table:table-cell table:formula="of:=((10*([.A100]))^-1+[.$G$2]^-1)^-1" office:value-type="float" office:value="0.475728155339806" calcext:value-type="float">
            <text:p>0.475728155339806</text:p>
          </table:table-cell>
          <table:table-cell table:formula="of:=20*LOG(10*[.A100]/(10*[.A100]+[.B100]);10)" office:value-type="float" office:value="-0.172071586856344" calcext:value-type="float">
            <text:p>-0.172071586856344</text:p>
          </table:table-cell>
          <table:table-cell table:formula="of:=20*LOG([.C100]/(10*(1-[.A100])+[.C100]);10)" office:value-type="float" office:value="-3.04826319164089" calcext:value-type="float">
            <text:p>-3.04826319164089</text:p>
          </table:table-cell>
          <table:table-cell table:number-columns-repeated="6"/>
        </table:table-row>
        <table:table-row table:style-name="ro1">
          <table:table-cell table:formula="of:=[.A100]+0.01" office:value-type="float" office:value="0.990000000000001" calcext:value-type="float">
            <text:p>0.990000000000001</text:p>
          </table:table-cell>
          <table:table-cell table:formula="of:=((10*(1-[.A101]))^-1+[.$G$1]^-1)^-1" office:value-type="float" office:value="0.0990099009900926" calcext:value-type="float">
            <text:p>0.0990099009900926</text:p>
          </table:table-cell>
          <table:table-cell table:formula="of:=((10*([.A101]))^-1+[.$G$2]^-1)^-1" office:value-type="float" office:value="0.475961538461539" calcext:value-type="float">
            <text:p>0.475961538461539</text:p>
          </table:table-cell>
          <table:table-cell table:formula="of:=20*LOG(10*[.A101]/(10*[.A101]+[.B101]);10)" office:value-type="float" office:value="-0.0864360763993932" calcext:value-type="float">
            <text:p>-0.0864360763993932</text:p>
          </table:table-cell>
          <table:table-cell table:formula="of:=20*LOG([.C101]/(10*(1-[.A101])+[.C101]);10)" office:value-type="float" office:value="-1.65643246911475" calcext:value-type="float">
            <text:p>-1.6564324691147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1T20:08:46.773663542</meta:creation-date>
    <dc:date>2026-06-11T21:39:45.247641274</dc:date>
    <meta:editing-duration>PT1H30M45S</meta:editing-duration>
    <meta:editing-cycles>27</meta:editing-cycles>
    <meta:generator>LibreOffice/24.2.7.2$Linux_X86_64 LibreOffice_project/420$Build-2</meta:generator>
    <meta:document-statistic meta:table-count="1" meta:cell-count="511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-42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draw:stroke="dash" draw:stroke-dash="Long_20_Dot_20__28_Rounded_29_" svg:stroke-color="#b3b3b3" svg:stroke-linecap="round"/>
    </style:style>
    <style:style style:name="ch9" style:family="chart" style:data-style-name="N0">
      <style:chart-properties chart:display-label="true" chart:logarithmic="false" chart:minimum="-42" chart:origin="-42" chart:interval-major="6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605cm" svg:height="20.897cm" xlink:href=".." xlink:type="simple" chart:class="chart:scatter" chart:style-name="ch1">
        <chart:title svg:x="11.173cm" svg:y="0.552cm" chart:style-name="ch2">
          <text:p>Gain vs Wiper Position</text:p>
        </chart:title>
        <chart:subtitle svg:x="13.802cm" svg:y="1.822cm" chart:style-name="ch3">
          <text:p>
</text:p>
        </chart:subtitle>
        <chart:legend chart:legend-position="top" svg:x="10.49cm" svg:y="2.008cm" style:legend-expansion="wide" chart:style-name="ch4"/>
        <chart:plot-area chart:style-name="ch5" table:cell-range-address="Sheet1.A2:Sheet1.A101 Sheet1.D1:Sheet1.E101" chart:data-source-has-labels="row" svg:x="1.855cm" svg:y="3.182cm" svg:width="25.198cm" svg:height="16.025cm">
          <chart:coordinate-region svg:x="2.582cm" svg:y="3.381cm" svg:width="24.377cm" svg:height="15.179cm"/>
          <chart:axis chart:dimension="x" chart:name="primary-x" chart:style-name="ch6">
            <chart:title svg:x="12.751cm" svg:y="19.624cm" chart:style-name="ch7">
              <text:p>Wiper Position</text:p>
            </chart:title>
            <chart:grid chart:style-name="ch8" chart:class="major"/>
          </chart:axis>
          <chart:axis chart:dimension="y" chart:name="primary-y" chart:style-name="ch9">
            <chart:title svg:x="0.451cm" svg:y="12.328cm" chart:style-name="ch10">
              <text:p>Gain (db)</text:p>
            </chart:title>
            <chart:grid chart:style-name="ch8" chart:class="major"/>
          </chart:axis>
          <chart:series chart:style-name="ch11" chart:values-cell-range-address="Sheet1.D2:Sheet1.D101" chart:label-cell-address="Sheet1.D1:Sheet1.D1" chart:class="chart:scatter">
            <chart:domain table:cell-range-address="Sheet1.A2:Sheet1.A101"/>
            <chart:data-point chart:repeated="100"/>
          </chart:series>
          <chart:series chart:style-name="ch12" chart:values-cell-range-address="Sheet1.E2:Sheet1.E101" chart:label-cell-address="Sheet1.E1:Sheet1.E1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ld Gain</text:p>
                <draw:g>
                  <svg:desc>Sheet1.D1:Sheet1.D1</svg:desc>
                </draw:g>
              </table:table-cell>
              <table:table-cell office:value-type="string">
                <text:p>New Gai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1</svg:desc>
                </draw:g>
              </table:table-cell>
              <table:table-cell office:value-type="float" office:value="NaN">
                <text:p>NaN</text:p>
                <draw:g>
                  <svg:desc>Sheet1.D2:Sheet1.D101</svg:desc>
                </draw:g>
              </table:table-cell>
              <table:table-cell office:value-type="float" office:value="NaN">
                <text:p>NaN</text:p>
                <draw:g>
                  <svg:desc>Sheet1.E2:Sheet1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-34.1085059158091">
                <text:p>-34.1085059158091</text:p>
              </table:table-cell>
              <table:table-cell office:value-type="float" office:value="-41.5691363610658">
                <text:p>-41.5691363610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28.2146928174344">
                <text:p>-28.2146928174344</text:p>
              </table:table-cell>
              <table:table-cell office:value-type="float" office:value="-36.8521847922112">
                <text:p>-36.8521847922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24.8174019463904">
                <text:p>-24.8174019463904</text:p>
              </table:table-cell>
              <table:table-cell office:value-type="float" office:value="-34.4417044888399">
                <text:p>-34.4417044888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-22.4409723354371">
                <text:p>-22.4409723354371</text:p>
              </table:table-cell>
              <table:table-cell office:value-type="float" office:value="-32.9084453869818">
                <text:p>-32.9084453869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20.6229883187959">
                <text:p>-20.6229883187959</text:p>
              </table:table-cell>
              <table:table-cell office:value-type="float" office:value="-31.82129214053">
                <text:p>-31.82129214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-19.1575082444203">
                <text:p>-19.1575082444203</text:p>
              </table:table-cell>
              <table:table-cell office:value-type="float" office:value="-30.9964074647873">
                <text:p>-30.9964074647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-17.9347007132588">
                <text:p>-17.9347007132588</text:p>
              </table:table-cell>
              <table:table-cell office:value-type="float" office:value="-30.3401455855903">
                <text:p>-30.3401455855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16.8890257425885">
                <text:p>-16.8890257425885</text:p>
              </table:table-cell>
              <table:table-cell office:value-type="float" office:value="-29.7991695884967">
                <text:p>-29.79916958849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-15.978224882128">
                <text:p>-15.978224882128</text:p>
              </table:table-cell>
              <table:table-cell office:value-type="float" office:value="-29.3406456354204">
                <text:p>-29.3406456354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15.1734579397559">
                <text:p>-15.1734579397559</text:p>
              </table:table-cell>
              <table:table-cell office:value-type="float" office:value="-28.9431606268444">
                <text:p>-28.9431606268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14.4541659149969">
                <text:p>-14.4541659149969</text:p>
              </table:table-cell>
              <table:table-cell office:value-type="float" office:value="-28.592109690053">
                <text:p>-28.592109690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13.8051786943764">
                <text:p>-13.8051786943764</text:p>
              </table:table-cell>
              <table:table-cell office:value-type="float" office:value="-28.2771668454005">
                <text:p>-28.2771668454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13.2149844781527">
                <text:p>-13.2149844781527</text:p>
              </table:table-cell>
              <table:table-cell office:value-type="float" office:value="-27.9908120879484">
                <text:p>-27.99081208794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12.6746424051075">
                <text:p>-12.6746424051075</text:p>
              </table:table-cell>
              <table:table-cell office:value-type="float" office:value="-27.7274310083285">
                <text:p>-27.7274310083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12.1770712618261">
                <text:p>-12.1770712618261</text:p>
              </table:table-cell>
              <table:table-cell office:value-type="float" office:value="-27.4827418799883">
                <text:p>-27.4827418799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11.7165682434706">
                <text:p>-11.7165682434706</text:p>
              </table:table-cell>
              <table:table-cell office:value-type="float" office:value="-27.2534185945133">
                <text:p>-27.25341859451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11.2884738852116">
                <text:p>-11.2884738852116</text:p>
              </table:table-cell>
              <table:table-cell office:value-type="float" office:value="-27.0368352268144">
                <text:p>-27.0368352268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10.8889329297116">
                <text:p>-10.8889329297116</text:p>
              </table:table-cell>
              <table:table-cell office:value-type="float" office:value="-26.8308886162457">
                <text:p>-26.8308886162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10.5147199505954">
                <text:p>-10.5147199505954</text:p>
              </table:table-cell>
              <table:table-cell office:value-type="float" office:value="-26.6338724097858">
                <text:p>-26.63387240978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10.1631097691926">
                <text:p>-10.1631097691926</text:p>
              </table:table-cell>
              <table:table-cell office:value-type="float" office:value="-26.4443858946784">
                <text:p>-26.4443858946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9.83177953173729">
                <text:p>-9.83177953173729</text:p>
              </table:table-cell>
              <table:table-cell office:value-type="float" office:value="-26.2612668652859">
                <text:p>-26.26126686528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9.51873359756921">
                <text:p>-9.51873359756921</text:p>
              </table:table-cell>
              <table:table-cell office:value-type="float" office:value="-26.0835414179633">
                <text:p>-26.08354141796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9.22224514646632">
                <text:p>-9.22224514646632</text:p>
              </table:table-cell>
              <table:table-cell office:value-type="float" office:value="-25.9103858773225">
                <text:p>-25.91038587732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8.94081023049989">
                <text:p>-8.94081023049989</text:p>
              </table:table-cell>
              <table:table-cell office:value-type="float" office:value="-25.7410975534134">
                <text:p>-25.74109755341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8.67311121877144">
                <text:p>-8.67311121877144</text:p>
              </table:table-cell>
              <table:table-cell office:value-type="float" office:value="-25.5750720190566">
                <text:p>-25.57507201905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8.41798742214351">
                <text:p>-8.41798742214351</text:p>
              </table:table-cell>
              <table:table-cell office:value-type="float" office:value="-25.4117852637482">
                <text:p>-25.4117852637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8.17441127029563">
                <text:p>-8.17441127029563</text:p>
              </table:table-cell>
              <table:table-cell office:value-type="float" office:value="-25.2507795381415">
                <text:p>-25.25077953814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7.9414688282065">
                <text:p>-7.9414688282065</text:p>
              </table:table-cell>
              <table:table-cell office:value-type="float" office:value="-25.0916520218999">
                <text:p>-25.0916520218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7.71834373737741">
                <text:p>-7.71834373737741</text:p>
              </table:table-cell>
              <table:table-cell office:value-type="float" office:value="-24.9340456730442">
                <text:p>-24.93404567304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7.50430388437027">
                <text:p>-7.50430388437027</text:p>
              </table:table-cell>
              <table:table-cell office:value-type="float" office:value="-24.7776417783027">
                <text:p>-24.77764177830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7.29869025945055">
                <text:p>-7.29869025945055</text:p>
              </table:table-cell>
              <table:table-cell office:value-type="float" office:value="-24.6221538409952">
                <text:p>-24.62215384099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7.10090758761457">
                <text:p>-7.10090758761457</text:p>
              </table:table-cell>
              <table:table-cell office:value-type="float" office:value="-24.4673225287972">
                <text:p>-24.4673225287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6.91041640433172">
                <text:p>-6.91041640433172</text:p>
              </table:table-cell>
              <table:table-cell office:value-type="float" office:value="-24.3129114673316">
                <text:p>-24.31291146733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6.72672631685973">
                <text:p>-6.72672631685973</text:p>
              </table:table-cell>
              <table:table-cell office:value-type="float" office:value="-24.1587037131288">
                <text:p>-24.15870371312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6.54939024461648">
                <text:p>-6.54939024461648</text:p>
              </table:table-cell>
              <table:table-cell office:value-type="float" office:value="-24.004498775448">
                <text:p>-24.0044987754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6.37799947284741">
                <text:p>-6.37799947284741</text:p>
              </table:table-cell>
              <table:table-cell office:value-type="float" office:value="-23.8501100838263">
                <text:p>-23.85011008382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6.21217938564491">
                <text:p>-6.21217938564491</text:p>
              </table:table-cell>
              <table:table-cell office:value-type="float" office:value="-23.6953628192418">
                <text:p>-23.69536281924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6.05158576939944">
                <text:p>-6.05158576939944</text:p>
              </table:table-cell>
              <table:table-cell office:value-type="float" office:value="-23.5400920430262">
                <text:p>-23.54009204302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5.89590159758283">
                <text:p>-5.89590159758283</text:p>
              </table:table-cell>
              <table:table-cell office:value-type="float" office:value="-23.3841410703113">
                <text:p>-23.38414107031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5.74483422356695">
                <text:p>-5.74483422356695</text:p>
              </table:table-cell>
              <table:table-cell office:value-type="float" office:value="-23.2273600446995">
                <text:p>-23.2273600446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-5.59811292086011">
                <text:p>-5.59811292086011</text:p>
              </table:table-cell>
              <table:table-cell office:value-type="float" office:value="-23.0696046786452">
                <text:p>-23.06960467864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-5.45548672037662">
                <text:p>-5.45548672037662</text:p>
              </table:table-cell>
              <table:table-cell office:value-type="float" office:value="-22.9107351302023">
                <text:p>-22.91073513020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5.31672250265997">
                <text:p>-5.31672250265997</text:p>
              </table:table-cell>
              <table:table-cell office:value-type="float" office:value="-22.7506149916871">
                <text:p>-22.75061499168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5.1816033097568">
                <text:p>-5.1816033097568</text:p>
              </table:table-cell>
              <table:table-cell office:value-type="float" office:value="-22.5891103697017">
                <text:p>-22.58911036970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5.04992684699584">
                <text:p>-5.04992684699584</text:p>
              </table:table-cell>
              <table:table-cell office:value-type="float" office:value="-22.4260890390641">
                <text:p>-22.42608903906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-4.92150414950516">
                <text:p>-4.92150414950516</text:p>
              </table:table-cell>
              <table:table-cell office:value-type="float" office:value="-22.2614196556608">
                <text:p>-22.26141965566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-4.79615839209155">
                <text:p>-4.79615839209155</text:p>
              </table:table-cell>
              <table:table-cell office:value-type="float" office:value="-22.0949710151916">
                <text:p>-22.09497101519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-4.6737238242573">
                <text:p>-4.6737238242573</text:p>
              </table:table-cell>
              <table:table-cell office:value-type="float" office:value="-21.9266113463165">
                <text:p>-21.92661134631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-4.55404481476009">
                <text:p>-4.55404481476009</text:p>
              </table:table-cell>
              <table:table-cell office:value-type="float" office:value="-21.7562076278999">
                <text:p>-21.7562076278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-4.43697499232713">
                <text:p>-4.43697499232713</text:p>
              </table:table-cell>
              <table:table-cell office:value-type="float" office:value="-21.5836249209525">
                <text:p>-21.58362492095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-4.32237647098954">
                <text:p>-4.32237647098954</text:p>
              </table:table-cell>
              <table:table-cell office:value-type="float" office:value="-21.4087257065114">
                <text:p>-21.40872570651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-4.21011915006937">
                <text:p>-4.21011915006937</text:p>
              </table:table-cell>
              <table:table-cell office:value-type="float" office:value="-21.2313692211322">
                <text:p>-21.23136922113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-4.10008008017858">
                <text:p>-4.10008008017858</text:p>
              </table:table-cell>
              <table:table-cell office:value-type="float" office:value="-21.0514107818902">
                <text:p>-21.05141078189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-3.99214288771779">
                <text:p>-3.99214288771779</text:p>
              </table:table-cell>
              <table:table-cell office:value-type="float" office:value="-20.8687010928329">
                <text:p>-20.86870109283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-3.88619725132417">
                <text:p>-3.88619725132417</text:p>
              </table:table-cell>
              <table:table-cell office:value-type="float" office:value="-20.6830855246861">
                <text:p>-20.68308552468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-3.78213842454078">
                <text:p>-3.78213842454078</text:p>
              </table:table-cell>
              <table:table-cell office:value-type="float" office:value="-20.4944033593014">
                <text:p>-20.4944033593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-3.67986679968531">
                <text:p>-3.67986679968531</text:p>
              </table:table-cell>
              <table:table-cell office:value-type="float" office:value="-20.302486989829">
                <text:p>-20.3024869898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-3.57928750850321">
                <text:p>-3.57928750850321</text:p>
              </table:table-cell>
              <table:table-cell office:value-type="float" office:value="-20.1071610669015">
                <text:p>-20.1071610669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-3.48031005571337">
                <text:p>-3.48031005571337</text:p>
              </table:table-cell>
              <table:table-cell office:value-type="float" office:value="-19.908241580197">
                <text:p>-19.9082415801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-3.38284798200707">
                <text:p>-3.38284798200707</text:p>
              </table:table-cell>
              <table:table-cell office:value-type="float" office:value="-19.7055348635859">
                <text:p>-19.70553486358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-3.28681855345257">
                <text:p>-3.28681855345257</text:p>
              </table:table-cell>
              <table:table-cell office:value-type="float" office:value="-19.4988365106259">
                <text:p>-19.49883651062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-3.19214247459845">
                <text:p>-3.19214247459845</text:p>
              </table:table-cell>
              <table:table-cell office:value-type="float" office:value="-19.2879301853973">
                <text:p>-19.28793018539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-3.09874362286419">
                <text:p>-3.09874362286419</text:p>
              </table:table-cell>
              <table:table-cell office:value-type="float" office:value="-19.07258631151">
                <text:p>-19.072586311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-3.00654880206502">
                <text:p>-3.00654880206502</text:p>
              </table:table-cell>
              <table:table-cell office:value-type="float" office:value="-18.8525606194943">
                <text:p>-18.85256061949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-2.91548751314289">
                <text:p>-2.91548751314289</text:p>
              </table:table-cell>
              <table:table-cell office:value-type="float" office:value="-18.6275925295964">
                <text:p>-18.62759252959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-2.82549174037241">
                <text:p>-2.82549174037241</text:p>
              </table:table-cell>
              <table:table-cell office:value-type="float" office:value="-18.3974033431365">
                <text:p>-18.39740334313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-2.73649575148289">
                <text:p>-2.73649575148289</text:p>
              </table:table-cell>
              <table:table-cell office:value-type="float" office:value="-18.1616942108728">
                <text:p>-18.16169421087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-2.64843591028823">
                <text:p>-2.64843591028823</text:p>
              </table:table-cell>
              <table:table-cell office:value-type="float" office:value="-17.9201438410706">
                <text:p>-17.92014384107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-2.56125050054908">
                <text:p>-2.56125050054908</text:p>
              </table:table-cell>
              <table:table-cell office:value-type="float" office:value="-17.6724059029355">
                <text:p>-17.67240590293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-2.47487955990712">
                <text:p>-2.47487955990712</text:p>
              </table:table-cell>
              <table:table-cell office:value-type="float" office:value="-17.4181060724108">
                <text:p>-17.4181060724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-2.38926472283312">
                <text:p>-2.38926472283312</text:p>
              </table:table-cell>
              <table:table-cell office:value-type="float" office:value="-17.1568386566418">
                <text:p>-17.15683865664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-2.30434907161912">
                <text:p>-2.30434907161912</text:p>
              </table:table-cell>
              <table:table-cell office:value-type="float" office:value="-16.8881627201189">
                <text:p>-16.88816272011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-2.22007699452302">
                <text:p>-2.22007699452302</text:p>
              </table:table-cell>
              <table:table-cell office:value-type="float" office:value="-16.6115976189121">
                <text:p>-16.61159761891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-2.13639405024108">
                <text:p>-2.13639405024108</text:p>
              </table:table-cell>
              <table:table-cell office:value-type="float" office:value="-16.3266178285451">
                <text:p>-16.32661782854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-2.05324683794295">
                <text:p>-2.05324683794295</text:p>
              </table:table-cell>
              <table:table-cell office:value-type="float" office:value="-16.0326469246633">
                <text:p>-16.03264692466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-1.97058287215448">
                <text:p>-1.97058287215448</text:p>
              </table:table-cell>
              <table:table-cell office:value-type="float" office:value="-15.7290505420296">
                <text:p>-15.72905054202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-1.88835046181671">
                <text:p>-1.88835046181671</text:p>
              </table:table-cell>
              <table:table-cell office:value-type="float" office:value="-15.4151280942247">
                <text:p>-15.41512809422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-1.80649859288665">
                <text:p>-1.80649859288665</text:p>
              </table:table-cell>
              <table:table-cell office:value-type="float" office:value="-15.0901029805978">
                <text:p>-15.09010298059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-1.72497681387571">
                <text:p>-1.72497681387571</text:p>
              </table:table-cell>
              <table:table-cell office:value-type="float" office:value="-14.7531109341554">
                <text:p>-14.75311093415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-1.643735123747">
                <text:p>-1.643735123747</text:p>
              </table:table-cell>
              <table:table-cell office:value-type="float" office:value="-14.4031860681191">
                <text:p>-14.40318606811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-1.56272386161204">
                <text:p>-1.56272386161204</text:p>
              </table:table-cell>
              <table:table-cell office:value-type="float" office:value="-14.0392440512694">
                <text:p>-14.03924405126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-1.48189359768237">
                <text:p>-1.48189359768237</text:p>
              </table:table-cell>
              <table:table-cell office:value-type="float" office:value="-13.6600616706375">
                <text:p>-13.6600616706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-1.40119502494097">
                <text:p>-1.40119502494097</text:p>
              </table:table-cell>
              <table:table-cell office:value-type="float" office:value="-13.2642518068584">
                <text:p>-13.26425180685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-1.32057885100382">
                <text:p>-1.32057885100382</text:p>
              </table:table-cell>
              <table:table-cell office:value-type="float" office:value="-12.8502325263942">
                <text:p>-12.85023252639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-1.23999568964187">
                <text:p>-1.23999568964187</text:p>
              </table:table-cell>
              <table:table-cell office:value-type="float" office:value="-12.416188546816">
                <text:p>-12.416188546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-1.1593959514298">
                <text:p>-1.1593959514298</text:p>
              </table:table-cell>
              <table:table-cell office:value-type="float" office:value="-11.9600226970219">
                <text:p>-11.96002269702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-1.07872973297862">
                <text:p>-1.07872973297862</text:p>
              </table:table-cell>
              <table:table-cell office:value-type="float" office:value="-11.4792940817127">
                <text:p>-11.47929408171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-0.997946704195455">
                <text:p>-0.997946704195455</text:p>
              </table:table-cell>
              <table:table-cell office:value-type="float" office:value="-10.9711383233496">
                <text:p>-10.9711383233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-0.916995992994826">
                <text:p>-0.916995992994826</text:p>
              </table:table-cell>
              <table:table-cell office:value-type="float" office:value="-10.4321632603192">
                <text:p>-10.43216326031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-0.83582606686147">
                <text:p>-0.83582606686147</text:p>
              </table:table-cell>
              <table:table-cell office:value-type="float" office:value="-9.85831043805785">
                <text:p>-9.858310438057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-0.754384610634701">
                <text:p>-0.754384610634701</text:p>
              </table:table-cell>
              <table:table-cell office:value-type="float" office:value="-9.24466797778502">
                <text:p>-9.244667977785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-0.672618399848233">
                <text:p>-0.672618399848233</text:p>
              </table:table-cell>
              <table:table-cell office:value-type="float" office:value="-8.58521278142442">
                <text:p>-8.585212781424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-0.590473168916488">
                <text:p>-0.590473168916488</text:p>
              </table:table-cell>
              <table:table-cell office:value-type="float" office:value="-7.87244741479671">
                <text:p>-7.872447414796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-0.507893473408345">
                <text:p>-0.507893473408345</text:p>
              </table:table-cell>
              <table:table-cell office:value-type="float" office:value="-7.09687540046619">
                <text:p>-7.096875400466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-0.424822545590936">
                <text:p>-0.424822545590936</text:p>
              </table:table-cell>
              <table:table-cell office:value-type="float" office:value="-6.24622012147335">
                <text:p>-6.246220121473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-0.341202142358899">
                <text:p>-0.341202142358899</text:p>
              </table:table-cell>
              <table:table-cell office:value-type="float" office:value="-5.30422055274965">
                <text:p>-5.30422055274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-0.256972384587126">
                <text:p>-0.256972384587126</text:p>
              </table:table-cell>
              <table:table-cell office:value-type="float" office:value="-4.24869489790819">
                <text:p>-4.248694897908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-0.172071586856344">
                <text:p>-0.172071586856344</text:p>
              </table:table-cell>
              <table:table-cell office:value-type="float" office:value="-3.04826319164089">
                <text:p>-3.048263191640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-0.0864360763993932">
                <text:p>-0.0864360763993932</text:p>
              </table:table-cell>
              <table:table-cell office:value-type="float" office:value="-1.65643246911475">
                <text:p>-1.65643246911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ot_20__28_Rounded_29_" draw:display-name="Long Dot (Rounded)" draw:style="round" draw:dots1="1" draw:dots1-length="1%" draw:distance="399%"/>
  </office:styles>
</office:document-styles>
</file>