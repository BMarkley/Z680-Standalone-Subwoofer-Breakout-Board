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Wiper %</text:p>
          </table:table-cell>
          <table:table-cell table:style-name="ce2" office:value-type="string" calcext:value-type="string">
            <text:p>Old Parallel Resistance</text:p>
          </table:table-cell>
          <table:table-cell table:style-name="ce2" office:value-type="string" calcext:value-type="string">
            <text:p>New Parallel Resistance</text:p>
          </table:table-cell>
          <table:table-cell table:style-name="ce2" office:value-type="string" calcext:value-type="string">
            <text:p>Old Gain</text:p>
          </table:table-cell>
          <table:table-cell table:style-name="ce2" office:value-type="string" calcext:value-type="string">
            <text:p>New Gain</text:p>
          </table:table-cell>
          <table:table-cell table:style-name="ce2" office:value-type="string" calcext:value-type="string">
            <text:p>Old Resistor Value (kohm):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Slope</text:p>
          </table:table-cell>
          <table:table-cell table:style-name="ce4" table:formula="of:=([.D72]-[.D32])/4" office:value-type="float" office:value="1.25735608111579" calcext:value-type="float">
            <text:p>1.26</text:p>
          </table:table-cell>
          <table:table-cell table:style-name="ce5" office:value-type="string" calcext:value-type="string">
            <text:p>DB/10% @ Midran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>
            <text:p>New Resistor Value (kohm):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Slope</text:p>
          </table:table-cell>
          <table:table-cell table:style-name="ce4" table:formula="of:=([.E72]-[.E32])/4" office:value-type="float" office:value="1.83988392647297" calcext:value-type="float">
            <text:p>1.84</text:p>
          </table:table-cell>
          <table:table-cell table:style-name="ce5" office:value-type="string" calcext:value-type="string">
            <text:p>DB/10% @ Midrange</text:p>
          </table:table-cell>
        </table:table-row>
        <table:table-row table:style-name="ro1">
          <table:table-cell table:formula="of:=[.A2]+0.01" office:value-type="float" office:value="0.01" calcext:value-type="float">
            <text:p>0.01</text:p>
          </table:table-cell>
          <table:table-cell table:formula="of:=((10*(1-[.A3]))^-1+[.$G$1]^-1)^-1" office:value-type="float" office:value="4.9748743718593" calcext:value-type="float">
            <text:p>4.9748743718593</text:p>
          </table:table-cell>
          <table:table-cell table:formula="of:=((10*([.A3]))^-1+[.$G$2]^-1)^-1" office:value-type="float" office:value="0.099009900990099" calcext:value-type="float">
            <text:p>0.099009900990099</text:p>
          </table:table-cell>
          <table:table-cell table:formula="of:=20*LOG(10*[.A3]/(10*[.A3]+[.B3]);10)" office:value-type="float" office:value="-34.1085059158091" calcext:value-type="float">
            <text:p>-34.1085059158091</text:p>
          </table:table-cell>
          <table:table-cell table:formula="of:=20*LOG([.C3]/(10*(1-[.A3])+[.C3]);10)" office:value-type="float" office:value="-40.0855674440032" calcext:value-type="float">
            <text:p>-40.0855674440032</text:p>
          </table:table-cell>
          <table:table-cell table:number-columns-repeated="6"/>
        </table:table-row>
        <table:table-row table:style-name="ro1">
          <table:table-cell table:formula="of:=[.A3]+0.01" office:value-type="float" office:value="0.02" calcext:value-type="float">
            <text:p>0.02</text:p>
          </table:table-cell>
          <table:table-cell table:formula="of:=((10*(1-[.A4]))^-1+[.$G$1]^-1)^-1" office:value-type="float" office:value="4.94949494949495" calcext:value-type="float">
            <text:p>4.94949494949495</text:p>
          </table:table-cell>
          <table:table-cell table:formula="of:=((10*([.A4]))^-1+[.$G$2]^-1)^-1" office:value-type="float" office:value="0.196078431372549" calcext:value-type="float">
            <text:p>0.196078431372549</text:p>
          </table:table-cell>
          <table:table-cell table:formula="of:=20*LOG(10*[.A4]/(10*[.A4]+[.B4]);10)" office:value-type="float" office:value="-28.2146928174344" calcext:value-type="float">
            <text:p>-28.2146928174344</text:p>
          </table:table-cell>
          <table:table-cell table:formula="of:=20*LOG([.C4]/(10*(1-[.A4])+[.C4]);10)" office:value-type="float" office:value="-34.147996622665" calcext:value-type="float">
            <text:p>-34.147996622665</text:p>
          </table:table-cell>
          <table:table-cell table:number-columns-repeated="6"/>
        </table:table-row>
        <table:table-row table:style-name="ro1">
          <table:table-cell table:formula="of:=[.A4]+0.01" office:value-type="float" office:value="0.03" calcext:value-type="float">
            <text:p>0.03</text:p>
          </table:table-cell>
          <table:table-cell table:formula="of:=((10*(1-[.A5]))^-1+[.$G$1]^-1)^-1" office:value-type="float" office:value="4.9238578680203" calcext:value-type="float">
            <text:p>4.9238578680203</text:p>
          </table:table-cell>
          <table:table-cell table:formula="of:=((10*([.A5]))^-1+[.$G$2]^-1)^-1" office:value-type="float" office:value="0.29126213592233" calcext:value-type="float">
            <text:p>0.29126213592233</text:p>
          </table:table-cell>
          <table:table-cell table:formula="of:=20*LOG(10*[.A5]/(10*[.A5]+[.B5]);10)" office:value-type="float" office:value="-24.8174019463904" calcext:value-type="float">
            <text:p>-24.8174019463904</text:p>
          </table:table-cell>
          <table:table-cell table:formula="of:=20*LOG([.C5]/(10*(1-[.A5])+[.C5]);10)" office:value-type="float" office:value="-30.7067264696222" calcext:value-type="float">
            <text:p>-30.7067264696222</text:p>
          </table:table-cell>
          <table:table-cell table:number-columns-repeated="6"/>
        </table:table-row>
        <table:table-row table:style-name="ro1">
          <table:table-cell table:formula="of:=[.A5]+0.01" office:value-type="float" office:value="0.04" calcext:value-type="float">
            <text:p>0.04</text:p>
          </table:table-cell>
          <table:table-cell table:formula="of:=((10*(1-[.A6]))^-1+[.$G$1]^-1)^-1" office:value-type="float" office:value="4.89795918367347" calcext:value-type="float">
            <text:p>4.89795918367347</text:p>
          </table:table-cell>
          <table:table-cell table:formula="of:=((10*([.A6]))^-1+[.$G$2]^-1)^-1" office:value-type="float" office:value="0.384615384615385" calcext:value-type="float">
            <text:p>0.384615384615385</text:p>
          </table:table-cell>
          <table:table-cell table:formula="of:=20*LOG(10*[.A6]/(10*[.A6]+[.B6]);10)" office:value-type="float" office:value="-22.4409723354371" calcext:value-type="float">
            <text:p>-22.4409723354371</text:p>
          </table:table-cell>
          <table:table-cell table:formula="of:=20*LOG([.C6]/(10*(1-[.A6])+[.C6]);10)" office:value-type="float" office:value="-28.2860937625666" calcext:value-type="float">
            <text:p>-28.2860937625666</text:p>
          </table:table-cell>
          <table:table-cell table:number-columns-repeated="6"/>
        </table:table-row>
        <table:table-row table:style-name="ro1">
          <table:table-cell table:formula="of:=[.A6]+0.01" office:value-type="float" office:value="0.05" calcext:value-type="float">
            <text:p>0.05</text:p>
          </table:table-cell>
          <table:table-cell table:formula="of:=((10*(1-[.A7]))^-1+[.$G$1]^-1)^-1" office:value-type="float" office:value="4.87179487179487" calcext:value-type="float">
            <text:p>4.87179487179487</text:p>
          </table:table-cell>
          <table:table-cell table:formula="of:=((10*([.A7]))^-1+[.$G$2]^-1)^-1" office:value-type="float" office:value="0.476190476190476" calcext:value-type="float">
            <text:p>0.476190476190476</text:p>
          </table:table-cell>
          <table:table-cell table:formula="of:=20*LOG(10*[.A7]/(10*[.A7]+[.B7]);10)" office:value-type="float" office:value="-20.6229883187959" calcext:value-type="float">
            <text:p>-20.6229883187959</text:p>
          </table:table-cell>
          <table:table-cell table:formula="of:=20*LOG([.C7]/(10*(1-[.A7])+[.C7]);10)" office:value-type="float" office:value="-26.4236805460463" calcext:value-type="float">
            <text:p>-26.4236805460463</text:p>
          </table:table-cell>
          <table:table-cell>
            <draw:frame draw:z-index="0" draw:style-name="gr1" draw:text-style-name="P1" svg:width="27.604cm" svg:height="20.896cm" svg:x="1.679cm" svg:y="0.362cm">
              <draw:object draw:notify-on-update-of-ranges="Sheet1.A2:Sheet1.A101 Sheet1.D1:Sheet1.D1 Sheet1.D2:Sheet1.D101 Sheet1.A2:Sheet1.A101 Sheet1.E1:Sheet1.E1 Sheet1.E2:Sheet1.E10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[.A7]+0.01" office:value-type="float" office:value="0.06" calcext:value-type="float">
            <text:p>0.06</text:p>
          </table:table-cell>
          <table:table-cell table:formula="of:=((10*(1-[.A8]))^-1+[.$G$1]^-1)^-1" office:value-type="float" office:value="4.84536082474227" calcext:value-type="float">
            <text:p>4.84536082474227</text:p>
          </table:table-cell>
          <table:table-cell table:formula="of:=((10*([.A8]))^-1+[.$G$2]^-1)^-1" office:value-type="float" office:value="0.566037735849057" calcext:value-type="float">
            <text:p>0.566037735849057</text:p>
          </table:table-cell>
          <table:table-cell table:formula="of:=20*LOG(10*[.A8]/(10*[.A8]+[.B8]);10)" office:value-type="float" office:value="-19.1575082444203" calcext:value-type="float">
            <text:p>-19.1575082444203</text:p>
          </table:table-cell>
          <table:table-cell table:formula="of:=20*LOG([.C8]/(10*(1-[.A8])+[.C8]);10)" office:value-type="float" office:value="-24.9135428430249" calcext:value-type="float">
            <text:p>-24.9135428430249</text:p>
          </table:table-cell>
          <table:table-cell table:number-columns-repeated="6"/>
        </table:table-row>
        <table:table-row table:style-name="ro1">
          <table:table-cell table:formula="of:=[.A8]+0.01" office:value-type="float" office:value="0.07" calcext:value-type="float">
            <text:p>0.07</text:p>
          </table:table-cell>
          <table:table-cell table:formula="of:=((10*(1-[.A9]))^-1+[.$G$1]^-1)^-1" office:value-type="float" office:value="4.81865284974093" calcext:value-type="float">
            <text:p>4.81865284974093</text:p>
          </table:table-cell>
          <table:table-cell table:formula="of:=((10*([.A9]))^-1+[.$G$2]^-1)^-1" office:value-type="float" office:value="0.654205607476636" calcext:value-type="float">
            <text:p>0.654205607476636</text:p>
          </table:table-cell>
          <table:table-cell table:formula="of:=20*LOG(10*[.A9]/(10*[.A9]+[.B9]);10)" office:value-type="float" office:value="-17.9347007132588" calcext:value-type="float">
            <text:p>-17.9347007132588</text:p>
          </table:table-cell>
          <table:table-cell table:formula="of:=20*LOG([.C9]/(10*(1-[.A9])+[.C9]);10)" office:value-type="float" office:value="-23.6458468934142" calcext:value-type="float">
            <text:p>-23.6458468934142</text:p>
          </table:table-cell>
          <table:table-cell table:number-columns-repeated="6"/>
        </table:table-row>
        <table:table-row table:style-name="ro1">
          <table:table-cell table:formula="of:=[.A9]+0.01" office:value-type="float" office:value="0.08" calcext:value-type="float">
            <text:p>0.08</text:p>
          </table:table-cell>
          <table:table-cell table:formula="of:=((10*(1-[.A10]))^-1+[.$G$1]^-1)^-1" office:value-type="float" office:value="4.79166666666667" calcext:value-type="float">
            <text:p>4.79166666666667</text:p>
          </table:table-cell>
          <table:table-cell table:formula="of:=((10*([.A10]))^-1+[.$G$2]^-1)^-1" office:value-type="float" office:value="0.740740740740741" calcext:value-type="float">
            <text:p>0.740740740740741</text:p>
          </table:table-cell>
          <table:table-cell table:formula="of:=20*LOG(10*[.A10]/(10*[.A10]+[.B10]);10)" office:value-type="float" office:value="-16.8890257425885" calcext:value-type="float">
            <text:p>-16.8890257425885</text:p>
          </table:table-cell>
          <table:table-cell table:formula="of:=20*LOG([.C10]/(10*(1-[.A10])+[.C10]);10)" office:value-type="float" office:value="-22.5550503166595" calcext:value-type="float">
            <text:p>-22.5550503166595</text:p>
          </table:table-cell>
          <table:table-cell table:number-columns-repeated="6"/>
        </table:table-row>
        <table:table-row table:style-name="ro1">
          <table:table-cell table:formula="of:=[.A10]+0.01" office:value-type="float" office:value="0.09" calcext:value-type="float">
            <text:p>0.09</text:p>
          </table:table-cell>
          <table:table-cell table:formula="of:=((10*(1-[.A11]))^-1+[.$G$1]^-1)^-1" office:value-type="float" office:value="4.76439790575916" calcext:value-type="float">
            <text:p>4.76439790575916</text:p>
          </table:table-cell>
          <table:table-cell table:formula="of:=((10*([.A11]))^-1+[.$G$2]^-1)^-1" office:value-type="float" office:value="0.825688073394495" calcext:value-type="float">
            <text:p>0.825688073394495</text:p>
          </table:table-cell>
          <table:table-cell table:formula="of:=20*LOG(10*[.A11]/(10*[.A11]+[.B11]);10)" office:value-type="float" office:value="-15.978224882128" calcext:value-type="float">
            <text:p>-15.978224882128</text:p>
          </table:table-cell>
          <table:table-cell table:formula="of:=20*LOG([.C11]/(10*(1-[.A11])+[.C11]);10)" office:value-type="float" office:value="-21.5988922270826" calcext:value-type="float">
            <text:p>-21.5988922270826</text:p>
          </table:table-cell>
          <table:table-cell table:number-columns-repeated="6"/>
        </table:table-row>
        <table:table-row table:style-name="ro1">
          <table:table-cell table:formula="of:=[.A11]+0.01" office:value-type="float" office:value="0.1" calcext:value-type="float">
            <text:p>0.1</text:p>
          </table:table-cell>
          <table:table-cell table:formula="of:=((10*(1-[.A12]))^-1+[.$G$1]^-1)^-1" office:value-type="float" office:value="4.73684210526316" calcext:value-type="float">
            <text:p>4.73684210526316</text:p>
          </table:table-cell>
          <table:table-cell table:formula="of:=((10*([.A12]))^-1+[.$G$2]^-1)^-1" office:value-type="float" office:value="0.909090909090909" calcext:value-type="float">
            <text:p>0.909090909090909</text:p>
          </table:table-cell>
          <table:table-cell table:formula="of:=20*LOG(10*[.A12]/(10*[.A12]+[.B12]);10)" office:value-type="float" office:value="-15.1734579397559" calcext:value-type="float">
            <text:p>-15.1734579397559</text:p>
          </table:table-cell>
          <table:table-cell table:formula="of:=20*LOG([.C12]/(10*(1-[.A12])+[.C12]);10)" office:value-type="float" office:value="-20.7485299588125" calcext:value-type="float">
            <text:p>-20.7485299588125</text:p>
          </table:table-cell>
          <table:table-cell table:number-columns-repeated="6"/>
        </table:table-row>
        <table:table-row table:style-name="ro1">
          <table:table-cell table:formula="of:=[.A12]+0.01" office:value-type="float" office:value="0.11" calcext:value-type="float">
            <text:p>0.11</text:p>
          </table:table-cell>
          <table:table-cell table:formula="of:=((10*(1-[.A13]))^-1+[.$G$1]^-1)^-1" office:value-type="float" office:value="4.70899470899471" calcext:value-type="float">
            <text:p>4.70899470899471</text:p>
          </table:table-cell>
          <table:table-cell table:formula="of:=((10*([.A13]))^-1+[.$G$2]^-1)^-1" office:value-type="float" office:value="0.990990990990991" calcext:value-type="float">
            <text:p>0.990990990990991</text:p>
          </table:table-cell>
          <table:table-cell table:formula="of:=20*LOG(10*[.A13]/(10*[.A13]+[.B13]);10)" office:value-type="float" office:value="-14.4541659149969" calcext:value-type="float">
            <text:p>-14.4541659149969</text:p>
          </table:table-cell>
          <table:table-cell table:formula="of:=20*LOG([.C13]/(10*(1-[.A13])+[.C13]);10)" office:value-type="float" office:value="-19.9834019984617" calcext:value-type="float">
            <text:p>-19.9834019984617</text:p>
          </table:table-cell>
          <table:table-cell table:number-columns-repeated="6"/>
        </table:table-row>
        <table:table-row table:style-name="ro1">
          <table:table-cell table:formula="of:=[.A13]+0.01" office:value-type="float" office:value="0.12" calcext:value-type="float">
            <text:p>0.12</text:p>
          </table:table-cell>
          <table:table-cell table:formula="of:=((10*(1-[.A14]))^-1+[.$G$1]^-1)^-1" office:value-type="float" office:value="4.68085106382979" calcext:value-type="float">
            <text:p>4.68085106382979</text:p>
          </table:table-cell>
          <table:table-cell table:formula="of:=((10*([.A14]))^-1+[.$G$2]^-1)^-1" office:value-type="float" office:value="1.07142857142857" calcext:value-type="float">
            <text:p>1.07142857142857</text:p>
          </table:table-cell>
          <table:table-cell table:formula="of:=20*LOG(10*[.A14]/(10*[.A14]+[.B14]);10)" office:value-type="float" office:value="-13.8051786943764" calcext:value-type="float">
            <text:p>-13.8051786943764</text:p>
          </table:table-cell>
          <table:table-cell table:formula="of:=20*LOG([.C14]/(10*(1-[.A14])+[.C14]);10)" office:value-type="float" office:value="-19.28833567965" calcext:value-type="float">
            <text:p>-19.28833567965</text:p>
          </table:table-cell>
          <table:table-cell table:number-columns-repeated="6"/>
        </table:table-row>
        <table:table-row table:style-name="ro1">
          <table:table-cell table:formula="of:=[.A14]+0.01" office:value-type="float" office:value="0.13" calcext:value-type="float">
            <text:p>0.13</text:p>
          </table:table-cell>
          <table:table-cell table:formula="of:=((10*(1-[.A15]))^-1+[.$G$1]^-1)^-1" office:value-type="float" office:value="4.6524064171123" calcext:value-type="float">
            <text:p>4.6524064171123</text:p>
          </table:table-cell>
          <table:table-cell table:formula="of:=((10*([.A15]))^-1+[.$G$2]^-1)^-1" office:value-type="float" office:value="1.15044247787611" calcext:value-type="float">
            <text:p>1.15044247787611</text:p>
          </table:table-cell>
          <table:table-cell table:formula="of:=20*LOG(10*[.A15]/(10*[.A15]+[.B15]);10)" office:value-type="float" office:value="-13.2149844781527" calcext:value-type="float">
            <text:p>-13.2149844781527</text:p>
          </table:table-cell>
          <table:table-cell table:formula="of:=20*LOG([.C15]/(10*(1-[.A15])+[.C15]);10)" office:value-type="float" office:value="-18.6518166088827" calcext:value-type="float">
            <text:p>-18.6518166088827</text:p>
          </table:table-cell>
          <table:table-cell table:number-columns-repeated="6"/>
        </table:table-row>
        <table:table-row table:style-name="ro1">
          <table:table-cell table:formula="of:=[.A15]+0.01" office:value-type="float" office:value="0.14" calcext:value-type="float">
            <text:p>0.14</text:p>
          </table:table-cell>
          <table:table-cell table:formula="of:=((10*(1-[.A16]))^-1+[.$G$1]^-1)^-1" office:value-type="float" office:value="4.62365591397849" calcext:value-type="float">
            <text:p>4.62365591397849</text:p>
          </table:table-cell>
          <table:table-cell table:formula="of:=((10*([.A16]))^-1+[.$G$2]^-1)^-1" office:value-type="float" office:value="1.2280701754386" calcext:value-type="float">
            <text:p>1.2280701754386</text:p>
          </table:table-cell>
          <table:table-cell table:formula="of:=20*LOG(10*[.A16]/(10*[.A16]+[.B16]);10)" office:value-type="float" office:value="-12.6746424051075" calcext:value-type="float">
            <text:p>-12.6746424051075</text:p>
          </table:table-cell>
          <table:table-cell table:formula="of:=20*LOG([.C16]/(10*(1-[.A16])+[.C16]);10)" office:value-type="float" office:value="-18.0649012894658" calcext:value-type="float">
            <text:p>-18.0649012894658</text:p>
          </table:table-cell>
          <table:table-cell table:number-columns-repeated="6"/>
        </table:table-row>
        <table:table-row table:style-name="ro1">
          <table:table-cell table:formula="of:=[.A16]+0.01" office:value-type="float" office:value="0.15" calcext:value-type="float">
            <text:p>0.15</text:p>
          </table:table-cell>
          <table:table-cell table:formula="of:=((10*(1-[.A17]))^-1+[.$G$1]^-1)^-1" office:value-type="float" office:value="4.5945945945946" calcext:value-type="float">
            <text:p>4.5945945945946</text:p>
          </table:table-cell>
          <table:table-cell table:formula="of:=((10*([.A17]))^-1+[.$G$2]^-1)^-1" office:value-type="float" office:value="1.30434782608696" calcext:value-type="float">
            <text:p>1.30434782608696</text:p>
          </table:table-cell>
          <table:table-cell table:formula="of:=20*LOG(10*[.A17]/(10*[.A17]+[.B17]);10)" office:value-type="float" office:value="-12.1770712618261" calcext:value-type="float">
            <text:p>-12.1770712618261</text:p>
          </table:table-cell>
          <table:table-cell table:formula="of:=20*LOG([.C17]/(10*(1-[.A17])+[.C17]);10)" office:value-type="float" office:value="-17.5205058298863" calcext:value-type="float">
            <text:p>-17.5205058298863</text:p>
          </table:table-cell>
          <table:table-cell table:number-columns-repeated="6"/>
        </table:table-row>
        <table:table-row table:style-name="ro1">
          <table:table-cell table:formula="of:=[.A17]+0.01" office:value-type="float" office:value="0.16" calcext:value-type="float">
            <text:p>0.16</text:p>
          </table:table-cell>
          <table:table-cell table:formula="of:=((10*(1-[.A18]))^-1+[.$G$1]^-1)^-1" office:value-type="float" office:value="4.56521739130435" calcext:value-type="float">
            <text:p>4.56521739130435</text:p>
          </table:table-cell>
          <table:table-cell table:formula="of:=((10*([.A18]))^-1+[.$G$2]^-1)^-1" office:value-type="float" office:value="1.37931034482759" calcext:value-type="float">
            <text:p>1.37931034482759</text:p>
          </table:table-cell>
          <table:table-cell table:formula="of:=20*LOG(10*[.A18]/(10*[.A18]+[.B18]);10)" office:value-type="float" office:value="-11.7165682434706" calcext:value-type="float">
            <text:p>-11.7165682434706</text:p>
          </table:table-cell>
          <table:table-cell table:formula="of:=20*LOG([.C18]/(10*(1-[.A18])+[.C18]);10)" office:value-type="float" office:value="-17.0129247036613" calcext:value-type="float">
            <text:p>-17.0129247036613</text:p>
          </table:table-cell>
          <table:table-cell table:number-columns-repeated="6"/>
        </table:table-row>
        <table:table-row table:style-name="ro1">
          <table:table-cell table:formula="of:=[.A18]+0.01" office:value-type="float" office:value="0.17" calcext:value-type="float">
            <text:p>0.17</text:p>
          </table:table-cell>
          <table:table-cell table:formula="of:=((10*(1-[.A19]))^-1+[.$G$1]^-1)^-1" office:value-type="float" office:value="4.53551912568306" calcext:value-type="float">
            <text:p>4.53551912568306</text:p>
          </table:table-cell>
          <table:table-cell table:formula="of:=((10*([.A19]))^-1+[.$G$2]^-1)^-1" office:value-type="float" office:value="1.45299145299145" calcext:value-type="float">
            <text:p>1.45299145299145</text:p>
          </table:table-cell>
          <table:table-cell table:formula="of:=20*LOG(10*[.A19]/(10*[.A19]+[.B19]);10)" office:value-type="float" office:value="-11.2884738852116" calcext:value-type="float">
            <text:p>-11.2884738852116</text:p>
          </table:table-cell>
          <table:table-cell table:formula="of:=20*LOG([.C19]/(10*(1-[.A19])+[.C19]);10)" office:value-type="float" office:value="-16.5374956798202" calcext:value-type="float">
            <text:p>-16.5374956798202</text:p>
          </table:table-cell>
          <table:table-cell table:number-columns-repeated="6"/>
        </table:table-row>
        <table:table-row table:style-name="ro1">
          <table:table-cell table:formula="of:=[.A19]+0.01" office:value-type="float" office:value="0.18" calcext:value-type="float">
            <text:p>0.18</text:p>
          </table:table-cell>
          <table:table-cell table:formula="of:=((10*(1-[.A20]))^-1+[.$G$1]^-1)^-1" office:value-type="float" office:value="4.50549450549451" calcext:value-type="float">
            <text:p>4.50549450549451</text:p>
          </table:table-cell>
          <table:table-cell table:formula="of:=((10*([.A20]))^-1+[.$G$2]^-1)^-1" office:value-type="float" office:value="1.52542372881356" calcext:value-type="float">
            <text:p>1.52542372881356</text:p>
          </table:table-cell>
          <table:table-cell table:formula="of:=20*LOG(10*[.A20]/(10*[.A20]+[.B20]);10)" office:value-type="float" office:value="-10.8889329297116" calcext:value-type="float">
            <text:p>-10.8889329297116</text:p>
          </table:table-cell>
          <table:table-cell table:formula="of:=20*LOG([.C20]/(10*(1-[.A20])+[.C20]);10)" office:value-type="float" office:value="-16.0903606894131" calcext:value-type="float">
            <text:p>-16.0903606894131</text:p>
          </table:table-cell>
          <table:table-cell table:number-columns-repeated="6"/>
        </table:table-row>
        <table:table-row table:style-name="ro1">
          <table:table-cell table:formula="of:=[.A20]+0.01" office:value-type="float" office:value="0.19" calcext:value-type="float">
            <text:p>0.19</text:p>
          </table:table-cell>
          <table:table-cell table:formula="of:=((10*(1-[.A21]))^-1+[.$G$1]^-1)^-1" office:value-type="float" office:value="4.47513812154696" calcext:value-type="float">
            <text:p>4.47513812154696</text:p>
          </table:table-cell>
          <table:table-cell table:formula="of:=((10*([.A21]))^-1+[.$G$2]^-1)^-1" office:value-type="float" office:value="1.59663865546219" calcext:value-type="float">
            <text:p>1.59663865546219</text:p>
          </table:table-cell>
          <table:table-cell table:formula="of:=20*LOG(10*[.A21]/(10*[.A21]+[.B21]);10)" office:value-type="float" office:value="-10.5147199505954" calcext:value-type="float">
            <text:p>-10.5147199505954</text:p>
          </table:table-cell>
          <table:table-cell table:formula="of:=20*LOG([.C21]/(10*(1-[.A21])+[.C21]);10)" office:value-type="float" office:value="-15.6682914479791" calcext:value-type="float">
            <text:p>-15.6682914479791</text:p>
          </table:table-cell>
          <table:table-cell table:number-columns-repeated="6"/>
        </table:table-row>
        <table:table-row table:style-name="ro1">
          <table:table-cell table:formula="of:=[.A21]+0.01" office:value-type="float" office:value="0.2" calcext:value-type="float">
            <text:p>0.2</text:p>
          </table:table-cell>
          <table:table-cell table:formula="of:=((10*(1-[.A22]))^-1+[.$G$1]^-1)^-1" office:value-type="float" office:value="4.44444444444444" calcext:value-type="float">
            <text:p>4.44444444444444</text:p>
          </table:table-cell>
          <table:table-cell table:formula="of:=((10*([.A22]))^-1+[.$G$2]^-1)^-1" office:value-type="float" office:value="1.66666666666667" calcext:value-type="float">
            <text:p>1.66666666666667</text:p>
          </table:table-cell>
          <table:table-cell table:formula="of:=20*LOG(10*[.A22]/(10*[.A22]+[.B22]);10)" office:value-type="float" office:value="-10.1631097691926" calcext:value-type="float">
            <text:p>-10.1631097691926</text:p>
          </table:table-cell>
          <table:table-cell table:formula="of:=20*LOG([.C22]/(10*(1-[.A22])+[.C22]);10)" office:value-type="float" office:value="-15.2685598712587" calcext:value-type="float">
            <text:p>-15.2685598712587</text:p>
          </table:table-cell>
          <table:table-cell table:number-columns-repeated="6"/>
        </table:table-row>
        <table:table-row table:style-name="ro1">
          <table:table-cell table:formula="of:=[.A22]+0.01" office:value-type="float" office:value="0.21" calcext:value-type="float">
            <text:p>0.21</text:p>
          </table:table-cell>
          <table:table-cell table:formula="of:=((10*(1-[.A23]))^-1+[.$G$1]^-1)^-1" office:value-type="float" office:value="4.41340782122905" calcext:value-type="float">
            <text:p>4.41340782122905</text:p>
          </table:table-cell>
          <table:table-cell table:formula="of:=((10*([.A23]))^-1+[.$G$2]^-1)^-1" office:value-type="float" office:value="1.73553719008265" calcext:value-type="float">
            <text:p>1.73553719008265</text:p>
          </table:table-cell>
          <table:table-cell table:formula="of:=20*LOG(10*[.A23]/(10*[.A23]+[.B23]);10)" office:value-type="float" office:value="-9.83177953173729" calcext:value-type="float">
            <text:p>-9.83177953173729</text:p>
          </table:table-cell>
          <table:table-cell table:formula="of:=20*LOG([.C23]/(10*(1-[.A23])+[.C23]);10)" office:value-type="float" office:value="-14.8888401513352" calcext:value-type="float">
            <text:p>-14.8888401513352</text:p>
          </table:table-cell>
          <table:table-cell table:number-columns-repeated="6"/>
        </table:table-row>
        <table:table-row table:style-name="ro1">
          <table:table-cell table:formula="of:=[.A23]+0.01" office:value-type="float" office:value="0.22" calcext:value-type="float">
            <text:p>0.22</text:p>
          </table:table-cell>
          <table:table-cell table:formula="of:=((10*(1-[.A24]))^-1+[.$G$1]^-1)^-1" office:value-type="float" office:value="4.38202247191011" calcext:value-type="float">
            <text:p>4.38202247191011</text:p>
          </table:table-cell>
          <table:table-cell table:formula="of:=((10*([.A24]))^-1+[.$G$2]^-1)^-1" office:value-type="float" office:value="1.80327868852459" calcext:value-type="float">
            <text:p>1.80327868852459</text:p>
          </table:table-cell>
          <table:table-cell table:formula="of:=20*LOG(10*[.A24]/(10*[.A24]+[.B24]);10)" office:value-type="float" office:value="-9.51873359756921" calcext:value-type="float">
            <text:p>-9.51873359756921</text:p>
          </table:table-cell>
          <table:table-cell table:formula="of:=20*LOG([.C24]/(10*(1-[.A24])+[.C24]);10)" office:value-type="float" office:value="-14.5271336437471" calcext:value-type="float">
            <text:p>-14.5271336437471</text:p>
          </table:table-cell>
          <table:table-cell table:number-columns-repeated="6"/>
        </table:table-row>
        <table:table-row table:style-name="ro1">
          <table:table-cell table:formula="of:=[.A24]+0.01" office:value-type="float" office:value="0.23" calcext:value-type="float">
            <text:p>0.23</text:p>
          </table:table-cell>
          <table:table-cell table:formula="of:=((10*(1-[.A25]))^-1+[.$G$1]^-1)^-1" office:value-type="float" office:value="4.35028248587571" calcext:value-type="float">
            <text:p>4.35028248587571</text:p>
          </table:table-cell>
          <table:table-cell table:formula="of:=((10*([.A25]))^-1+[.$G$2]^-1)^-1" office:value-type="float" office:value="1.86991869918699" calcext:value-type="float">
            <text:p>1.86991869918699</text:p>
          </table:table-cell>
          <table:table-cell table:formula="of:=20*LOG(10*[.A25]/(10*[.A25]+[.B25]);10)" office:value-type="float" office:value="-9.22224514646632" calcext:value-type="float">
            <text:p>-9.22224514646632</text:p>
          </table:table-cell>
          <table:table-cell table:formula="of:=20*LOG([.C25]/(10*(1-[.A25])+[.C25]);10)" office:value-type="float" office:value="-14.1817104737024" calcext:value-type="float">
            <text:p>-14.1817104737024</text:p>
          </table:table-cell>
          <table:table-cell table:number-columns-repeated="6"/>
        </table:table-row>
        <table:table-row table:style-name="ro1">
          <table:table-cell table:formula="of:=[.A25]+0.01" office:value-type="float" office:value="0.24" calcext:value-type="float">
            <text:p>0.24</text:p>
          </table:table-cell>
          <table:table-cell table:formula="of:=((10*(1-[.A26]))^-1+[.$G$1]^-1)^-1" office:value-type="float" office:value="4.31818181818182" calcext:value-type="float">
            <text:p>4.31818181818182</text:p>
          </table:table-cell>
          <table:table-cell table:formula="of:=((10*([.A26]))^-1+[.$G$2]^-1)^-1" office:value-type="float" office:value="1.93548387096774" calcext:value-type="float">
            <text:p>1.93548387096774</text:p>
          </table:table-cell>
          <table:table-cell table:formula="of:=20*LOG(10*[.A26]/(10*[.A26]+[.B26]);10)" office:value-type="float" office:value="-8.94081023049989" calcext:value-type="float">
            <text:p>-8.94081023049989</text:p>
          </table:table-cell>
          <table:table-cell table:formula="of:=20*LOG([.C26]/(10*(1-[.A26])+[.C26]);10)" office:value-type="float" office:value="-13.8510635867829" calcext:value-type="float">
            <text:p>-13.8510635867829</text:p>
          </table:table-cell>
          <table:table-cell table:number-columns-repeated="6"/>
        </table:table-row>
        <table:table-row table:style-name="ro1">
          <table:table-cell table:formula="of:=[.A26]+0.01" office:value-type="float" office:value="0.25" calcext:value-type="float">
            <text:p>0.25</text:p>
          </table:table-cell>
          <table:table-cell table:formula="of:=((10*(1-[.A27]))^-1+[.$G$1]^-1)^-1" office:value-type="float" office:value="4.28571428571429" calcext:value-type="float">
            <text:p>4.28571428571429</text:p>
          </table:table-cell>
          <table:table-cell table:formula="of:=((10*([.A27]))^-1+[.$G$2]^-1)^-1" office:value-type="float" office:value="2" calcext:value-type="float">
            <text:p>2</text:p>
          </table:table-cell>
          <table:table-cell table:formula="of:=20*LOG(10*[.A27]/(10*[.A27]+[.B27]);10)" office:value-type="float" office:value="-8.67311121877144" calcext:value-type="float">
            <text:p>-8.67311121877144</text:p>
          </table:table-cell>
          <table:table-cell table:formula="of:=20*LOG([.C27]/(10*(1-[.A27])+[.C27]);10)" office:value-type="float" office:value="-13.5338721924973" calcext:value-type="float">
            <text:p>-13.5338721924973</text:p>
          </table:table-cell>
          <table:table-cell table:number-columns-repeated="6"/>
        </table:table-row>
        <table:table-row table:style-name="ro1">
          <table:table-cell table:formula="of:=[.A27]+0.01" office:value-type="float" office:value="0.26" calcext:value-type="float">
            <text:p>0.26</text:p>
          </table:table-cell>
          <table:table-cell table:formula="of:=((10*(1-[.A28]))^-1+[.$G$1]^-1)^-1" office:value-type="float" office:value="4.25287356321839" calcext:value-type="float">
            <text:p>4.25287356321839</text:p>
          </table:table-cell>
          <table:table-cell table:formula="of:=((10*([.A28]))^-1+[.$G$2]^-1)^-1" office:value-type="float" office:value="2.06349206349206" calcext:value-type="float">
            <text:p>2.06349206349206</text:p>
          </table:table-cell>
          <table:table-cell table:formula="of:=20*LOG(10*[.A28]/(10*[.A28]+[.B28]);10)" office:value-type="float" office:value="-8.41798742214351" calcext:value-type="float">
            <text:p>-8.41798742214351</text:p>
          </table:table-cell>
          <table:table-cell table:formula="of:=20*LOG([.C28]/(10*(1-[.A28])+[.C28]);10)" office:value-type="float" office:value="-13.2289723877955" calcext:value-type="float">
            <text:p>-13.2289723877955</text:p>
          </table:table-cell>
          <table:table-cell table:number-columns-repeated="6"/>
        </table:table-row>
        <table:table-row table:style-name="ro1">
          <table:table-cell table:formula="of:=[.A28]+0.01" office:value-type="float" office:value="0.27" calcext:value-type="float">
            <text:p>0.27</text:p>
          </table:table-cell>
          <table:table-cell table:formula="of:=((10*(1-[.A29]))^-1+[.$G$1]^-1)^-1" office:value-type="float" office:value="4.21965317919075" calcext:value-type="float">
            <text:p>4.21965317919075</text:p>
          </table:table-cell>
          <table:table-cell table:formula="of:=((10*([.A29]))^-1+[.$G$2]^-1)^-1" office:value-type="float" office:value="2.1259842519685" calcext:value-type="float">
            <text:p>2.1259842519685</text:p>
          </table:table-cell>
          <table:table-cell table:formula="of:=20*LOG(10*[.A29]/(10*[.A29]+[.B29]);10)" office:value-type="float" office:value="-8.17441127029563" calcext:value-type="float">
            <text:p>-8.17441127029563</text:p>
          </table:table-cell>
          <table:table-cell table:formula="of:=20*LOG([.C29]/(10*(1-[.A29])+[.C29]);10)" office:value-type="float" office:value="-12.9353333328715" calcext:value-type="float">
            <text:p>-12.9353333328715</text:p>
          </table:table-cell>
          <table:table-cell table:number-columns-repeated="6"/>
        </table:table-row>
        <table:table-row table:style-name="ro1">
          <table:table-cell table:formula="of:=[.A29]+0.01" office:value-type="float" office:value="0.28" calcext:value-type="float">
            <text:p>0.28</text:p>
          </table:table-cell>
          <table:table-cell table:formula="of:=((10*(1-[.A30]))^-1+[.$G$1]^-1)^-1" office:value-type="float" office:value="4.18604651162791" calcext:value-type="float">
            <text:p>4.18604651162791</text:p>
          </table:table-cell>
          <table:table-cell table:formula="of:=((10*([.A30]))^-1+[.$G$2]^-1)^-1" office:value-type="float" office:value="2.1875" calcext:value-type="float">
            <text:p>2.1875</text:p>
          </table:table-cell>
          <table:table-cell table:formula="of:=20*LOG(10*[.A30]/(10*[.A30]+[.B30]);10)" office:value-type="float" office:value="-7.9414688282065" calcext:value-type="float">
            <text:p>-7.9414688282065</text:p>
          </table:table-cell>
          <table:table-cell table:formula="of:=20*LOG([.C30]/(10*(1-[.A30])+[.C30]);10)" office:value-type="float" office:value="-12.6520377663575" calcext:value-type="float">
            <text:p>-12.6520377663575</text:p>
          </table:table-cell>
          <table:table-cell table:number-columns-repeated="6"/>
        </table:table-row>
        <table:table-row table:style-name="ro1">
          <table:table-cell table:formula="of:=[.A30]+0.01" office:value-type="float" office:value="0.29" calcext:value-type="float">
            <text:p>0.29</text:p>
          </table:table-cell>
          <table:table-cell table:formula="of:=((10*(1-[.A31]))^-1+[.$G$1]^-1)^-1" office:value-type="float" office:value="4.15204678362573" calcext:value-type="float">
            <text:p>4.15204678362573</text:p>
          </table:table-cell>
          <table:table-cell table:formula="of:=((10*([.A31]))^-1+[.$G$2]^-1)^-1" office:value-type="float" office:value="2.24806201550388" calcext:value-type="float">
            <text:p>2.24806201550388</text:p>
          </table:table-cell>
          <table:table-cell table:formula="of:=20*LOG(10*[.A31]/(10*[.A31]+[.B31]);10)" office:value-type="float" office:value="-7.71834373737741" calcext:value-type="float">
            <text:p>-7.71834373737741</text:p>
          </table:table-cell>
          <table:table-cell table:formula="of:=20*LOG([.C31]/(10*(1-[.A31])+[.C31]);10)" office:value-type="float" office:value="-12.3782659452205" calcext:value-type="float">
            <text:p>-12.3782659452205</text:p>
          </table:table-cell>
          <table:table-cell table:number-columns-repeated="6"/>
        </table:table-row>
        <table:table-row table:style-name="ro1">
          <table:table-cell table:formula="of:=[.A31]+0.01" office:value-type="float" office:value="0.3" calcext:value-type="float">
            <text:p>0.3</text:p>
          </table:table-cell>
          <table:table-cell table:formula="of:=((10*(1-[.A32]))^-1+[.$G$1]^-1)^-1" office:value-type="float" office:value="4.11764705882353" calcext:value-type="float">
            <text:p>4.11764705882353</text:p>
          </table:table-cell>
          <table:table-cell table:formula="of:=((10*([.A32]))^-1+[.$G$2]^-1)^-1" office:value-type="float" office:value="2.30769230769231" calcext:value-type="float">
            <text:p>2.30769230769231</text:p>
          </table:table-cell>
          <table:table-cell table:formula="of:=20*LOG(10*[.A32]/(10*[.A32]+[.B32]);10)" office:value-type="float" office:value="-7.50430388437027" calcext:value-type="float">
            <text:p>-7.50430388437027</text:p>
          </table:table-cell>
          <table:table-cell table:formula="of:=20*LOG([.C32]/(10*(1-[.A32])+[.C32]);10)" office:value-type="float" office:value="-12.1132823119357" calcext:value-type="float">
            <text:p>-12.1132823119357</text:p>
          </table:table-cell>
          <table:table-cell table:number-columns-repeated="6"/>
        </table:table-row>
        <table:table-row table:style-name="ro1">
          <table:table-cell table:formula="of:=[.A32]+0.01" office:value-type="float" office:value="0.31" calcext:value-type="float">
            <text:p>0.31</text:p>
          </table:table-cell>
          <table:table-cell table:formula="of:=((10*(1-[.A33]))^-1+[.$G$1]^-1)^-1" office:value-type="float" office:value="4.08284023668639" calcext:value-type="float">
            <text:p>4.08284023668639</text:p>
          </table:table-cell>
          <table:table-cell table:formula="of:=((10*([.A33]))^-1+[.$G$2]^-1)^-1" office:value-type="float" office:value="2.36641221374046" calcext:value-type="float">
            <text:p>2.36641221374046</text:p>
          </table:table-cell>
          <table:table-cell table:formula="of:=20*LOG(10*[.A33]/(10*[.A33]+[.B33]);10)" office:value-type="float" office:value="-7.29869025945055" calcext:value-type="float">
            <text:p>-7.29869025945055</text:p>
          </table:table-cell>
          <table:table-cell table:formula="of:=20*LOG([.C33]/(10*(1-[.A33])+[.C33]);10)" office:value-type="float" office:value="-11.856424351724" calcext:value-type="float">
            <text:p>-11.856424351724</text:p>
          </table:table-cell>
          <table:table-cell table:number-columns-repeated="6"/>
        </table:table-row>
        <table:table-row table:style-name="ro1">
          <table:table-cell table:formula="of:=[.A33]+0.01" office:value-type="float" office:value="0.32" calcext:value-type="float">
            <text:p>0.32</text:p>
          </table:table-cell>
          <table:table-cell table:formula="of:=((10*(1-[.A34]))^-1+[.$G$1]^-1)^-1" office:value-type="float" office:value="4.04761904761905" calcext:value-type="float">
            <text:p>4.04761904761905</text:p>
          </table:table-cell>
          <table:table-cell table:formula="of:=((10*([.A34]))^-1+[.$G$2]^-1)^-1" office:value-type="float" office:value="2.42424242424243" calcext:value-type="float">
            <text:p>2.42424242424243</text:p>
          </table:table-cell>
          <table:table-cell table:formula="of:=20*LOG(10*[.A34]/(10*[.A34]+[.B34]);10)" office:value-type="float" office:value="-7.10090758761457" calcext:value-type="float">
            <text:p>-7.10090758761457</text:p>
          </table:table-cell>
          <table:table-cell table:formula="of:=20*LOG([.C34]/(10*(1-[.A34])+[.C34]);10)" office:value-type="float" office:value="-11.6070932221318" calcext:value-type="float">
            <text:p>-11.6070932221318</text:p>
          </table:table-cell>
          <table:table-cell table:number-columns-repeated="6"/>
        </table:table-row>
        <table:table-row table:style-name="ro1">
          <table:table-cell table:formula="of:=[.A34]+0.01" office:value-type="float" office:value="0.33" calcext:value-type="float">
            <text:p>0.33</text:p>
          </table:table-cell>
          <table:table-cell table:formula="of:=((10*(1-[.A35]))^-1+[.$G$1]^-1)^-1" office:value-type="float" office:value="4.01197604790419" calcext:value-type="float">
            <text:p>4.01197604790419</text:p>
          </table:table-cell>
          <table:table-cell table:formula="of:=((10*([.A35]))^-1+[.$G$2]^-1)^-1" office:value-type="float" office:value="2.4812030075188" calcext:value-type="float">
            <text:p>2.4812030075188</text:p>
          </table:table-cell>
          <table:table-cell table:formula="of:=20*LOG(10*[.A35]/(10*[.A35]+[.B35]);10)" office:value-type="float" office:value="-6.91041640433172" calcext:value-type="float">
            <text:p>-6.91041640433172</text:p>
          </table:table-cell>
          <table:table-cell table:formula="of:=20*LOG([.C35]/(10*(1-[.A35])+[.C35]);10)" office:value-type="float" office:value="-11.3647458272834" calcext:value-type="float">
            <text:p>-11.3647458272834</text:p>
          </table:table-cell>
          <table:table-cell table:number-columns-repeated="6"/>
        </table:table-row>
        <table:table-row table:style-name="ro1">
          <table:table-cell table:formula="of:=[.A35]+0.01" office:value-type="float" office:value="0.34" calcext:value-type="float">
            <text:p>0.34</text:p>
          </table:table-cell>
          <table:table-cell table:formula="of:=((10*(1-[.A36]))^-1+[.$G$1]^-1)^-1" office:value-type="float" office:value="3.97590361445783" calcext:value-type="float">
            <text:p>3.97590361445783</text:p>
          </table:table-cell>
          <table:table-cell table:formula="of:=((10*([.A36]))^-1+[.$G$2]^-1)^-1" office:value-type="float" office:value="2.53731343283582" calcext:value-type="float">
            <text:p>2.53731343283582</text:p>
          </table:table-cell>
          <table:table-cell table:formula="of:=20*LOG(10*[.A36]/(10*[.A36]+[.B36]);10)" office:value-type="float" office:value="-6.72672631685973" calcext:value-type="float">
            <text:p>-6.72672631685973</text:p>
          </table:table-cell>
          <table:table-cell table:formula="of:=20*LOG([.C36]/(10*(1-[.A36])+[.C36]);10)" office:value-type="float" office:value="-11.1288880776608" calcext:value-type="float">
            <text:p>-11.1288880776608</text:p>
          </table:table-cell>
          <table:table-cell table:number-columns-repeated="6"/>
        </table:table-row>
        <table:table-row table:style-name="ro1">
          <table:table-cell table:formula="of:=[.A36]+0.01" office:value-type="float" office:value="0.35" calcext:value-type="float">
            <text:p>0.35</text:p>
          </table:table-cell>
          <table:table-cell table:formula="of:=((10*(1-[.A37]))^-1+[.$G$1]^-1)^-1" office:value-type="float" office:value="3.93939393939394" calcext:value-type="float">
            <text:p>3.93939393939394</text:p>
          </table:table-cell>
          <table:table-cell table:formula="of:=((10*([.A37]))^-1+[.$G$2]^-1)^-1" office:value-type="float" office:value="2.59259259259259" calcext:value-type="float">
            <text:p>2.59259259259259</text:p>
          </table:table-cell>
          <table:table-cell table:formula="of:=20*LOG(10*[.A37]/(10*[.A37]+[.B37]);10)" office:value-type="float" office:value="-6.54939024461648" calcext:value-type="float">
            <text:p>-6.54939024461648</text:p>
          </table:table-cell>
          <table:table-cell table:formula="of:=20*LOG([.C37]/(10*(1-[.A37])+[.C37]);10)" office:value-type="float" office:value="-10.8990691288946" calcext:value-type="float">
            <text:p>-10.8990691288946</text:p>
          </table:table-cell>
          <table:table-cell table:number-columns-repeated="6"/>
        </table:table-row>
        <table:table-row table:style-name="ro1">
          <table:table-cell table:formula="of:=[.A37]+0.01" office:value-type="float" office:value="0.36" calcext:value-type="float">
            <text:p>0.36</text:p>
          </table:table-cell>
          <table:table-cell table:formula="of:=((10*(1-[.A38]))^-1+[.$G$1]^-1)^-1" office:value-type="float" office:value="3.90243902439024" calcext:value-type="float">
            <text:p>3.90243902439024</text:p>
          </table:table-cell>
          <table:table-cell table:formula="of:=((10*([.A38]))^-1+[.$G$2]^-1)^-1" office:value-type="float" office:value="2.64705882352941" calcext:value-type="float">
            <text:p>2.64705882352941</text:p>
          </table:table-cell>
          <table:table-cell table:formula="of:=20*LOG(10*[.A38]/(10*[.A38]+[.B38]);10)" office:value-type="float" office:value="-6.37799947284741" calcext:value-type="float">
            <text:p>-6.37799947284741</text:p>
          </table:table-cell>
          <table:table-cell table:formula="of:=20*LOG([.C38]/(10*(1-[.A38])+[.C38]);10)" office:value-type="float" office:value="-10.6748764338014" calcext:value-type="float">
            <text:p>-10.6748764338014</text:p>
          </table:table-cell>
          <table:table-cell table:number-columns-repeated="6"/>
        </table:table-row>
        <table:table-row table:style-name="ro1">
          <table:table-cell table:formula="of:=[.A38]+0.01" office:value-type="float" office:value="0.37" calcext:value-type="float">
            <text:p>0.37</text:p>
          </table:table-cell>
          <table:table-cell table:formula="of:=((10*(1-[.A39]))^-1+[.$G$1]^-1)^-1" office:value-type="float" office:value="3.86503067484663" calcext:value-type="float">
            <text:p>3.86503067484663</text:p>
          </table:table-cell>
          <table:table-cell table:formula="of:=((10*([.A39]))^-1+[.$G$2]^-1)^-1" office:value-type="float" office:value="2.7007299270073" calcext:value-type="float">
            <text:p>2.7007299270073</text:p>
          </table:table-cell>
          <table:table-cell table:formula="of:=20*LOG(10*[.A39]/(10*[.A39]+[.B39]);10)" office:value-type="float" office:value="-6.21217938564491" calcext:value-type="float">
            <text:p>-6.21217938564491</text:p>
          </table:table-cell>
          <table:table-cell table:formula="of:=20*LOG([.C39]/(10*(1-[.A39])+[.C39]);10)" office:value-type="float" office:value="-10.4559314737241" calcext:value-type="float">
            <text:p>-10.4559314737241</text:p>
          </table:table-cell>
          <table:table-cell table:number-columns-repeated="6"/>
        </table:table-row>
        <table:table-row table:style-name="ro1">
          <table:table-cell table:formula="of:=[.A39]+0.01" office:value-type="float" office:value="0.38" calcext:value-type="float">
            <text:p>0.38</text:p>
          </table:table-cell>
          <table:table-cell table:formula="of:=((10*(1-[.A40]))^-1+[.$G$1]^-1)^-1" office:value-type="float" office:value="3.82716049382716" calcext:value-type="float">
            <text:p>3.82716049382716</text:p>
          </table:table-cell>
          <table:table-cell table:formula="of:=((10*([.A40]))^-1+[.$G$2]^-1)^-1" office:value-type="float" office:value="2.7536231884058" calcext:value-type="float">
            <text:p>2.7536231884058</text:p>
          </table:table-cell>
          <table:table-cell table:formula="of:=20*LOG(10*[.A40]/(10*[.A40]+[.B40]);10)" office:value-type="float" office:value="-6.05158576939944" calcext:value-type="float">
            <text:p>-6.05158576939944</text:p>
          </table:table-cell>
          <table:table-cell table:formula="of:=20*LOG([.C40]/(10*(1-[.A40])+[.C40]);10)" office:value-type="float" office:value="-10.2418860602521" calcext:value-type="float">
            <text:p>-10.2418860602521</text:p>
          </table:table-cell>
          <table:table-cell table:number-columns-repeated="6"/>
        </table:table-row>
        <table:table-row table:style-name="ro1">
          <table:table-cell table:formula="of:=[.A40]+0.01" office:value-type="float" office:value="0.39" calcext:value-type="float">
            <text:p>0.39</text:p>
          </table:table-cell>
          <table:table-cell table:formula="of:=((10*(1-[.A41]))^-1+[.$G$1]^-1)^-1" office:value-type="float" office:value="3.7888198757764" calcext:value-type="float">
            <text:p>3.7888198757764</text:p>
          </table:table-cell>
          <table:table-cell table:formula="of:=((10*([.A41]))^-1+[.$G$2]^-1)^-1" office:value-type="float" office:value="2.80575539568345" calcext:value-type="float">
            <text:p>2.80575539568345</text:p>
          </table:table-cell>
          <table:table-cell table:formula="of:=20*LOG(10*[.A41]/(10*[.A41]+[.B41]);10)" office:value-type="float" office:value="-5.89590159758283" calcext:value-type="float">
            <text:p>-5.89590159758283</text:p>
          </table:table-cell>
          <table:table-cell table:formula="of:=20*LOG([.C41]/(10*(1-[.A41])+[.C41]);10)" office:value-type="float" office:value="-10.0324191182198" calcext:value-type="float">
            <text:p>-10.0324191182198</text:p>
          </table:table-cell>
          <table:table-cell table:number-columns-repeated="6"/>
        </table:table-row>
        <table:table-row table:style-name="ro1">
          <table:table-cell table:formula="of:=[.A41]+0.01" office:value-type="float" office:value="0.4" calcext:value-type="float">
            <text:p>0.4</text:p>
          </table:table-cell>
          <table:table-cell table:formula="of:=((10*(1-[.A42]))^-1+[.$G$1]^-1)^-1" office:value-type="float" office:value="3.75" calcext:value-type="float">
            <text:p>3.75</text:p>
          </table:table-cell>
          <table:table-cell table:formula="of:=((10*([.A42]))^-1+[.$G$2]^-1)^-1" office:value-type="float" office:value="2.85714285714286" calcext:value-type="float">
            <text:p>2.85714285714286</text:p>
          </table:table-cell>
          <table:table-cell table:formula="of:=20*LOG(10*[.A42]/(10*[.A42]+[.B42]);10)" office:value-type="float" office:value="-5.74483422356695" calcext:value-type="float">
            <text:p>-5.74483422356695</text:p>
          </table:table-cell>
          <table:table-cell table:formula="of:=20*LOG([.C42]/(10*(1-[.A42])+[.C42]);10)" office:value-type="float" office:value="-9.82723387668545" calcext:value-type="float">
            <text:p>-9.82723387668545</text:p>
          </table:table-cell>
          <table:table-cell table:number-columns-repeated="6"/>
        </table:table-row>
        <table:table-row table:style-name="ro1">
          <table:table-cell table:formula="of:=[.A42]+0.01" office:value-type="float" office:value="0.41" calcext:value-type="float">
            <text:p>0.41</text:p>
          </table:table-cell>
          <table:table-cell table:formula="of:=((10*(1-[.A43]))^-1+[.$G$1]^-1)^-1" office:value-type="float" office:value="3.71069182389937" calcext:value-type="float">
            <text:p>3.71069182389937</text:p>
          </table:table-cell>
          <table:table-cell table:formula="of:=((10*([.A43]))^-1+[.$G$2]^-1)^-1" office:value-type="float" office:value="2.90780141843972" calcext:value-type="float">
            <text:p>2.90780141843972</text:p>
          </table:table-cell>
          <table:table-cell table:formula="of:=20*LOG(10*[.A43]/(10*[.A43]+[.B43]);10)" office:value-type="float" office:value="-5.59811292086011" calcext:value-type="float">
            <text:p>-5.59811292086011</text:p>
          </table:table-cell>
          <table:table-cell table:formula="of:=20*LOG([.C43]/(10*(1-[.A43])+[.C43]);10)" office:value-type="float" office:value="-9.62605540726914" calcext:value-type="float">
            <text:p>-9.62605540726914</text:p>
          </table:table-cell>
          <table:table-cell table:number-columns-repeated="6"/>
        </table:table-row>
        <table:table-row table:style-name="ro1">
          <table:table-cell table:formula="of:=[.A43]+0.01" office:value-type="float" office:value="0.42" calcext:value-type="float">
            <text:p>0.42</text:p>
          </table:table-cell>
          <table:table-cell table:formula="of:=((10*(1-[.A44]))^-1+[.$G$1]^-1)^-1" office:value-type="float" office:value="3.67088607594937" calcext:value-type="float">
            <text:p>3.67088607594937</text:p>
          </table:table-cell>
          <table:table-cell table:formula="of:=((10*([.A44]))^-1+[.$G$2]^-1)^-1" office:value-type="float" office:value="2.95774647887324" calcext:value-type="float">
            <text:p>2.95774647887324</text:p>
          </table:table-cell>
          <table:table-cell table:formula="of:=20*LOG(10*[.A44]/(10*[.A44]+[.B44]);10)" office:value-type="float" office:value="-5.45548672037662" calcext:value-type="float">
            <text:p>-5.45548672037662</text:p>
          </table:table-cell>
          <table:table-cell table:formula="of:=20*LOG([.C44]/(10*(1-[.A44])+[.C44]);10)" office:value-type="float" office:value="-9.42862845946507" calcext:value-type="float">
            <text:p>-9.42862845946507</text:p>
          </table:table-cell>
          <table:table-cell table:number-columns-repeated="6"/>
        </table:table-row>
        <table:table-row table:style-name="ro1">
          <table:table-cell table:formula="of:=[.A44]+0.01" office:value-type="float" office:value="0.43" calcext:value-type="float">
            <text:p>0.43</text:p>
          </table:table-cell>
          <table:table-cell table:formula="of:=((10*(1-[.A45]))^-1+[.$G$1]^-1)^-1" office:value-type="float" office:value="3.63057324840764" calcext:value-type="float">
            <text:p>3.63057324840764</text:p>
          </table:table-cell>
          <table:table-cell table:formula="of:=((10*([.A45]))^-1+[.$G$2]^-1)^-1" office:value-type="float" office:value="3.00699300699301" calcext:value-type="float">
            <text:p>3.00699300699301</text:p>
          </table:table-cell>
          <table:table-cell table:formula="of:=20*LOG(10*[.A45]/(10*[.A45]+[.B45]);10)" office:value-type="float" office:value="-5.31672250265997" calcext:value-type="float">
            <text:p>-5.31672250265997</text:p>
          </table:table-cell>
          <table:table-cell table:formula="of:=20*LOG([.C45]/(10*(1-[.A45])+[.C45]);10)" office:value-type="float" office:value="-9.23471555084464" calcext:value-type="float">
            <text:p>-9.23471555084464</text:p>
          </table:table-cell>
          <table:table-cell table:number-columns-repeated="6"/>
        </table:table-row>
        <table:table-row table:style-name="ro1">
          <table:table-cell table:formula="of:=[.A45]+0.01" office:value-type="float" office:value="0.44" calcext:value-type="float">
            <text:p>0.44</text:p>
          </table:table-cell>
          <table:table-cell table:formula="of:=((10*(1-[.A46]))^-1+[.$G$1]^-1)^-1" office:value-type="float" office:value="3.58974358974359" calcext:value-type="float">
            <text:p>3.58974358974359</text:p>
          </table:table-cell>
          <table:table-cell table:formula="of:=((10*([.A46]))^-1+[.$G$2]^-1)^-1" office:value-type="float" office:value="3.05555555555556" calcext:value-type="float">
            <text:p>3.05555555555556</text:p>
          </table:table-cell>
          <table:table-cell table:formula="of:=20*LOG(10*[.A46]/(10*[.A46]+[.B46]);10)" office:value-type="float" office:value="-5.1816033097568" calcext:value-type="float">
            <text:p>-5.1816033097568</text:p>
          </table:table-cell>
          <table:table-cell table:formula="of:=20*LOG([.C46]/(10*(1-[.A46])+[.C46]);10)" office:value-type="float" office:value="-9.04409527684603" calcext:value-type="float">
            <text:p>-9.04409527684603</text:p>
          </table:table-cell>
          <table:table-cell table:number-columns-repeated="6"/>
        </table:table-row>
        <table:table-row table:style-name="ro1">
          <table:table-cell table:formula="of:=[.A46]+0.01" office:value-type="float" office:value="0.45" calcext:value-type="float">
            <text:p>0.45</text:p>
          </table:table-cell>
          <table:table-cell table:formula="of:=((10*(1-[.A47]))^-1+[.$G$1]^-1)^-1" office:value-type="float" office:value="3.54838709677419" calcext:value-type="float">
            <text:p>3.54838709677419</text:p>
          </table:table-cell>
          <table:table-cell table:formula="of:=((10*([.A47]))^-1+[.$G$2]^-1)^-1" office:value-type="float" office:value="3.10344827586207" calcext:value-type="float">
            <text:p>3.10344827586207</text:p>
          </table:table-cell>
          <table:table-cell table:formula="of:=20*LOG(10*[.A47]/(10*[.A47]+[.B47]);10)" office:value-type="float" office:value="-5.04992684699584" calcext:value-type="float">
            <text:p>-5.04992684699584</text:p>
          </table:table-cell>
          <table:table-cell table:formula="of:=20*LOG([.C47]/(10*(1-[.A47])+[.C47]);10)" office:value-type="float" office:value="-8.85656081040167" calcext:value-type="float">
            <text:p>-8.85656081040167</text:p>
          </table:table-cell>
          <table:table-cell table:number-columns-repeated="6"/>
        </table:table-row>
        <table:table-row table:style-name="ro1">
          <table:table-cell table:formula="of:=[.A47]+0.01" office:value-type="float" office:value="0.46" calcext:value-type="float">
            <text:p>0.46</text:p>
          </table:table-cell>
          <table:table-cell table:formula="of:=((10*(1-[.A48]))^-1+[.$G$1]^-1)^-1" office:value-type="float" office:value="3.50649350649351" calcext:value-type="float">
            <text:p>3.50649350649351</text:p>
          </table:table-cell>
          <table:table-cell table:formula="of:=((10*([.A48]))^-1+[.$G$2]^-1)^-1" office:value-type="float" office:value="3.15068493150685" calcext:value-type="float">
            <text:p>3.15068493150685</text:p>
          </table:table-cell>
          <table:table-cell table:formula="of:=20*LOG(10*[.A48]/(10*[.A48]+[.B48]);10)" office:value-type="float" office:value="-4.92150414950516" calcext:value-type="float">
            <text:p>-4.92150414950516</text:p>
          </table:table-cell>
          <table:table-cell table:formula="of:=20*LOG([.C48]/(10*(1-[.A48])+[.C48]);10)" office:value-type="float" office:value="-8.67191856623442" calcext:value-type="float">
            <text:p>-8.67191856623442</text:p>
          </table:table-cell>
          <table:table-cell table:number-columns-repeated="6"/>
        </table:table-row>
        <table:table-row table:style-name="ro1">
          <table:table-cell table:formula="of:=[.A48]+0.01" office:value-type="float" office:value="0.47" calcext:value-type="float">
            <text:p>0.47</text:p>
          </table:table-cell>
          <table:table-cell table:formula="of:=((10*(1-[.A49]))^-1+[.$G$1]^-1)^-1" office:value-type="float" office:value="3.4640522875817" calcext:value-type="float">
            <text:p>3.4640522875817</text:p>
          </table:table-cell>
          <table:table-cell table:formula="of:=((10*([.A49]))^-1+[.$G$2]^-1)^-1" office:value-type="float" office:value="3.19727891156463" calcext:value-type="float">
            <text:p>3.19727891156463</text:p>
          </table:table-cell>
          <table:table-cell table:formula="of:=20*LOG(10*[.A49]/(10*[.A49]+[.B49]);10)" office:value-type="float" office:value="-4.79615839209155" calcext:value-type="float">
            <text:p>-4.79615839209155</text:p>
          </table:table-cell>
          <table:table-cell table:formula="of:=20*LOG([.C49]/(10*(1-[.A49])+[.C49]);10)" office:value-type="float" office:value="-8.48998700844352" calcext:value-type="float">
            <text:p>-8.48998700844352</text:p>
          </table:table-cell>
          <table:table-cell table:number-columns-repeated="6"/>
        </table:table-row>
        <table:table-row table:style-name="ro1">
          <table:table-cell table:formula="of:=[.A49]+0.01" office:value-type="float" office:value="0.48" calcext:value-type="float">
            <text:p>0.48</text:p>
          </table:table-cell>
          <table:table-cell table:formula="of:=((10*(1-[.A50]))^-1+[.$G$1]^-1)^-1" office:value-type="float" office:value="3.42105263157895" calcext:value-type="float">
            <text:p>3.42105263157895</text:p>
          </table:table-cell>
          <table:table-cell table:formula="of:=((10*([.A50]))^-1+[.$G$2]^-1)^-1" office:value-type="float" office:value="3.24324324324324" calcext:value-type="float">
            <text:p>3.24324324324324</text:p>
          </table:table-cell>
          <table:table-cell table:formula="of:=20*LOG(10*[.A50]/(10*[.A50]+[.B50]);10)" office:value-type="float" office:value="-4.6737238242573" calcext:value-type="float">
            <text:p>-4.6737238242573</text:p>
          </table:table-cell>
          <table:table-cell table:formula="of:=20*LOG([.C50]/(10*(1-[.A50])+[.C50]);10)" office:value-type="float" office:value="-8.31059558315275" calcext:value-type="float">
            <text:p>-8.31059558315275</text:p>
          </table:table-cell>
          <table:table-cell table:number-columns-repeated="6"/>
        </table:table-row>
        <table:table-row table:style-name="ro1">
          <table:table-cell table:formula="of:=[.A50]+0.01" office:value-type="float" office:value="0.49" calcext:value-type="float">
            <text:p>0.49</text:p>
          </table:table-cell>
          <table:table-cell table:formula="of:=((10*(1-[.A51]))^-1+[.$G$1]^-1)^-1" office:value-type="float" office:value="3.37748344370861" calcext:value-type="float">
            <text:p>3.37748344370861</text:p>
          </table:table-cell>
          <table:table-cell table:formula="of:=((10*([.A51]))^-1+[.$G$2]^-1)^-1" office:value-type="float" office:value="3.28859060402685" calcext:value-type="float">
            <text:p>3.28859060402685</text:p>
          </table:table-cell>
          <table:table-cell table:formula="of:=20*LOG(10*[.A51]/(10*[.A51]+[.B51]);10)" office:value-type="float" office:value="-4.55404481476009" calcext:value-type="float">
            <text:p>-4.55404481476009</text:p>
          </table:table-cell>
          <table:table-cell table:formula="of:=20*LOG([.C51]/(10*(1-[.A51])+[.C51]);10)" office:value-type="float" office:value="-8.13358376062348" calcext:value-type="float">
            <text:p>-8.13358376062348</text:p>
          </table:table-cell>
          <table:table-cell table:number-columns-repeated="6"/>
        </table:table-row>
        <table:table-row table:style-name="ro1">
          <table:table-cell table:formula="of:=[.A51]+0.01" office:value-type="float" office:value="0.5" calcext:value-type="float">
            <text:p>0.5</text:p>
          </table:table-cell>
          <table:table-cell table:formula="of:=((10*(1-[.A52]))^-1+[.$G$1]^-1)^-1" office:value-type="float" office:value="3.33333333333333" calcext:value-type="float">
            <text:p>3.33333333333333</text:p>
          </table:table-cell>
          <table:table-cell table:formula="of:=((10*([.A52]))^-1+[.$G$2]^-1)^-1" office:value-type="float" office:value="3.33333333333333" calcext:value-type="float">
            <text:p>3.33333333333333</text:p>
          </table:table-cell>
          <table:table-cell table:formula="of:=20*LOG(10*[.A52]/(10*[.A52]+[.B52]);10)" office:value-type="float" office:value="-4.43697499232713" calcext:value-type="float">
            <text:p>-4.43697499232713</text:p>
          </table:table-cell>
          <table:table-cell table:formula="of:=20*LOG([.C52]/(10*(1-[.A52])+[.C52]);10)" office:value-type="float" office:value="-7.95880017344075" calcext:value-type="float">
            <text:p>-7.95880017344075</text:p>
          </table:table-cell>
          <table:table-cell table:number-columns-repeated="6"/>
        </table:table-row>
        <table:table-row table:style-name="ro1">
          <table:table-cell table:formula="of:=[.A52]+0.01" office:value-type="float" office:value="0.51" calcext:value-type="float">
            <text:p>0.51</text:p>
          </table:table-cell>
          <table:table-cell table:formula="of:=((10*(1-[.A53]))^-1+[.$G$1]^-1)^-1" office:value-type="float" office:value="3.28859060402684" calcext:value-type="float">
            <text:p>3.28859060402684</text:p>
          </table:table-cell>
          <table:table-cell table:formula="of:=((10*([.A53]))^-1+[.$G$2]^-1)^-1" office:value-type="float" office:value="3.37748344370861" calcext:value-type="float">
            <text:p>3.37748344370861</text:p>
          </table:table-cell>
          <table:table-cell table:formula="of:=20*LOG(10*[.A53]/(10*[.A53]+[.B53]);10)" office:value-type="float" office:value="-4.32237647098954" calcext:value-type="float">
            <text:p>-4.32237647098954</text:p>
          </table:table-cell>
          <table:table-cell table:formula="of:=20*LOG([.C53]/(10*(1-[.A53])+[.C53]);10)" office:value-type="float" office:value="-7.78610183923502" calcext:value-type="float">
            <text:p>-7.78610183923502</text:p>
          </table:table-cell>
          <table:table-cell table:number-columns-repeated="6"/>
        </table:table-row>
        <table:table-row table:style-name="ro1">
          <table:table-cell table:formula="of:=[.A53]+0.01" office:value-type="float" office:value="0.52" calcext:value-type="float">
            <text:p>0.52</text:p>
          </table:table-cell>
          <table:table-cell table:formula="of:=((10*(1-[.A54]))^-1+[.$G$1]^-1)^-1" office:value-type="float" office:value="3.24324324324324" calcext:value-type="float">
            <text:p>3.24324324324324</text:p>
          </table:table-cell>
          <table:table-cell table:formula="of:=((10*([.A54]))^-1+[.$G$2]^-1)^-1" office:value-type="float" office:value="3.42105263157895" calcext:value-type="float">
            <text:p>3.42105263157895</text:p>
          </table:table-cell>
          <table:table-cell table:formula="of:=20*LOG(10*[.A54]/(10*[.A54]+[.B54]);10)" office:value-type="float" office:value="-4.21011915006937" calcext:value-type="float">
            <text:p>-4.21011915006937</text:p>
          </table:table-cell>
          <table:table-cell table:formula="of:=20*LOG([.C54]/(10*(1-[.A54])+[.C54]);10)" office:value-type="float" office:value="-7.61535345796851" calcext:value-type="float">
            <text:p>-7.61535345796851</text:p>
          </table:table-cell>
          <table:table-cell table:number-columns-repeated="6"/>
        </table:table-row>
        <table:table-row table:style-name="ro1">
          <table:table-cell table:formula="of:=[.A54]+0.01" office:value-type="float" office:value="0.53" calcext:value-type="float">
            <text:p>0.53</text:p>
          </table:table-cell>
          <table:table-cell table:formula="of:=((10*(1-[.A55]))^-1+[.$G$1]^-1)^-1" office:value-type="float" office:value="3.19727891156462" calcext:value-type="float">
            <text:p>3.19727891156462</text:p>
          </table:table-cell>
          <table:table-cell table:formula="of:=((10*([.A55]))^-1+[.$G$2]^-1)^-1" office:value-type="float" office:value="3.4640522875817" calcext:value-type="float">
            <text:p>3.4640522875817</text:p>
          </table:table-cell>
          <table:table-cell table:formula="of:=20*LOG(10*[.A55]/(10*[.A55]+[.B55]);10)" office:value-type="float" office:value="-4.10008008017858" calcext:value-type="float">
            <text:p>-4.10008008017858</text:p>
          </table:table-cell>
          <table:table-cell table:formula="of:=20*LOG([.C55]/(10*(1-[.A55])+[.C55]);10)" office:value-type="float" office:value="-7.44642677514209" calcext:value-type="float">
            <text:p>-7.44642677514209</text:p>
          </table:table-cell>
          <table:table-cell table:number-columns-repeated="6"/>
        </table:table-row>
        <table:table-row table:style-name="ro1">
          <table:table-cell table:formula="of:=[.A55]+0.01" office:value-type="float" office:value="0.54" calcext:value-type="float">
            <text:p>0.54</text:p>
          </table:table-cell>
          <table:table-cell table:formula="of:=((10*(1-[.A56]))^-1+[.$G$1]^-1)^-1" office:value-type="float" office:value="3.15068493150685" calcext:value-type="float">
            <text:p>3.15068493150685</text:p>
          </table:table-cell>
          <table:table-cell table:formula="of:=((10*([.A56]))^-1+[.$G$2]^-1)^-1" office:value-type="float" office:value="3.50649350649351" calcext:value-type="float">
            <text:p>3.50649350649351</text:p>
          </table:table-cell>
          <table:table-cell table:formula="of:=20*LOG(10*[.A56]/(10*[.A56]+[.B56]);10)" office:value-type="float" office:value="-3.99214288771779" calcext:value-type="float">
            <text:p>-3.99214288771779</text:p>
          </table:table-cell>
          <table:table-cell table:formula="of:=20*LOG([.C56]/(10*(1-[.A56])+[.C56]);10)" office:value-type="float" office:value="-7.27920000340653" calcext:value-type="float">
            <text:p>-7.27920000340653</text:p>
          </table:table-cell>
          <table:table-cell table:number-columns-repeated="6"/>
        </table:table-row>
        <table:table-row table:style-name="ro1">
          <table:table-cell table:formula="of:=[.A56]+0.01" office:value-type="float" office:value="0.55" calcext:value-type="float">
            <text:p>0.55</text:p>
          </table:table-cell>
          <table:table-cell table:formula="of:=((10*(1-[.A57]))^-1+[.$G$1]^-1)^-1" office:value-type="float" office:value="3.10344827586207" calcext:value-type="float">
            <text:p>3.10344827586207</text:p>
          </table:table-cell>
          <table:table-cell table:formula="of:=((10*([.A57]))^-1+[.$G$2]^-1)^-1" office:value-type="float" office:value="3.54838709677419" calcext:value-type="float">
            <text:p>3.54838709677419</text:p>
          </table:table-cell>
          <table:table-cell table:formula="of:=20*LOG(10*[.A57]/(10*[.A57]+[.B57]);10)" office:value-type="float" office:value="-3.88619725132417" calcext:value-type="float">
            <text:p>-3.88619725132417</text:p>
          </table:table-cell>
          <table:table-cell table:formula="of:=20*LOG([.C57]/(10*(1-[.A57])+[.C57]);10)" office:value-type="float" office:value="-7.11355729602367" calcext:value-type="float">
            <text:p>-7.11355729602367</text:p>
          </table:table-cell>
          <table:table-cell table:number-columns-repeated="6"/>
        </table:table-row>
        <table:table-row table:style-name="ro1">
          <table:table-cell table:formula="of:=[.A57]+0.01" office:value-type="float" office:value="0.56" calcext:value-type="float">
            <text:p>0.56</text:p>
          </table:table-cell>
          <table:table-cell table:formula="of:=((10*(1-[.A58]))^-1+[.$G$1]^-1)^-1" office:value-type="float" office:value="3.05555555555555" calcext:value-type="float">
            <text:p>3.05555555555555</text:p>
          </table:table-cell>
          <table:table-cell table:formula="of:=((10*([.A58]))^-1+[.$G$2]^-1)^-1" office:value-type="float" office:value="3.58974358974359" calcext:value-type="float">
            <text:p>3.58974358974359</text:p>
          </table:table-cell>
          <table:table-cell table:formula="of:=20*LOG(10*[.A58]/(10*[.A58]+[.B58]);10)" office:value-type="float" office:value="-3.78213842454078" calcext:value-type="float">
            <text:p>-3.78213842454078</text:p>
          </table:table-cell>
          <table:table-cell table:formula="of:=20*LOG([.C58]/(10*(1-[.A58])+[.C58]);10)" office:value-type="float" office:value="-6.94938826644577" calcext:value-type="float">
            <text:p>-6.94938826644577</text:p>
          </table:table-cell>
          <table:table-cell table:number-columns-repeated="6"/>
        </table:table-row>
        <table:table-row table:style-name="ro1">
          <table:table-cell table:formula="of:=[.A58]+0.01" office:value-type="float" office:value="0.57" calcext:value-type="float">
            <text:p>0.57</text:p>
          </table:table-cell>
          <table:table-cell table:formula="of:=((10*(1-[.A59]))^-1+[.$G$1]^-1)^-1" office:value-type="float" office:value="3.00699300699301" calcext:value-type="float">
            <text:p>3.00699300699301</text:p>
          </table:table-cell>
          <table:table-cell table:formula="of:=((10*([.A59]))^-1+[.$G$2]^-1)^-1" office:value-type="float" office:value="3.63057324840764" calcext:value-type="float">
            <text:p>3.63057324840764</text:p>
          </table:table-cell>
          <table:table-cell table:formula="of:=20*LOG(10*[.A59]/(10*[.A59]+[.B59]);10)" office:value-type="float" office:value="-3.67986679968531" calcext:value-type="float">
            <text:p>-3.67986679968531</text:p>
          </table:table-cell>
          <table:table-cell table:formula="of:=20*LOG([.C59]/(10*(1-[.A59])+[.C59]);10)" office:value-type="float" office:value="-6.78658754898654" calcext:value-type="float">
            <text:p>-6.78658754898654</text:p>
          </table:table-cell>
          <table:table-cell table:number-columns-repeated="6"/>
        </table:table-row>
        <table:table-row table:style-name="ro1">
          <table:table-cell table:formula="of:=[.A59]+0.01" office:value-type="float" office:value="0.58" calcext:value-type="float">
            <text:p>0.58</text:p>
          </table:table-cell>
          <table:table-cell table:formula="of:=((10*(1-[.A60]))^-1+[.$G$1]^-1)^-1" office:value-type="float" office:value="2.95774647887324" calcext:value-type="float">
            <text:p>2.95774647887324</text:p>
          </table:table-cell>
          <table:table-cell table:formula="of:=((10*([.A60]))^-1+[.$G$2]^-1)^-1" office:value-type="float" office:value="3.67088607594937" calcext:value-type="float">
            <text:p>3.67088607594937</text:p>
          </table:table-cell>
          <table:table-cell table:formula="of:=20*LOG(10*[.A60]/(10*[.A60]+[.B60]);10)" office:value-type="float" office:value="-3.57928750850321" calcext:value-type="float">
            <text:p>-3.57928750850321</text:p>
          </table:table-cell>
          <table:table-cell table:formula="of:=20*LOG([.C60]/(10*(1-[.A60])+[.C60]);10)" office:value-type="float" office:value="-6.62505439616433" calcext:value-type="float">
            <text:p>-6.62505439616433</text:p>
          </table:table-cell>
          <table:table-cell table:number-columns-repeated="6"/>
        </table:table-row>
        <table:table-row table:style-name="ro1">
          <table:table-cell table:formula="of:=[.A60]+0.01" office:value-type="float" office:value="0.59" calcext:value-type="float">
            <text:p>0.59</text:p>
          </table:table-cell>
          <table:table-cell table:formula="of:=((10*(1-[.A61]))^-1+[.$G$1]^-1)^-1" office:value-type="float" office:value="2.90780141843971" calcext:value-type="float">
            <text:p>2.90780141843971</text:p>
          </table:table-cell>
          <table:table-cell table:formula="of:=((10*([.A61]))^-1+[.$G$2]^-1)^-1" office:value-type="float" office:value="3.71069182389937" calcext:value-type="float">
            <text:p>3.71069182389937</text:p>
          </table:table-cell>
          <table:table-cell table:formula="of:=20*LOG(10*[.A61]/(10*[.A61]+[.B61]);10)" office:value-type="float" office:value="-3.48031005571337" calcext:value-type="float">
            <text:p>-3.48031005571337</text:p>
          </table:table-cell>
          <table:table-cell table:formula="of:=20*LOG([.C61]/(10*(1-[.A61])+[.C61]);10)" office:value-type="float" office:value="-6.46469230882097" calcext:value-type="float">
            <text:p>-6.46469230882097</text:p>
          </table:table-cell>
          <table:table-cell table:number-columns-repeated="6"/>
        </table:table-row>
        <table:table-row table:style-name="ro1">
          <table:table-cell table:formula="of:=[.A61]+0.01" office:value-type="float" office:value="0.6" calcext:value-type="float">
            <text:p>0.6</text:p>
          </table:table-cell>
          <table:table-cell table:formula="of:=((10*(1-[.A62]))^-1+[.$G$1]^-1)^-1" office:value-type="float" office:value="2.85714285714286" calcext:value-type="float">
            <text:p>2.85714285714286</text:p>
          </table:table-cell>
          <table:table-cell table:formula="of:=((10*([.A62]))^-1+[.$G$2]^-1)^-1" office:value-type="float" office:value="3.75" calcext:value-type="float">
            <text:p>3.75</text:p>
          </table:table-cell>
          <table:table-cell table:formula="of:=20*LOG(10*[.A62]/(10*[.A62]+[.B62]);10)" office:value-type="float" office:value="-3.38284798200707" calcext:value-type="float">
            <text:p>-3.38284798200707</text:p>
          </table:table-cell>
          <table:table-cell table:formula="of:=20*LOG([.C62]/(10*(1-[.A62])+[.C62]);10)" office:value-type="float" office:value="-6.30540869557182" calcext:value-type="float">
            <text:p>-6.30540869557182</text:p>
          </table:table-cell>
          <table:table-cell table:number-columns-repeated="6"/>
        </table:table-row>
        <table:table-row table:style-name="ro1">
          <table:table-cell table:formula="of:=[.A62]+0.01" office:value-type="float" office:value="0.61" calcext:value-type="float">
            <text:p>0.61</text:p>
          </table:table-cell>
          <table:table-cell table:formula="of:=((10*(1-[.A63]))^-1+[.$G$1]^-1)^-1" office:value-type="float" office:value="2.80575539568345" calcext:value-type="float">
            <text:p>2.80575539568345</text:p>
          </table:table-cell>
          <table:table-cell table:formula="of:=((10*([.A63]))^-1+[.$G$2]^-1)^-1" office:value-type="float" office:value="3.7888198757764" calcext:value-type="float">
            <text:p>3.7888198757764</text:p>
          </table:table-cell>
          <table:table-cell table:formula="of:=20*LOG(10*[.A63]/(10*[.A63]+[.B63]);10)" office:value-type="float" office:value="-3.28681855345257" calcext:value-type="float">
            <text:p>-3.28681855345257</text:p>
          </table:table-cell>
          <table:table-cell table:formula="of:=20*LOG([.C63]/(10*(1-[.A63])+[.C63]);10)" office:value-type="float" office:value="-6.14711455853447" calcext:value-type="float">
            <text:p>-6.14711455853447</text:p>
          </table:table-cell>
          <table:table-cell table:number-columns-repeated="6"/>
        </table:table-row>
        <table:table-row table:style-name="ro1">
          <table:table-cell table:formula="of:=[.A63]+0.01" office:value-type="float" office:value="0.62" calcext:value-type="float">
            <text:p>0.62</text:p>
          </table:table-cell>
          <table:table-cell table:formula="of:=((10*(1-[.A64]))^-1+[.$G$1]^-1)^-1" office:value-type="float" office:value="2.7536231884058" calcext:value-type="float">
            <text:p>2.7536231884058</text:p>
          </table:table-cell>
          <table:table-cell table:formula="of:=((10*([.A64]))^-1+[.$G$2]^-1)^-1" office:value-type="float" office:value="3.82716049382716" calcext:value-type="float">
            <text:p>3.82716049382716</text:p>
          </table:table-cell>
          <table:table-cell table:formula="of:=20*LOG(10*[.A64]/(10*[.A64]+[.B64]);10)" office:value-type="float" office:value="-3.19214247459845" calcext:value-type="float">
            <text:p>-3.19214247459845</text:p>
          </table:table-cell>
          <table:table-cell table:formula="of:=20*LOG([.C64]/(10*(1-[.A64])+[.C64]);10)" office:value-type="float" office:value="-5.98972420262318" calcext:value-type="float">
            <text:p>-5.98972420262318</text:p>
          </table:table-cell>
          <table:table-cell table:number-columns-repeated="6"/>
        </table:table-row>
        <table:table-row table:style-name="ro1">
          <table:table-cell table:formula="of:=[.A64]+0.01" office:value-type="float" office:value="0.63" calcext:value-type="float">
            <text:p>0.63</text:p>
          </table:table-cell>
          <table:table-cell table:formula="of:=((10*(1-[.A65]))^-1+[.$G$1]^-1)^-1" office:value-type="float" office:value="2.7007299270073" calcext:value-type="float">
            <text:p>2.7007299270073</text:p>
          </table:table-cell>
          <table:table-cell table:formula="of:=((10*([.A65]))^-1+[.$G$2]^-1)^-1" office:value-type="float" office:value="3.86503067484663" calcext:value-type="float">
            <text:p>3.86503067484663</text:p>
          </table:table-cell>
          <table:table-cell table:formula="of:=20*LOG(10*[.A65]/(10*[.A65]+[.B65]);10)" office:value-type="float" office:value="-3.09874362286419" calcext:value-type="float">
            <text:p>-3.09874362286419</text:p>
          </table:table-cell>
          <table:table-cell table:formula="of:=20*LOG([.C65]/(10*(1-[.A65])+[.C65]);10)" office:value-type="float" office:value="-5.83315496599232" calcext:value-type="float">
            <text:p>-5.83315496599232</text:p>
          </table:table-cell>
          <table:table-cell table:number-columns-repeated="6"/>
        </table:table-row>
        <table:table-row table:style-name="ro1">
          <table:table-cell table:formula="of:=[.A65]+0.01" office:value-type="float" office:value="0.64" calcext:value-type="float">
            <text:p>0.64</text:p>
          </table:table-cell>
          <table:table-cell table:formula="of:=((10*(1-[.A66]))^-1+[.$G$1]^-1)^-1" office:value-type="float" office:value="2.64705882352941" calcext:value-type="float">
            <text:p>2.64705882352941</text:p>
          </table:table-cell>
          <table:table-cell table:formula="of:=((10*([.A66]))^-1+[.$G$2]^-1)^-1" office:value-type="float" office:value="3.90243902439025" calcext:value-type="float">
            <text:p>3.90243902439025</text:p>
          </table:table-cell>
          <table:table-cell table:formula="of:=20*LOG(10*[.A66]/(10*[.A66]+[.B66]);10)" office:value-type="float" office:value="-3.00654880206502" calcext:value-type="float">
            <text:p>-3.00654880206502</text:p>
          </table:table-cell>
          <table:table-cell table:formula="of:=20*LOG([.C66]/(10*(1-[.A66])+[.C66]);10)" office:value-type="float" office:value="-5.67732696946937" calcext:value-type="float">
            <text:p>-5.67732696946937</text:p>
          </table:table-cell>
          <table:table-cell table:number-columns-repeated="6"/>
        </table:table-row>
        <table:table-row table:style-name="ro1">
          <table:table-cell table:formula="of:=[.A66]+0.01" office:value-type="float" office:value="0.65" calcext:value-type="float">
            <text:p>0.65</text:p>
          </table:table-cell>
          <table:table-cell table:formula="of:=((10*(1-[.A67]))^-1+[.$G$1]^-1)^-1" office:value-type="float" office:value="2.59259259259259" calcext:value-type="float">
            <text:p>2.59259259259259</text:p>
          </table:table-cell>
          <table:table-cell table:formula="of:=((10*([.A67]))^-1+[.$G$2]^-1)^-1" office:value-type="float" office:value="3.93939393939394" calcext:value-type="float">
            <text:p>3.93939393939394</text:p>
          </table:table-cell>
          <table:table-cell table:formula="of:=20*LOG(10*[.A67]/(10*[.A67]+[.B67]);10)" office:value-type="float" office:value="-2.91548751314289" calcext:value-type="float">
            <text:p>-2.91548751314289</text:p>
          </table:table-cell>
          <table:table-cell table:formula="of:=20*LOG([.C67]/(10*(1-[.A67])+[.C67]);10)" office:value-type="float" office:value="-5.52216288304301" calcext:value-type="float">
            <text:p>-5.52216288304301</text:p>
          </table:table-cell>
          <table:table-cell table:number-columns-repeated="6"/>
        </table:table-row>
        <table:table-row table:style-name="ro1">
          <table:table-cell table:formula="of:=[.A67]+0.01" office:value-type="float" office:value="0.66" calcext:value-type="float">
            <text:p>0.66</text:p>
          </table:table-cell>
          <table:table-cell table:formula="of:=((10*(1-[.A68]))^-1+[.$G$1]^-1)^-1" office:value-type="float" office:value="2.53731343283582" calcext:value-type="float">
            <text:p>2.53731343283582</text:p>
          </table:table-cell>
          <table:table-cell table:formula="of:=((10*([.A68]))^-1+[.$G$2]^-1)^-1" office:value-type="float" office:value="3.97590361445783" calcext:value-type="float">
            <text:p>3.97590361445783</text:p>
          </table:table-cell>
          <table:table-cell table:formula="of:=20*LOG(10*[.A68]/(10*[.A68]+[.B68]);10)" office:value-type="float" office:value="-2.82549174037241" calcext:value-type="float">
            <text:p>-2.82549174037241</text:p>
          </table:table-cell>
          <table:table-cell table:formula="of:=20*LOG([.C68]/(10*(1-[.A68])+[.C68]);10)" office:value-type="float" office:value="-5.36758770766856" calcext:value-type="float">
            <text:p>-5.36758770766856</text:p>
          </table:table-cell>
          <table:table-cell table:number-columns-repeated="6"/>
        </table:table-row>
        <table:table-row table:style-name="ro1">
          <table:table-cell table:formula="of:=[.A68]+0.01" office:value-type="float" office:value="0.67" calcext:value-type="float">
            <text:p>0.67</text:p>
          </table:table-cell>
          <table:table-cell table:formula="of:=((10*(1-[.A69]))^-1+[.$G$1]^-1)^-1" office:value-type="float" office:value="2.48120300751879" calcext:value-type="float">
            <text:p>2.48120300751879</text:p>
          </table:table-cell>
          <table:table-cell table:formula="of:=((10*([.A69]))^-1+[.$G$2]^-1)^-1" office:value-type="float" office:value="4.01197604790419" calcext:value-type="float">
            <text:p>4.01197604790419</text:p>
          </table:table-cell>
          <table:table-cell table:formula="of:=20*LOG(10*[.A69]/(10*[.A69]+[.B69]);10)" office:value-type="float" office:value="-2.73649575148289" calcext:value-type="float">
            <text:p>-2.73649575148289</text:p>
          </table:table-cell>
          <table:table-cell table:formula="of:=20*LOG([.C69]/(10*(1-[.A69])+[.C69]);10)" office:value-type="float" office:value="-5.2135285708246" calcext:value-type="float">
            <text:p>-5.2135285708246</text:p>
          </table:table-cell>
          <table:table-cell table:number-columns-repeated="6"/>
        </table:table-row>
        <table:table-row table:style-name="ro1">
          <table:table-cell table:formula="of:=[.A69]+0.01" office:value-type="float" office:value="0.68" calcext:value-type="float">
            <text:p>0.68</text:p>
          </table:table-cell>
          <table:table-cell table:formula="of:=((10*(1-[.A70]))^-1+[.$G$1]^-1)^-1" office:value-type="float" office:value="2.42424242424242" calcext:value-type="float">
            <text:p>2.42424242424242</text:p>
          </table:table-cell>
          <table:table-cell table:formula="of:=((10*([.A70]))^-1+[.$G$2]^-1)^-1" office:value-type="float" office:value="4.04761904761905" calcext:value-type="float">
            <text:p>4.04761904761905</text:p>
          </table:table-cell>
          <table:table-cell table:formula="of:=20*LOG(10*[.A70]/(10*[.A70]+[.B70]);10)" office:value-type="float" office:value="-2.64843591028823" calcext:value-type="float">
            <text:p>-2.64843591028823</text:p>
          </table:table-cell>
          <table:table-cell table:formula="of:=20*LOG([.C70]/(10*(1-[.A70])+[.C70]);10)" office:value-type="float" office:value="-5.05991453440522" calcext:value-type="float">
            <text:p>-5.05991453440522</text:p>
          </table:table-cell>
          <table:table-cell table:number-columns-repeated="6"/>
        </table:table-row>
        <table:table-row table:style-name="ro1">
          <table:table-cell table:formula="of:=[.A70]+0.01" office:value-type="float" office:value="0.69" calcext:value-type="float">
            <text:p>0.69</text:p>
          </table:table-cell>
          <table:table-cell table:formula="of:=((10*(1-[.A71]))^-1+[.$G$1]^-1)^-1" office:value-type="float" office:value="2.36641221374046" calcext:value-type="float">
            <text:p>2.36641221374046</text:p>
          </table:table-cell>
          <table:table-cell table:formula="of:=((10*([.A71]))^-1+[.$G$2]^-1)^-1" office:value-type="float" office:value="4.08284023668639" calcext:value-type="float">
            <text:p>4.08284023668639</text:p>
          </table:table-cell>
          <table:table-cell table:formula="of:=20*LOG(10*[.A71]/(10*[.A71]+[.B71]);10)" office:value-type="float" office:value="-2.56125050054908" calcext:value-type="float">
            <text:p>-2.56125050054908</text:p>
          </table:table-cell>
          <table:table-cell table:formula="of:=20*LOG([.C71]/(10*(1-[.A71])+[.C71]);10)" office:value-type="float" office:value="-4.90667641366436" calcext:value-type="float">
            <text:p>-4.90667641366436</text:p>
          </table:table-cell>
          <table:table-cell table:number-columns-repeated="6"/>
        </table:table-row>
        <table:table-row table:style-name="ro1">
          <table:table-cell table:formula="of:=[.A71]+0.01" office:value-type="float" office:value="0.7" calcext:value-type="float">
            <text:p>0.7</text:p>
          </table:table-cell>
          <table:table-cell table:formula="of:=((10*(1-[.A72]))^-1+[.$G$1]^-1)^-1" office:value-type="float" office:value="2.30769230769231" calcext:value-type="float">
            <text:p>2.30769230769231</text:p>
          </table:table-cell>
          <table:table-cell table:formula="of:=((10*([.A72]))^-1+[.$G$2]^-1)^-1" office:value-type="float" office:value="4.11764705882353" calcext:value-type="float">
            <text:p>4.11764705882353</text:p>
          </table:table-cell>
          <table:table-cell table:formula="of:=20*LOG(10*[.A72]/(10*[.A72]+[.B72]);10)" office:value-type="float" office:value="-2.47487955990712" calcext:value-type="float">
            <text:p>-2.47487955990712</text:p>
          </table:table-cell>
          <table:table-cell table:formula="of:=20*LOG([.C72]/(10*(1-[.A72])+[.C72]);10)" office:value-type="float" office:value="-4.75374660604386" calcext:value-type="float">
            <text:p>-4.75374660604386</text:p>
          </table:table-cell>
          <table:table-cell table:number-columns-repeated="6"/>
        </table:table-row>
        <table:table-row table:style-name="ro1">
          <table:table-cell table:formula="of:=[.A72]+0.01" office:value-type="float" office:value="0.71" calcext:value-type="float">
            <text:p>0.71</text:p>
          </table:table-cell>
          <table:table-cell table:formula="of:=((10*(1-[.A73]))^-1+[.$G$1]^-1)^-1" office:value-type="float" office:value="2.24806201550387" calcext:value-type="float">
            <text:p>2.24806201550387</text:p>
          </table:table-cell>
          <table:table-cell table:formula="of:=((10*([.A73]))^-1+[.$G$2]^-1)^-1" office:value-type="float" office:value="4.15204678362573" calcext:value-type="float">
            <text:p>4.15204678362573</text:p>
          </table:table-cell>
          <table:table-cell table:formula="of:=20*LOG(10*[.A73]/(10*[.A73]+[.B73]);10)" office:value-type="float" office:value="-2.38926472283312" calcext:value-type="float">
            <text:p>-2.38926472283312</text:p>
          </table:table-cell>
          <table:table-cell table:formula="of:=20*LOG([.C73]/(10*(1-[.A73])+[.C73]);10)" office:value-type="float" office:value="-4.6010589288181" calcext:value-type="float">
            <text:p>-4.6010589288181</text:p>
          </table:table-cell>
          <table:table-cell table:number-columns-repeated="6"/>
        </table:table-row>
        <table:table-row table:style-name="ro1">
          <table:table-cell table:formula="of:=[.A73]+0.01" office:value-type="float" office:value="0.72" calcext:value-type="float">
            <text:p>0.72</text:p>
          </table:table-cell>
          <table:table-cell table:formula="of:=((10*(1-[.A74]))^-1+[.$G$1]^-1)^-1" office:value-type="float" office:value="2.1875" calcext:value-type="float">
            <text:p>2.1875</text:p>
          </table:table-cell>
          <table:table-cell table:formula="of:=((10*([.A74]))^-1+[.$G$2]^-1)^-1" office:value-type="float" office:value="4.18604651162791" calcext:value-type="float">
            <text:p>4.18604651162791</text:p>
          </table:table-cell>
          <table:table-cell table:formula="of:=20*LOG(10*[.A74]/(10*[.A74]+[.B74]);10)" office:value-type="float" office:value="-2.30434907161912" calcext:value-type="float">
            <text:p>-2.30434907161912</text:p>
          </table:table-cell>
          <table:table-cell table:formula="of:=20*LOG([.C74]/(10*(1-[.A74])+[.C74]);10)" office:value-type="float" office:value="-4.44854846457649" calcext:value-type="float">
            <text:p>-4.44854846457649</text:p>
          </table:table-cell>
          <table:table-cell table:number-columns-repeated="6"/>
        </table:table-row>
        <table:table-row table:style-name="ro1">
          <table:table-cell table:formula="of:=[.A74]+0.01" office:value-type="float" office:value="0.73" calcext:value-type="float">
            <text:p>0.73</text:p>
          </table:table-cell>
          <table:table-cell table:formula="of:=((10*(1-[.A75]))^-1+[.$G$1]^-1)^-1" office:value-type="float" office:value="2.1259842519685" calcext:value-type="float">
            <text:p>2.1259842519685</text:p>
          </table:table-cell>
          <table:table-cell table:formula="of:=((10*([.A75]))^-1+[.$G$2]^-1)^-1" office:value-type="float" office:value="4.21965317919075" calcext:value-type="float">
            <text:p>4.21965317919075</text:p>
          </table:table-cell>
          <table:table-cell table:formula="of:=20*LOG(10*[.A75]/(10*[.A75]+[.B75]);10)" office:value-type="float" office:value="-2.22007699452302" calcext:value-type="float">
            <text:p>-2.22007699452302</text:p>
          </table:table-cell>
          <table:table-cell table:formula="of:=20*LOG([.C75]/(10*(1-[.A75])+[.C75]);10)" office:value-type="float" office:value="-4.29615141364216" calcext:value-type="float">
            <text:p>-4.29615141364216</text:p>
          </table:table-cell>
          <table:table-cell table:number-columns-repeated="6"/>
        </table:table-row>
        <table:table-row table:style-name="ro1">
          <table:table-cell table:formula="of:=[.A75]+0.01" office:value-type="float" office:value="0.74" calcext:value-type="float">
            <text:p>0.74</text:p>
          </table:table-cell>
          <table:table-cell table:formula="of:=((10*(1-[.A76]))^-1+[.$G$1]^-1)^-1" office:value-type="float" office:value="2.06349206349206" calcext:value-type="float">
            <text:p>2.06349206349206</text:p>
          </table:table-cell>
          <table:table-cell table:formula="of:=((10*([.A76]))^-1+[.$G$2]^-1)^-1" office:value-type="float" office:value="4.25287356321839" calcext:value-type="float">
            <text:p>4.25287356321839</text:p>
          </table:table-cell>
          <table:table-cell table:formula="of:=20*LOG(10*[.A76]/(10*[.A76]+[.B76]);10)" office:value-type="float" office:value="-2.13639405024108" calcext:value-type="float">
            <text:p>-2.13639405024108</text:p>
          </table:table-cell>
          <table:table-cell table:formula="of:=20*LOG([.C76]/(10*(1-[.A76])+[.C76]);10)" office:value-type="float" office:value="-4.14380495259233" calcext:value-type="float">
            <text:p>-4.14380495259233</text:p>
          </table:table-cell>
          <table:table-cell table:number-columns-repeated="6"/>
        </table:table-row>
        <table:table-row table:style-name="ro1">
          <table:table-cell table:formula="of:=[.A76]+0.01" office:value-type="float" office:value="0.75" calcext:value-type="float">
            <text:p>0.75</text:p>
          </table:table-cell>
          <table:table-cell table:formula="of:=((10*(1-[.A77]))^-1+[.$G$1]^-1)^-1" office:value-type="float" office:value="2" calcext:value-type="float">
            <text:p>2</text:p>
          </table:table-cell>
          <table:table-cell table:formula="of:=((10*([.A77]))^-1+[.$G$2]^-1)^-1" office:value-type="float" office:value="4.28571428571429" calcext:value-type="float">
            <text:p>4.28571428571429</text:p>
          </table:table-cell>
          <table:table-cell table:formula="of:=20*LOG(10*[.A77]/(10*[.A77]+[.B77]);10)" office:value-type="float" office:value="-2.05324683794295" calcext:value-type="float">
            <text:p>-2.05324683794295</text:p>
          </table:table-cell>
          <table:table-cell table:formula="of:=20*LOG([.C77]/(10*(1-[.A77])+[.C77]);10)" office:value-type="float" office:value="-3.99144709810408" calcext:value-type="float">
            <text:p>-3.99144709810408</text:p>
          </table:table-cell>
          <table:table-cell table:number-columns-repeated="6"/>
        </table:table-row>
        <table:table-row table:style-name="ro1">
          <table:table-cell table:formula="of:=[.A77]+0.01" office:value-type="float" office:value="0.760000000000001" calcext:value-type="float">
            <text:p>0.760000000000001</text:p>
          </table:table-cell>
          <table:table-cell table:formula="of:=((10*(1-[.A78]))^-1+[.$G$1]^-1)^-1" office:value-type="float" office:value="1.93548387096774" calcext:value-type="float">
            <text:p>1.93548387096774</text:p>
          </table:table-cell>
          <table:table-cell table:formula="of:=((10*([.A78]))^-1+[.$G$2]^-1)^-1" office:value-type="float" office:value="4.31818181818182" calcext:value-type="float">
            <text:p>4.31818181818182</text:p>
          </table:table-cell>
          <table:table-cell table:formula="of:=20*LOG(10*[.A78]/(10*[.A78]+[.B78]);10)" office:value-type="float" office:value="-1.97058287215448" calcext:value-type="float">
            <text:p>-1.97058287215448</text:p>
          </table:table-cell>
          <table:table-cell table:formula="of:=20*LOG([.C78]/(10*(1-[.A78])+[.C78]);10)" office:value-type="float" office:value="-3.83901657539918" calcext:value-type="float">
            <text:p>-3.83901657539918</text:p>
          </table:table-cell>
          <table:table-cell table:number-columns-repeated="6"/>
        </table:table-row>
        <table:table-row table:style-name="ro1">
          <table:table-cell table:formula="of:=[.A78]+0.01" office:value-type="float" office:value="0.770000000000001" calcext:value-type="float">
            <text:p>0.770000000000001</text:p>
          </table:table-cell>
          <table:table-cell table:formula="of:=((10*(1-[.A79]))^-1+[.$G$1]^-1)^-1" office:value-type="float" office:value="1.86991869918699" calcext:value-type="float">
            <text:p>1.86991869918699</text:p>
          </table:table-cell>
          <table:table-cell table:formula="of:=((10*([.A79]))^-1+[.$G$2]^-1)^-1" office:value-type="float" office:value="4.35028248587571" calcext:value-type="float">
            <text:p>4.35028248587571</text:p>
          </table:table-cell>
          <table:table-cell table:formula="of:=20*LOG(10*[.A79]/(10*[.A79]+[.B79]);10)" office:value-type="float" office:value="-1.88835046181671" calcext:value-type="float">
            <text:p>-1.88835046181671</text:p>
          </table:table-cell>
          <table:table-cell table:formula="of:=20*LOG([.C79]/(10*(1-[.A79])+[.C79]);10)" office:value-type="float" office:value="-3.68645269060467" calcext:value-type="float">
            <text:p>-3.68645269060467</text:p>
          </table:table-cell>
          <table:table-cell table:number-columns-repeated="6"/>
        </table:table-row>
        <table:table-row table:style-name="ro1">
          <table:table-cell table:formula="of:=[.A79]+0.01" office:value-type="float" office:value="0.780000000000001" calcext:value-type="float">
            <text:p>0.780000000000001</text:p>
          </table:table-cell>
          <table:table-cell table:formula="of:=((10*(1-[.A80]))^-1+[.$G$1]^-1)^-1" office:value-type="float" office:value="1.80327868852459" calcext:value-type="float">
            <text:p>1.80327868852459</text:p>
          </table:table-cell>
          <table:table-cell table:formula="of:=((10*([.A80]))^-1+[.$G$2]^-1)^-1" office:value-type="float" office:value="4.38202247191011" calcext:value-type="float">
            <text:p>4.38202247191011</text:p>
          </table:table-cell>
          <table:table-cell table:formula="of:=20*LOG(10*[.A80]/(10*[.A80]+[.B80]);10)" office:value-type="float" office:value="-1.80649859288665" calcext:value-type="float">
            <text:p>-1.80649859288665</text:p>
          </table:table-cell>
          <table:table-cell table:formula="of:=20*LOG([.C80]/(10*(1-[.A80])+[.C80]);10)" office:value-type="float" office:value="-3.53369520638161" calcext:value-type="float">
            <text:p>-3.53369520638161</text:p>
          </table:table-cell>
          <table:table-cell table:number-columns-repeated="6"/>
        </table:table-row>
        <table:table-row table:style-name="ro1">
          <table:table-cell table:formula="of:=[.A80]+0.01" office:value-type="float" office:value="0.790000000000001" calcext:value-type="float">
            <text:p>0.790000000000001</text:p>
          </table:table-cell>
          <table:table-cell table:formula="of:=((10*(1-[.A81]))^-1+[.$G$1]^-1)^-1" office:value-type="float" office:value="1.73553719008264" calcext:value-type="float">
            <text:p>1.73553719008264</text:p>
          </table:table-cell>
          <table:table-cell table:formula="of:=((10*([.A81]))^-1+[.$G$2]^-1)^-1" office:value-type="float" office:value="4.41340782122905" calcext:value-type="float">
            <text:p>4.41340782122905</text:p>
          </table:table-cell>
          <table:table-cell table:formula="of:=20*LOG(10*[.A81]/(10*[.A81]+[.B81]);10)" office:value-type="float" office:value="-1.72497681387571" calcext:value-type="float">
            <text:p>-1.72497681387571</text:p>
          </table:table-cell>
          <table:table-cell table:formula="of:=20*LOG([.C81]/(10*(1-[.A81])+[.C81]);10)" office:value-type="float" office:value="-3.38068422020471" calcext:value-type="float">
            <text:p>-3.38068422020471</text:p>
          </table:table-cell>
          <table:table-cell table:number-columns-repeated="6"/>
        </table:table-row>
        <table:table-row table:style-name="ro1">
          <table:table-cell table:formula="of:=[.A81]+0.01" office:value-type="float" office:value="0.800000000000001" calcext:value-type="float">
            <text:p>0.800000000000001</text:p>
          </table:table-cell>
          <table:table-cell table:formula="of:=((10*(1-[.A82]))^-1+[.$G$1]^-1)^-1" office:value-type="float" office:value="1.66666666666666" calcext:value-type="float">
            <text:p>1.66666666666666</text:p>
          </table:table-cell>
          <table:table-cell table:formula="of:=((10*([.A82]))^-1+[.$G$2]^-1)^-1" office:value-type="float" office:value="4.44444444444445" calcext:value-type="float">
            <text:p>4.44444444444445</text:p>
          </table:table-cell>
          <table:table-cell table:formula="of:=20*LOG(10*[.A82]/(10*[.A82]+[.B82]);10)" office:value-type="float" office:value="-1.643735123747" calcext:value-type="float">
            <text:p>-1.643735123747</text:p>
          </table:table-cell>
          <table:table-cell table:formula="of:=20*LOG([.C82]/(10*(1-[.A82])+[.C82]);10)" office:value-type="float" office:value="-3.22736004469949" calcext:value-type="float">
            <text:p>-3.22736004469949</text:p>
          </table:table-cell>
          <table:table-cell table:number-columns-repeated="6"/>
        </table:table-row>
        <table:table-row table:style-name="ro1">
          <table:table-cell table:formula="of:=[.A82]+0.01" office:value-type="float" office:value="0.810000000000001" calcext:value-type="float">
            <text:p>0.810000000000001</text:p>
          </table:table-cell>
          <table:table-cell table:formula="of:=((10*(1-[.A83]))^-1+[.$G$1]^-1)^-1" office:value-type="float" office:value="1.59663865546218" calcext:value-type="float">
            <text:p>1.59663865546218</text:p>
          </table:table-cell>
          <table:table-cell table:formula="of:=((10*([.A83]))^-1+[.$G$2]^-1)^-1" office:value-type="float" office:value="4.47513812154696" calcext:value-type="float">
            <text:p>4.47513812154696</text:p>
          </table:table-cell>
          <table:table-cell table:formula="of:=20*LOG(10*[.A83]/(10*[.A83]+[.B83]);10)" office:value-type="float" office:value="-1.56272386161204" calcext:value-type="float">
            <text:p>-1.56272386161204</text:p>
          </table:table-cell>
          <table:table-cell table:formula="of:=20*LOG([.C83]/(10*(1-[.A83])+[.C83]);10)" office:value-type="float" office:value="-3.07366308946266" calcext:value-type="float">
            <text:p>-3.07366308946266</text:p>
          </table:table-cell>
          <table:table-cell table:number-columns-repeated="6"/>
        </table:table-row>
        <table:table-row table:style-name="ro1">
          <table:table-cell table:formula="of:=[.A83]+0.01" office:value-type="float" office:value="0.820000000000001" calcext:value-type="float">
            <text:p>0.820000000000001</text:p>
          </table:table-cell>
          <table:table-cell table:formula="of:=((10*(1-[.A84]))^-1+[.$G$1]^-1)^-1" office:value-type="float" office:value="1.52542372881356" calcext:value-type="float">
            <text:p>1.52542372881356</text:p>
          </table:table-cell>
          <table:table-cell table:formula="of:=((10*([.A84]))^-1+[.$G$2]^-1)^-1" office:value-type="float" office:value="4.50549450549451" calcext:value-type="float">
            <text:p>4.50549450549451</text:p>
          </table:table-cell>
          <table:table-cell table:formula="of:=20*LOG(10*[.A84]/(10*[.A84]+[.B84]);10)" office:value-type="float" office:value="-1.48189359768237" calcext:value-type="float">
            <text:p>-1.48189359768237</text:p>
          </table:table-cell>
          <table:table-cell table:formula="of:=20*LOG([.C84]/(10*(1-[.A84])+[.C84]);10)" office:value-type="float" office:value="-2.91953374380487" calcext:value-type="float">
            <text:p>-2.91953374380487</text:p>
          </table:table-cell>
          <table:table-cell table:number-columns-repeated="6"/>
        </table:table-row>
        <table:table-row table:style-name="ro1">
          <table:table-cell table:formula="of:=[.A84]+0.01" office:value-type="float" office:value="0.830000000000001" calcext:value-type="float">
            <text:p>0.830000000000001</text:p>
          </table:table-cell>
          <table:table-cell table:formula="of:=((10*(1-[.A85]))^-1+[.$G$1]^-1)^-1" office:value-type="float" office:value="1.45299145299145" calcext:value-type="float">
            <text:p>1.45299145299145</text:p>
          </table:table-cell>
          <table:table-cell table:formula="of:=((10*([.A85]))^-1+[.$G$2]^-1)^-1" office:value-type="float" office:value="4.53551912568306" calcext:value-type="float">
            <text:p>4.53551912568306</text:p>
          </table:table-cell>
          <table:table-cell table:formula="of:=20*LOG(10*[.A85]/(10*[.A85]+[.B85]);10)" office:value-type="float" office:value="-1.40119502494097" calcext:value-type="float">
            <text:p>-1.40119502494097</text:p>
          </table:table-cell>
          <table:table-cell table:formula="of:=20*LOG([.C85]/(10*(1-[.A85])+[.C85]);10)" office:value-type="float" office:value="-2.7649122598642" calcext:value-type="float">
            <text:p>-2.7649122598642</text:p>
          </table:table-cell>
          <table:table-cell table:number-columns-repeated="6"/>
        </table:table-row>
        <table:table-row table:style-name="ro1">
          <table:table-cell table:formula="of:=[.A85]+0.01" office:value-type="float" office:value="0.840000000000001" calcext:value-type="float">
            <text:p>0.840000000000001</text:p>
          </table:table-cell>
          <table:table-cell table:formula="of:=((10*(1-[.A86]))^-1+[.$G$1]^-1)^-1" office:value-type="float" office:value="1.37931034482758" calcext:value-type="float">
            <text:p>1.37931034482758</text:p>
          </table:table-cell>
          <table:table-cell table:formula="of:=((10*([.A86]))^-1+[.$G$2]^-1)^-1" office:value-type="float" office:value="4.56521739130435" calcext:value-type="float">
            <text:p>4.56521739130435</text:p>
          </table:table-cell>
          <table:table-cell table:formula="of:=20*LOG(10*[.A86]/(10*[.A86]+[.B86]);10)" office:value-type="float" office:value="-1.32057885100382" calcext:value-type="float">
            <text:p>-1.32057885100382</text:p>
          </table:table-cell>
          <table:table-cell table:formula="of:=20*LOG([.C86]/(10*(1-[.A86])+[.C86]);10)" office:value-type="float" office:value="-2.60973863554219" calcext:value-type="float">
            <text:p>-2.60973863554219</text:p>
          </table:table-cell>
          <table:table-cell table:number-columns-repeated="6"/>
        </table:table-row>
        <table:table-row table:style-name="ro1">
          <table:table-cell table:formula="of:=[.A86]+0.01" office:value-type="float" office:value="0.850000000000001" calcext:value-type="float">
            <text:p>0.850000000000001</text:p>
          </table:table-cell>
          <table:table-cell table:formula="of:=((10*(1-[.A87]))^-1+[.$G$1]^-1)^-1" office:value-type="float" office:value="1.30434782608695" calcext:value-type="float">
            <text:p>1.30434782608695</text:p>
          </table:table-cell>
          <table:table-cell table:formula="of:=((10*([.A87]))^-1+[.$G$2]^-1)^-1" office:value-type="float" office:value="4.5945945945946" calcext:value-type="float">
            <text:p>4.5945945945946</text:p>
          </table:table-cell>
          <table:table-cell table:formula="of:=20*LOG(10*[.A87]/(10*[.A87]+[.B87]);10)" office:value-type="float" office:value="-1.23999568964187" calcext:value-type="float">
            <text:p>-1.23999568964187</text:p>
          </table:table-cell>
          <table:table-cell table:formula="of:=20*LOG([.C87]/(10*(1-[.A87])+[.C87]);10)" office:value-type="float" office:value="-2.4539524967141" calcext:value-type="float">
            <text:p>-2.4539524967141</text:p>
          </table:table-cell>
          <table:table-cell table:number-columns-repeated="6"/>
        </table:table-row>
        <table:table-row table:style-name="ro1">
          <table:table-cell table:formula="of:=[.A87]+0.01" office:value-type="float" office:value="0.860000000000001" calcext:value-type="float">
            <text:p>0.860000000000001</text:p>
          </table:table-cell>
          <table:table-cell table:formula="of:=((10*(1-[.A88]))^-1+[.$G$1]^-1)^-1" office:value-type="float" office:value="1.22807017543859" calcext:value-type="float">
            <text:p>1.22807017543859</text:p>
          </table:table-cell>
          <table:table-cell table:formula="of:=((10*([.A88]))^-1+[.$G$2]^-1)^-1" office:value-type="float" office:value="4.6236559139785" calcext:value-type="float">
            <text:p>4.6236559139785</text:p>
          </table:table-cell>
          <table:table-cell table:formula="of:=20*LOG(10*[.A88]/(10*[.A88]+[.B88]);10)" office:value-type="float" office:value="-1.1593959514298" calcext:value-type="float">
            <text:p>-1.1593959514298</text:p>
          </table:table-cell>
          <table:table-cell table:formula="of:=20*LOG([.C88]/(10*(1-[.A88])+[.C88]);10)" office:value-type="float" office:value="-2.29749297815925" calcext:value-type="float">
            <text:p>-2.29749297815925</text:p>
          </table:table-cell>
          <table:table-cell table:number-columns-repeated="6"/>
        </table:table-row>
        <table:table-row table:style-name="ro1">
          <table:table-cell table:formula="of:=[.A88]+0.01" office:value-type="float" office:value="0.870000000000001" calcext:value-type="float">
            <text:p>0.870000000000001</text:p>
          </table:table-cell>
          <table:table-cell table:formula="of:=((10*(1-[.A89]))^-1+[.$G$1]^-1)^-1" office:value-type="float" office:value="1.1504424778761" calcext:value-type="float">
            <text:p>1.1504424778761</text:p>
          </table:table-cell>
          <table:table-cell table:formula="of:=((10*([.A89]))^-1+[.$G$2]^-1)^-1" office:value-type="float" office:value="4.6524064171123" calcext:value-type="float">
            <text:p>4.6524064171123</text:p>
          </table:table-cell>
          <table:table-cell table:formula="of:=20*LOG(10*[.A89]/(10*[.A89]+[.B89]);10)" office:value-type="float" office:value="-1.07872973297862" calcext:value-type="float">
            <text:p>-1.07872973297862</text:p>
          </table:table-cell>
          <table:table-cell table:formula="of:=20*LOG([.C89]/(10*(1-[.A89])+[.C89]);10)" office:value-type="float" office:value="-2.14029860264701" calcext:value-type="float">
            <text:p>-2.14029860264701</text:p>
          </table:table-cell>
          <table:table-cell table:number-columns-repeated="6"/>
        </table:table-row>
        <table:table-row table:style-name="ro1">
          <table:table-cell table:formula="of:=[.A89]+0.01" office:value-type="float" office:value="0.880000000000001" calcext:value-type="float">
            <text:p>0.880000000000001</text:p>
          </table:table-cell>
          <table:table-cell table:formula="of:=((10*(1-[.A90]))^-1+[.$G$1]^-1)^-1" office:value-type="float" office:value="1.07142857142857" calcext:value-type="float">
            <text:p>1.07142857142857</text:p>
          </table:table-cell>
          <table:table-cell table:formula="of:=((10*([.A90]))^-1+[.$G$2]^-1)^-1" office:value-type="float" office:value="4.68085106382979" calcext:value-type="float">
            <text:p>4.68085106382979</text:p>
          </table:table-cell>
          <table:table-cell table:formula="of:=20*LOG(10*[.A90]/(10*[.A90]+[.B90]);10)" office:value-type="float" office:value="-0.997946704195455" calcext:value-type="float">
            <text:p>-0.997946704195455</text:p>
          </table:table-cell>
          <table:table-cell table:formula="of:=20*LOG([.C90]/(10*(1-[.A90])+[.C90]);10)" office:value-type="float" office:value="-1.98230715759908" calcext:value-type="float">
            <text:p>-1.98230715759908</text:p>
          </table:table-cell>
          <table:table-cell table:number-columns-repeated="6"/>
        </table:table-row>
        <table:table-row table:style-name="ro1">
          <table:table-cell table:formula="of:=[.A90]+0.01" office:value-type="float" office:value="0.890000000000001" calcext:value-type="float">
            <text:p>0.890000000000001</text:p>
          </table:table-cell>
          <table:table-cell table:formula="of:=((10*(1-[.A91]))^-1+[.$G$1]^-1)^-1" office:value-type="float" office:value="0.990990990990986" calcext:value-type="float">
            <text:p>0.990990990990986</text:p>
          </table:table-cell>
          <table:table-cell table:formula="of:=((10*([.A91]))^-1+[.$G$2]^-1)^-1" office:value-type="float" office:value="4.70899470899471" calcext:value-type="float">
            <text:p>4.70899470899471</text:p>
          </table:table-cell>
          <table:table-cell table:formula="of:=20*LOG(10*[.A91]/(10*[.A91]+[.B91]);10)" office:value-type="float" office:value="-0.916995992994826" calcext:value-type="float">
            <text:p>-0.916995992994826</text:p>
          </table:table-cell>
          <table:table-cell table:formula="of:=20*LOG([.C91]/(10*(1-[.A91])+[.C91]);10)" office:value-type="float" office:value="-1.82345556872797" calcext:value-type="float">
            <text:p>-1.82345556872797</text:p>
          </table:table-cell>
          <table:table-cell table:number-columns-repeated="6"/>
        </table:table-row>
        <table:table-row table:style-name="ro1">
          <table:table-cell table:formula="of:=[.A91]+0.01" office:value-type="float" office:value="0.900000000000001" calcext:value-type="float">
            <text:p>0.900000000000001</text:p>
          </table:table-cell>
          <table:table-cell table:formula="of:=((10*(1-[.A92]))^-1+[.$G$1]^-1)^-1" office:value-type="float" office:value="0.909090909090904" calcext:value-type="float">
            <text:p>0.909090909090904</text:p>
          </table:table-cell>
          <table:table-cell table:formula="of:=((10*([.A92]))^-1+[.$G$2]^-1)^-1" office:value-type="float" office:value="4.73684210526316" calcext:value-type="float">
            <text:p>4.73684210526316</text:p>
          </table:table-cell>
          <table:table-cell table:formula="of:=20*LOG(10*[.A92]/(10*[.A92]+[.B92]);10)" office:value-type="float" office:value="-0.83582606686147" calcext:value-type="float">
            <text:p>-0.83582606686147</text:p>
          </table:table-cell>
          <table:table-cell table:formula="of:=20*LOG([.C92]/(10*(1-[.A92])+[.C92]);10)" office:value-type="float" office:value="-1.66367977002597" calcext:value-type="float">
            <text:p>-1.66367977002597</text:p>
          </table:table-cell>
          <table:table-cell table:number-columns-repeated="6"/>
        </table:table-row>
        <table:table-row table:style-name="ro1">
          <table:table-cell table:formula="of:=[.A92]+0.01" office:value-type="float" office:value="0.910000000000001" calcext:value-type="float">
            <text:p>0.910000000000001</text:p>
          </table:table-cell>
          <table:table-cell table:formula="of:=((10*(1-[.A93]))^-1+[.$G$1]^-1)^-1" office:value-type="float" office:value="0.825688073394491" calcext:value-type="float">
            <text:p>0.825688073394491</text:p>
          </table:table-cell>
          <table:table-cell table:formula="of:=((10*([.A93]))^-1+[.$G$2]^-1)^-1" office:value-type="float" office:value="4.76439790575916" calcext:value-type="float">
            <text:p>4.76439790575916</text:p>
          </table:table-cell>
          <table:table-cell table:formula="of:=20*LOG(10*[.A93]/(10*[.A93]+[.B93]);10)" office:value-type="float" office:value="-0.754384610634701" calcext:value-type="float">
            <text:p>-0.754384610634701</text:p>
          </table:table-cell>
          <table:table-cell table:formula="of:=20*LOG([.C93]/(10*(1-[.A93])+[.C93]);10)" office:value-type="float" office:value="-1.50291456944717" calcext:value-type="float">
            <text:p>-1.50291456944717</text:p>
          </table:table-cell>
          <table:table-cell table:number-columns-repeated="6"/>
        </table:table-row>
        <table:table-row table:style-name="ro1">
          <table:table-cell table:formula="of:=[.A93]+0.01" office:value-type="float" office:value="0.920000000000001" calcext:value-type="float">
            <text:p>0.920000000000001</text:p>
          </table:table-cell>
          <table:table-cell table:formula="of:=((10*(1-[.A94]))^-1+[.$G$1]^-1)^-1" office:value-type="float" office:value="0.740740740740736" calcext:value-type="float">
            <text:p>0.740740740740736</text:p>
          </table:table-cell>
          <table:table-cell table:formula="of:=((10*([.A94]))^-1+[.$G$2]^-1)^-1" office:value-type="float" office:value="4.79166666666667" calcext:value-type="float">
            <text:p>4.79166666666667</text:p>
          </table:table-cell>
          <table:table-cell table:formula="of:=20*LOG(10*[.A94]/(10*[.A94]+[.B94]);10)" office:value-type="float" office:value="-0.672618399848233" calcext:value-type="float">
            <text:p>-0.672618399848233</text:p>
          </table:table-cell>
          <table:table-cell table:formula="of:=20*LOG([.C94]/(10*(1-[.A94])+[.C94]);10)" office:value-type="float" office:value="-1.34109350958722" calcext:value-type="float">
            <text:p>-1.34109350958722</text:p>
          </table:table-cell>
          <table:table-cell table:number-columns-repeated="6"/>
        </table:table-row>
        <table:table-row table:style-name="ro1">
          <table:table-cell table:formula="of:=[.A94]+0.01" office:value-type="float" office:value="0.930000000000001" calcext:value-type="float">
            <text:p>0.930000000000001</text:p>
          </table:table-cell>
          <table:table-cell table:formula="of:=((10*(1-[.A95]))^-1+[.$G$1]^-1)^-1" office:value-type="float" office:value="0.65420560747663" calcext:value-type="float">
            <text:p>0.65420560747663</text:p>
          </table:table-cell>
          <table:table-cell table:formula="of:=((10*([.A95]))^-1+[.$G$2]^-1)^-1" office:value-type="float" office:value="4.81865284974093" calcext:value-type="float">
            <text:p>4.81865284974093</text:p>
          </table:table-cell>
          <table:table-cell table:formula="of:=20*LOG(10*[.A95]/(10*[.A95]+[.B95]);10)" office:value-type="float" office:value="-0.590473168916488" calcext:value-type="float">
            <text:p>-0.590473168916488</text:p>
          </table:table-cell>
          <table:table-cell table:formula="of:=20*LOG([.C95]/(10*(1-[.A95])+[.C95]);10)" office:value-type="float" office:value="-1.17814872262068" calcext:value-type="float">
            <text:p>-1.17814872262068</text:p>
          </table:table-cell>
          <table:table-cell table:number-columns-repeated="6"/>
        </table:table-row>
        <table:table-row table:style-name="ro1">
          <table:table-cell table:formula="of:=[.A95]+0.01" office:value-type="float" office:value="0.940000000000001" calcext:value-type="float">
            <text:p>0.940000000000001</text:p>
          </table:table-cell>
          <table:table-cell table:formula="of:=((10*(1-[.A96]))^-1+[.$G$1]^-1)^-1" office:value-type="float" office:value="0.566037735849051" calcext:value-type="float">
            <text:p>0.566037735849051</text:p>
          </table:table-cell>
          <table:table-cell table:formula="of:=((10*([.A96]))^-1+[.$G$2]^-1)^-1" office:value-type="float" office:value="4.84536082474227" calcext:value-type="float">
            <text:p>4.84536082474227</text:p>
          </table:table-cell>
          <table:table-cell table:formula="of:=20*LOG(10*[.A96]/(10*[.A96]+[.B96]);10)" office:value-type="float" office:value="-0.507893473408345" calcext:value-type="float">
            <text:p>-0.507893473408345</text:p>
          </table:table-cell>
          <table:table-cell table:formula="of:=20*LOG([.C96]/(10*(1-[.A96])+[.C96]);10)" office:value-type="float" office:value="-1.01401077870374" calcext:value-type="float">
            <text:p>-1.01401077870374</text:p>
          </table:table-cell>
          <table:table-cell table:number-columns-repeated="6"/>
        </table:table-row>
        <table:table-row table:style-name="ro1">
          <table:table-cell table:formula="of:=[.A96]+0.01" office:value-type="float" office:value="0.950000000000001" calcext:value-type="float">
            <text:p>0.950000000000001</text:p>
          </table:table-cell>
          <table:table-cell table:formula="of:=((10*(1-[.A97]))^-1+[.$G$1]^-1)^-1" office:value-type="float" office:value="0.476190476190471" calcext:value-type="float">
            <text:p>0.476190476190471</text:p>
          </table:table-cell>
          <table:table-cell table:formula="of:=((10*([.A97]))^-1+[.$G$2]^-1)^-1" office:value-type="float" office:value="4.87179487179487" calcext:value-type="float">
            <text:p>4.87179487179487</text:p>
          </table:table-cell>
          <table:table-cell table:formula="of:=20*LOG(10*[.A97]/(10*[.A97]+[.B97]);10)" office:value-type="float" office:value="-0.424822545590936" calcext:value-type="float">
            <text:p>-0.424822545590936</text:p>
          </table:table-cell>
          <table:table-cell table:formula="of:=20*LOG([.C97]/(10*(1-[.A97])+[.C97]);10)" office:value-type="float" office:value="-0.848608526989693" calcext:value-type="float">
            <text:p>-0.848608526989693</text:p>
          </table:table-cell>
          <table:table-cell table:number-columns-repeated="6"/>
        </table:table-row>
        <table:table-row table:style-name="ro1">
          <table:table-cell table:formula="of:=[.A97]+0.01" office:value-type="float" office:value="0.960000000000001" calcext:value-type="float">
            <text:p>0.960000000000001</text:p>
          </table:table-cell>
          <table:table-cell table:formula="of:=((10*(1-[.A98]))^-1+[.$G$1]^-1)^-1" office:value-type="float" office:value="0.384615384615379" calcext:value-type="float">
            <text:p>0.384615384615379</text:p>
          </table:table-cell>
          <table:table-cell table:formula="of:=((10*([.A98]))^-1+[.$G$2]^-1)^-1" office:value-type="float" office:value="4.89795918367347" calcext:value-type="float">
            <text:p>4.89795918367347</text:p>
          </table:table-cell>
          <table:table-cell table:formula="of:=20*LOG(10*[.A98]/(10*[.A98]+[.B98]);10)" office:value-type="float" office:value="-0.341202142358899" calcext:value-type="float">
            <text:p>-0.341202142358899</text:p>
          </table:table-cell>
          <table:table-cell table:formula="of:=20*LOG([.C98]/(10*(1-[.A98])+[.C98]);10)" office:value-type="float" office:value="-0.681868928334503" calcext:value-type="float">
            <text:p>-0.681868928334503</text:p>
          </table:table-cell>
          <table:table-cell table:number-columns-repeated="6"/>
        </table:table-row>
        <table:table-row table:style-name="ro1">
          <table:table-cell table:formula="of:=[.A98]+0.01" office:value-type="float" office:value="0.970000000000001" calcext:value-type="float">
            <text:p>0.970000000000001</text:p>
          </table:table-cell>
          <table:table-cell table:formula="of:=((10*(1-[.A99]))^-1+[.$G$1]^-1)^-1" office:value-type="float" office:value="0.291262135922324" calcext:value-type="float">
            <text:p>0.291262135922324</text:p>
          </table:table-cell>
          <table:table-cell table:formula="of:=((10*([.A99]))^-1+[.$G$2]^-1)^-1" office:value-type="float" office:value="4.92385786802031" calcext:value-type="float">
            <text:p>4.92385786802031</text:p>
          </table:table-cell>
          <table:table-cell table:formula="of:=20*LOG(10*[.A99]/(10*[.A99]+[.B99]);10)" office:value-type="float" office:value="-0.256972384587126" calcext:value-type="float">
            <text:p>-0.256972384587126</text:p>
          </table:table-cell>
          <table:table-cell table:formula="of:=20*LOG([.C99]/(10*(1-[.A99])+[.C99]);10)" office:value-type="float" office:value="-0.513716878690565" calcext:value-type="float">
            <text:p>-0.513716878690565</text:p>
          </table:table-cell>
          <table:table-cell table:number-columns-repeated="6"/>
        </table:table-row>
        <table:table-row table:style-name="ro1">
          <table:table-cell table:formula="of:=[.A99]+0.01" office:value-type="float" office:value="0.980000000000001" calcext:value-type="float">
            <text:p>0.980000000000001</text:p>
          </table:table-cell>
          <table:table-cell table:formula="of:=((10*(1-[.A100]))^-1+[.$G$1]^-1)^-1" office:value-type="float" office:value="0.196078431372543" calcext:value-type="float">
            <text:p>0.196078431372543</text:p>
          </table:table-cell>
          <table:table-cell table:formula="of:=((10*([.A100]))^-1+[.$G$2]^-1)^-1" office:value-type="float" office:value="4.94949494949495" calcext:value-type="float">
            <text:p>4.94949494949495</text:p>
          </table:table-cell>
          <table:table-cell table:formula="of:=20*LOG(10*[.A100]/(10*[.A100]+[.B100]);10)" office:value-type="float" office:value="-0.172071586856344" calcext:value-type="float">
            <text:p>-0.172071586856344</text:p>
          </table:table-cell>
          <table:table-cell table:formula="of:=20*LOG([.C100]/(10*(1-[.A100])+[.C100]);10)" office:value-type="float" office:value="-0.344075022094691" calcext:value-type="float">
            <text:p>-0.344075022094691</text:p>
          </table:table-cell>
          <table:table-cell table:number-columns-repeated="6"/>
        </table:table-row>
        <table:table-row table:style-name="ro1">
          <table:table-cell table:formula="of:=[.A100]+0.01" office:value-type="float" office:value="0.990000000000001" calcext:value-type="float">
            <text:p>0.990000000000001</text:p>
          </table:table-cell>
          <table:table-cell table:formula="of:=((10*(1-[.A101]))^-1+[.$G$1]^-1)^-1" office:value-type="float" office:value="0.0990099009900926" calcext:value-type="float">
            <text:p>0.0990099009900926</text:p>
          </table:table-cell>
          <table:table-cell table:formula="of:=((10*([.A101]))^-1+[.$G$2]^-1)^-1" office:value-type="float" office:value="4.9748743718593" calcext:value-type="float">
            <text:p>4.9748743718593</text:p>
          </table:table-cell>
          <table:table-cell table:formula="of:=20*LOG(10*[.A101]/(10*[.A101]+[.B101]);10)" office:value-type="float" office:value="-0.0864360763993932" calcext:value-type="float">
            <text:p>-0.0864360763993932</text:p>
          </table:table-cell>
          <table:table-cell table:formula="of:=20*LOG([.C101]/(10*(1-[.A101])+[.C101]);10)" office:value-type="float" office:value="-0.172863552052239" calcext:value-type="float">
            <text:p>-0.17286355205223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00-00-00</text:date>, <text:time style:data-style-name="N2" text:time-value="23:14:20.7824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1T20:08:46.773663542</meta:creation-date>
    <dc:date>2026-06-11T23:14:54.758590946</dc:date>
    <meta:editing-duration>PT1H45M11S</meta:editing-duration>
    <meta:editing-cycles>30</meta:editing-cycles>
    <meta:generator>LibreOffice/24.2.7.2$Linux_X86_64 LibreOffice_project/420$Build-2</meta:generator>
    <meta:document-statistic meta:table-count="1" meta:cell-count="511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-42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draw:stroke="dash" draw:stroke-dash="Long_20_Dot_20__28_Rounded_29_" svg:stroke-color="#b3b3b3" svg:stroke-linecap="round"/>
    </style:style>
    <style:style style:name="ch9" style:family="chart" style:data-style-name="N0">
      <style:chart-properties chart:display-label="true" chart:logarithmic="false" chart:minimum="-42" chart:origin="-42" chart:interval-major="6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05cm" svg:height="20.897cm" xlink:href=".." xlink:type="simple" chart:class="chart:scatter" chart:style-name="ch1">
        <chart:title svg:x="11.173cm" svg:y="0.552cm" chart:style-name="ch2">
          <text:p>Gain vs Wiper Position</text:p>
        </chart:title>
        <chart:subtitle svg:x="13.802cm" svg:y="1.822cm" chart:style-name="ch3">
          <text:p>
</text:p>
        </chart:subtitle>
        <chart:legend chart:legend-position="top" svg:x="10.49cm" svg:y="2.008cm" style:legend-expansion="wide" chart:style-name="ch4"/>
        <chart:plot-area chart:style-name="ch5" table:cell-range-address="Sheet1.A2:Sheet1.A101 Sheet1.D1:Sheet1.E101" chart:data-source-has-labels="row" svg:x="1.855cm" svg:y="3.182cm" svg:width="25.198cm" svg:height="16.025cm">
          <chart:coordinate-region svg:x="2.582cm" svg:y="3.381cm" svg:width="24.377cm" svg:height="15.179cm"/>
          <chart:axis chart:dimension="x" chart:name="primary-x" chart:style-name="ch6">
            <chart:title svg:x="12.751cm" svg:y="19.624cm" chart:style-name="ch7">
              <text:p>Wiper Position</text:p>
            </chart:title>
            <chart:grid chart:style-name="ch8" chart:class="major"/>
          </chart:axis>
          <chart:axis chart:dimension="y" chart:name="primary-y" chart:style-name="ch9">
            <chart:title svg:x="0.451cm" svg:y="12.328cm" chart:style-name="ch10">
              <text:p>Gain (db)</text:p>
            </chart:title>
            <chart:grid chart:style-name="ch8" chart:class="major"/>
          </chart:axis>
          <chart:series chart:style-name="ch11" chart:values-cell-range-address="Sheet1.D2:Sheet1.D101" chart:label-cell-address="Sheet1.D1:Sheet1.D1" chart:class="chart:scatter">
            <chart:domain table:cell-range-address="Sheet1.A2:Sheet1.A101"/>
            <chart:data-point chart:repeated="100"/>
          </chart:series>
          <chart:series chart:style-name="ch12" chart:values-cell-range-address="Sheet1.E2:Sheet1.E101" chart:label-cell-address="Sheet1.E1:Sheet1.E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d Gain</text:p>
                <draw:g>
                  <svg:desc>Sheet1.D1:Sheet1.D1</svg:desc>
                </draw:g>
              </table:table-cell>
              <table:table-cell office:value-type="string">
                <text:p>New Gai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1</svg:desc>
                </draw:g>
              </table:table-cell>
              <table:table-cell office:value-type="float" office:value="NaN">
                <text:p>NaN</text:p>
                <draw:g>
                  <svg:desc>Sheet1.D2:Sheet1.D101</svg:desc>
                </draw:g>
              </table:table-cell>
              <table:table-cell office:value-type="float" office:value="NaN">
                <text:p>NaN</text:p>
                <draw:g>
                  <svg:desc>Sheet1.E2:Sheet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34.1085059158091">
                <text:p>-34.1085059158091</text:p>
              </table:table-cell>
              <table:table-cell office:value-type="float" office:value="-40.0855674440032">
                <text:p>-40.085567444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28.2146928174344">
                <text:p>-28.2146928174344</text:p>
              </table:table-cell>
              <table:table-cell office:value-type="float" office:value="-34.147996622665">
                <text:p>-34.147996622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24.8174019463904">
                <text:p>-24.8174019463904</text:p>
              </table:table-cell>
              <table:table-cell office:value-type="float" office:value="-30.7067264696222">
                <text:p>-30.7067264696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22.4409723354371">
                <text:p>-22.4409723354371</text:p>
              </table:table-cell>
              <table:table-cell office:value-type="float" office:value="-28.2860937625666">
                <text:p>-28.2860937625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20.6229883187959">
                <text:p>-20.6229883187959</text:p>
              </table:table-cell>
              <table:table-cell office:value-type="float" office:value="-26.4236805460463">
                <text:p>-26.4236805460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19.1575082444203">
                <text:p>-19.1575082444203</text:p>
              </table:table-cell>
              <table:table-cell office:value-type="float" office:value="-24.9135428430249">
                <text:p>-24.9135428430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17.9347007132588">
                <text:p>-17.9347007132588</text:p>
              </table:table-cell>
              <table:table-cell office:value-type="float" office:value="-23.6458468934142">
                <text:p>-23.6458468934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16.8890257425885">
                <text:p>-16.8890257425885</text:p>
              </table:table-cell>
              <table:table-cell office:value-type="float" office:value="-22.5550503166595">
                <text:p>-22.5550503166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15.978224882128">
                <text:p>-15.978224882128</text:p>
              </table:table-cell>
              <table:table-cell office:value-type="float" office:value="-21.5988922270826">
                <text:p>-21.5988922270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15.1734579397559">
                <text:p>-15.1734579397559</text:p>
              </table:table-cell>
              <table:table-cell office:value-type="float" office:value="-20.7485299588125">
                <text:p>-20.748529958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14.4541659149969">
                <text:p>-14.4541659149969</text:p>
              </table:table-cell>
              <table:table-cell office:value-type="float" office:value="-19.9834019984617">
                <text:p>-19.9834019984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13.8051786943764">
                <text:p>-13.8051786943764</text:p>
              </table:table-cell>
              <table:table-cell office:value-type="float" office:value="-19.28833567965">
                <text:p>-19.28833567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13.2149844781527">
                <text:p>-13.2149844781527</text:p>
              </table:table-cell>
              <table:table-cell office:value-type="float" office:value="-18.6518166088827">
                <text:p>-18.6518166088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12.6746424051075">
                <text:p>-12.6746424051075</text:p>
              </table:table-cell>
              <table:table-cell office:value-type="float" office:value="-18.0649012894658">
                <text:p>-18.0649012894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12.1770712618261">
                <text:p>-12.1770712618261</text:p>
              </table:table-cell>
              <table:table-cell office:value-type="float" office:value="-17.5205058298863">
                <text:p>-17.5205058298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11.7165682434706">
                <text:p>-11.7165682434706</text:p>
              </table:table-cell>
              <table:table-cell office:value-type="float" office:value="-17.0129247036613">
                <text:p>-17.0129247036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11.2884738852116">
                <text:p>-11.2884738852116</text:p>
              </table:table-cell>
              <table:table-cell office:value-type="float" office:value="-16.5374956798202">
                <text:p>-16.5374956798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10.8889329297116">
                <text:p>-10.8889329297116</text:p>
              </table:table-cell>
              <table:table-cell office:value-type="float" office:value="-16.0903606894131">
                <text:p>-16.09036068941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10.5147199505954">
                <text:p>-10.5147199505954</text:p>
              </table:table-cell>
              <table:table-cell office:value-type="float" office:value="-15.6682914479791">
                <text:p>-15.6682914479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10.1631097691926">
                <text:p>-10.1631097691926</text:p>
              </table:table-cell>
              <table:table-cell office:value-type="float" office:value="-15.2685598712587">
                <text:p>-15.26855987125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9.83177953173729">
                <text:p>-9.83177953173729</text:p>
              </table:table-cell>
              <table:table-cell office:value-type="float" office:value="-14.8888401513352">
                <text:p>-14.8888401513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9.51873359756921">
                <text:p>-9.51873359756921</text:p>
              </table:table-cell>
              <table:table-cell office:value-type="float" office:value="-14.5271336437471">
                <text:p>-14.5271336437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9.22224514646632">
                <text:p>-9.22224514646632</text:p>
              </table:table-cell>
              <table:table-cell office:value-type="float" office:value="-14.1817104737024">
                <text:p>-14.1817104737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8.94081023049989">
                <text:p>-8.94081023049989</text:p>
              </table:table-cell>
              <table:table-cell office:value-type="float" office:value="-13.8510635867829">
                <text:p>-13.8510635867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8.67311121877144">
                <text:p>-8.67311121877144</text:p>
              </table:table-cell>
              <table:table-cell office:value-type="float" office:value="-13.5338721924973">
                <text:p>-13.5338721924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8.41798742214351">
                <text:p>-8.41798742214351</text:p>
              </table:table-cell>
              <table:table-cell office:value-type="float" office:value="-13.2289723877955">
                <text:p>-13.22897238779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8.17441127029563">
                <text:p>-8.17441127029563</text:p>
              </table:table-cell>
              <table:table-cell office:value-type="float" office:value="-12.9353333328715">
                <text:p>-12.9353333328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7.9414688282065">
                <text:p>-7.9414688282065</text:p>
              </table:table-cell>
              <table:table-cell office:value-type="float" office:value="-12.6520377663575">
                <text:p>-12.6520377663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7.71834373737741">
                <text:p>-7.71834373737741</text:p>
              </table:table-cell>
              <table:table-cell office:value-type="float" office:value="-12.3782659452205">
                <text:p>-12.3782659452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7.50430388437027">
                <text:p>-7.50430388437027</text:p>
              </table:table-cell>
              <table:table-cell office:value-type="float" office:value="-12.1132823119357">
                <text:p>-12.1132823119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7.29869025945055">
                <text:p>-7.29869025945055</text:p>
              </table:table-cell>
              <table:table-cell office:value-type="float" office:value="-11.856424351724">
                <text:p>-11.8564243517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7.10090758761457">
                <text:p>-7.10090758761457</text:p>
              </table:table-cell>
              <table:table-cell office:value-type="float" office:value="-11.6070932221318">
                <text:p>-11.6070932221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6.91041640433172">
                <text:p>-6.91041640433172</text:p>
              </table:table-cell>
              <table:table-cell office:value-type="float" office:value="-11.3647458272834">
                <text:p>-11.36474582728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6.72672631685973">
                <text:p>-6.72672631685973</text:p>
              </table:table-cell>
              <table:table-cell office:value-type="float" office:value="-11.1288880776608">
                <text:p>-11.1288880776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6.54939024461648">
                <text:p>-6.54939024461648</text:p>
              </table:table-cell>
              <table:table-cell office:value-type="float" office:value="-10.8990691288946">
                <text:p>-10.89906912889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6.37799947284741">
                <text:p>-6.37799947284741</text:p>
              </table:table-cell>
              <table:table-cell office:value-type="float" office:value="-10.6748764338014">
                <text:p>-10.6748764338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6.21217938564491">
                <text:p>-6.21217938564491</text:p>
              </table:table-cell>
              <table:table-cell office:value-type="float" office:value="-10.4559314737241">
                <text:p>-10.4559314737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6.05158576939944">
                <text:p>-6.05158576939944</text:p>
              </table:table-cell>
              <table:table-cell office:value-type="float" office:value="-10.2418860602521">
                <text:p>-10.24188606025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5.89590159758283">
                <text:p>-5.89590159758283</text:p>
              </table:table-cell>
              <table:table-cell office:value-type="float" office:value="-10.0324191182198">
                <text:p>-10.0324191182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5.74483422356695">
                <text:p>-5.74483422356695</text:p>
              </table:table-cell>
              <table:table-cell office:value-type="float" office:value="-9.82723387668545">
                <text:p>-9.82723387668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5.59811292086011">
                <text:p>-5.59811292086011</text:p>
              </table:table-cell>
              <table:table-cell office:value-type="float" office:value="-9.62605540726914">
                <text:p>-9.626055407269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5.45548672037662">
                <text:p>-5.45548672037662</text:p>
              </table:table-cell>
              <table:table-cell office:value-type="float" office:value="-9.42862845946507">
                <text:p>-9.42862845946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5.31672250265997">
                <text:p>-5.31672250265997</text:p>
              </table:table-cell>
              <table:table-cell office:value-type="float" office:value="-9.23471555084464">
                <text:p>-9.23471555084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5.1816033097568">
                <text:p>-5.1816033097568</text:p>
              </table:table-cell>
              <table:table-cell office:value-type="float" office:value="-9.04409527684603">
                <text:p>-9.04409527684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5.04992684699584">
                <text:p>-5.04992684699584</text:p>
              </table:table-cell>
              <table:table-cell office:value-type="float" office:value="-8.85656081040167">
                <text:p>-8.85656081040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-4.92150414950516">
                <text:p>-4.92150414950516</text:p>
              </table:table-cell>
              <table:table-cell office:value-type="float" office:value="-8.67191856623442">
                <text:p>-8.67191856623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-4.79615839209155">
                <text:p>-4.79615839209155</text:p>
              </table:table-cell>
              <table:table-cell office:value-type="float" office:value="-8.48998700844352">
                <text:p>-8.48998700844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-4.6737238242573">
                <text:p>-4.6737238242573</text:p>
              </table:table-cell>
              <table:table-cell office:value-type="float" office:value="-8.31059558315275">
                <text:p>-8.31059558315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-4.55404481476009">
                <text:p>-4.55404481476009</text:p>
              </table:table-cell>
              <table:table-cell office:value-type="float" office:value="-8.13358376062348">
                <text:p>-8.133583760623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-4.43697499232713">
                <text:p>-4.43697499232713</text:p>
              </table:table-cell>
              <table:table-cell office:value-type="float" office:value="-7.95880017344075">
                <text:p>-7.958800173440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4.32237647098954">
                <text:p>-4.32237647098954</text:p>
              </table:table-cell>
              <table:table-cell office:value-type="float" office:value="-7.78610183923502">
                <text:p>-7.786101839235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4.21011915006937">
                <text:p>-4.21011915006937</text:p>
              </table:table-cell>
              <table:table-cell office:value-type="float" office:value="-7.61535345796851">
                <text:p>-7.615353457968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4.10008008017858">
                <text:p>-4.10008008017858</text:p>
              </table:table-cell>
              <table:table-cell office:value-type="float" office:value="-7.44642677514209">
                <text:p>-7.44642677514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3.99214288771779">
                <text:p>-3.99214288771779</text:p>
              </table:table-cell>
              <table:table-cell office:value-type="float" office:value="-7.27920000340653">
                <text:p>-7.279200003406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3.88619725132417">
                <text:p>-3.88619725132417</text:p>
              </table:table-cell>
              <table:table-cell office:value-type="float" office:value="-7.11355729602367">
                <text:p>-7.11355729602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3.78213842454078">
                <text:p>-3.78213842454078</text:p>
              </table:table-cell>
              <table:table-cell office:value-type="float" office:value="-6.94938826644577">
                <text:p>-6.949388266445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3.67986679968531">
                <text:p>-3.67986679968531</text:p>
              </table:table-cell>
              <table:table-cell office:value-type="float" office:value="-6.78658754898654">
                <text:p>-6.786587548986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3.57928750850321">
                <text:p>-3.57928750850321</text:p>
              </table:table-cell>
              <table:table-cell office:value-type="float" office:value="-6.62505439616433">
                <text:p>-6.625054396164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3.48031005571337">
                <text:p>-3.48031005571337</text:p>
              </table:table-cell>
              <table:table-cell office:value-type="float" office:value="-6.46469230882097">
                <text:p>-6.46469230882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3.38284798200707">
                <text:p>-3.38284798200707</text:p>
              </table:table-cell>
              <table:table-cell office:value-type="float" office:value="-6.30540869557182">
                <text:p>-6.30540869557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3.28681855345257">
                <text:p>-3.28681855345257</text:p>
              </table:table-cell>
              <table:table-cell office:value-type="float" office:value="-6.14711455853447">
                <text:p>-6.14711455853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3.19214247459845">
                <text:p>-3.19214247459845</text:p>
              </table:table-cell>
              <table:table-cell office:value-type="float" office:value="-5.98972420262318">
                <text:p>-5.98972420262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3.09874362286419">
                <text:p>-3.09874362286419</text:p>
              </table:table-cell>
              <table:table-cell office:value-type="float" office:value="-5.83315496599232">
                <text:p>-5.833154965992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3.00654880206502">
                <text:p>-3.00654880206502</text:p>
              </table:table-cell>
              <table:table-cell office:value-type="float" office:value="-5.67732696946937">
                <text:p>-5.677326969469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2.91548751314289">
                <text:p>-2.91548751314289</text:p>
              </table:table-cell>
              <table:table-cell office:value-type="float" office:value="-5.52216288304301">
                <text:p>-5.522162883043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2.82549174037241">
                <text:p>-2.82549174037241</text:p>
              </table:table-cell>
              <table:table-cell office:value-type="float" office:value="-5.36758770766856">
                <text:p>-5.367587707668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2.73649575148289">
                <text:p>-2.73649575148289</text:p>
              </table:table-cell>
              <table:table-cell office:value-type="float" office:value="-5.2135285708246">
                <text:p>-5.2135285708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2.64843591028823">
                <text:p>-2.64843591028823</text:p>
              </table:table-cell>
              <table:table-cell office:value-type="float" office:value="-5.05991453440522">
                <text:p>-5.05991453440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2.56125050054908">
                <text:p>-2.56125050054908</text:p>
              </table:table-cell>
              <table:table-cell office:value-type="float" office:value="-4.90667641366436">
                <text:p>-4.90667641366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2.47487955990712">
                <text:p>-2.47487955990712</text:p>
              </table:table-cell>
              <table:table-cell office:value-type="float" office:value="-4.75374660604386">
                <text:p>-4.75374660604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2.38926472283312">
                <text:p>-2.38926472283312</text:p>
              </table:table-cell>
              <table:table-cell office:value-type="float" office:value="-4.6010589288181">
                <text:p>-4.60105892881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2.30434907161912">
                <text:p>-2.30434907161912</text:p>
              </table:table-cell>
              <table:table-cell office:value-type="float" office:value="-4.44854846457649">
                <text:p>-4.448548464576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2.22007699452302">
                <text:p>-2.22007699452302</text:p>
              </table:table-cell>
              <table:table-cell office:value-type="float" office:value="-4.29615141364216">
                <text:p>-4.29615141364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2.13639405024108">
                <text:p>-2.13639405024108</text:p>
              </table:table-cell>
              <table:table-cell office:value-type="float" office:value="-4.14380495259233">
                <text:p>-4.14380495259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2.05324683794295">
                <text:p>-2.05324683794295</text:p>
              </table:table-cell>
              <table:table-cell office:value-type="float" office:value="-3.99144709810408">
                <text:p>-3.99144709810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-1.97058287215448">
                <text:p>-1.97058287215448</text:p>
              </table:table-cell>
              <table:table-cell office:value-type="float" office:value="-3.83901657539918">
                <text:p>-3.83901657539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-1.88835046181671">
                <text:p>-1.88835046181671</text:p>
              </table:table-cell>
              <table:table-cell office:value-type="float" office:value="-3.68645269060467">
                <text:p>-3.686452690604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-1.80649859288665">
                <text:p>-1.80649859288665</text:p>
              </table:table-cell>
              <table:table-cell office:value-type="float" office:value="-3.53369520638161">
                <text:p>-3.533695206381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-1.72497681387571">
                <text:p>-1.72497681387571</text:p>
              </table:table-cell>
              <table:table-cell office:value-type="float" office:value="-3.38068422020471">
                <text:p>-3.380684220204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1.643735123747">
                <text:p>-1.643735123747</text:p>
              </table:table-cell>
              <table:table-cell office:value-type="float" office:value="-3.22736004469949">
                <text:p>-3.22736004469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1.56272386161204">
                <text:p>-1.56272386161204</text:p>
              </table:table-cell>
              <table:table-cell office:value-type="float" office:value="-3.07366308946266">
                <text:p>-3.073663089462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-1.48189359768237">
                <text:p>-1.48189359768237</text:p>
              </table:table-cell>
              <table:table-cell office:value-type="float" office:value="-2.91953374380487">
                <text:p>-2.91953374380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-1.40119502494097">
                <text:p>-1.40119502494097</text:p>
              </table:table-cell>
              <table:table-cell office:value-type="float" office:value="-2.7649122598642">
                <text:p>-2.76491225986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-1.32057885100382">
                <text:p>-1.32057885100382</text:p>
              </table:table-cell>
              <table:table-cell office:value-type="float" office:value="-2.60973863554219">
                <text:p>-2.609738635542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-1.23999568964187">
                <text:p>-1.23999568964187</text:p>
              </table:table-cell>
              <table:table-cell office:value-type="float" office:value="-2.4539524967141">
                <text:p>-2.45395249671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-1.1593959514298">
                <text:p>-1.1593959514298</text:p>
              </table:table-cell>
              <table:table-cell office:value-type="float" office:value="-2.29749297815925">
                <text:p>-2.29749297815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-1.07872973297862">
                <text:p>-1.07872973297862</text:p>
              </table:table-cell>
              <table:table-cell office:value-type="float" office:value="-2.14029860264701">
                <text:p>-2.140298602647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-0.997946704195455">
                <text:p>-0.997946704195455</text:p>
              </table:table-cell>
              <table:table-cell office:value-type="float" office:value="-1.98230715759908">
                <text:p>-1.98230715759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-0.916995992994826">
                <text:p>-0.916995992994826</text:p>
              </table:table-cell>
              <table:table-cell office:value-type="float" office:value="-1.82345556872797">
                <text:p>-1.823455568727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0.83582606686147">
                <text:p>-0.83582606686147</text:p>
              </table:table-cell>
              <table:table-cell office:value-type="float" office:value="-1.66367977002597">
                <text:p>-1.66367977002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-0.754384610634701">
                <text:p>-0.754384610634701</text:p>
              </table:table-cell>
              <table:table-cell office:value-type="float" office:value="-1.50291456944717">
                <text:p>-1.502914569447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-0.672618399848233">
                <text:p>-0.672618399848233</text:p>
              </table:table-cell>
              <table:table-cell office:value-type="float" office:value="-1.34109350958722">
                <text:p>-1.341093509587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-0.590473168916488">
                <text:p>-0.590473168916488</text:p>
              </table:table-cell>
              <table:table-cell office:value-type="float" office:value="-1.17814872262068">
                <text:p>-1.178148722620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0.507893473408345">
                <text:p>-0.507893473408345</text:p>
              </table:table-cell>
              <table:table-cell office:value-type="float" office:value="-1.01401077870374">
                <text:p>-1.014010778703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-0.424822545590936">
                <text:p>-0.424822545590936</text:p>
              </table:table-cell>
              <table:table-cell office:value-type="float" office:value="-0.848608526989693">
                <text:p>-0.8486085269896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-0.341202142358899">
                <text:p>-0.341202142358899</text:p>
              </table:table-cell>
              <table:table-cell office:value-type="float" office:value="-0.681868928334503">
                <text:p>-0.681868928334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-0.256972384587126">
                <text:p>-0.256972384587126</text:p>
              </table:table-cell>
              <table:table-cell office:value-type="float" office:value="-0.513716878690565">
                <text:p>-0.5137168786905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-0.172071586856344">
                <text:p>-0.172071586856344</text:p>
              </table:table-cell>
              <table:table-cell office:value-type="float" office:value="-0.344075022094691">
                <text:p>-0.3440750220946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-0.0864360763993932">
                <text:p>-0.0864360763993932</text:p>
              </table:table-cell>
              <table:table-cell office:value-type="float" office:value="-0.172863552052239">
                <text:p>-0.172863552052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ot_20__28_Rounded_29_" draw:display-name="Long Dot (Rounded)" draw:style="round" draw:dots1="1" draw:dots1-length="1%" draw:distance="399%"/>
  </office:styles>
</office:document-styles>
</file>